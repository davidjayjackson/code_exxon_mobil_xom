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m_us_d" table:style-name="ta1">
        <table:shapes>
          <draw:frame draw:z-index="0" draw:style-name="gr1" draw:text-style-name="P1" svg:width="4.5602in" svg:height="4.7161in" svg:x="7.865in" svg:y="0.6276in">
            <draw:object draw:notify-on-update-of-ranges="xom_us_d.A2:xom_us_d.A763 xom_us_d.B1:xom_us_d.B1 xom_us_d.B2:xom_us_d.B763 xom_us_d.D1:xom_us_d.D1 xom_us_d.D2:xom_us_d.D7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732in" svg:height="4.7083in" svg:x="2.4697in" svg:y="0.7402in">
            <draw:object draw:notify-on-update-of-ranges="xom_us_d.A1:xom_us_d.A1 xom_us_d.A2:xom_us_d.A763 xom_us_d.B1:xom_us_d.B1 xom_us_d.B2:xom_us_d.B763 xom_us_d.D1:xom_us_d.D1 xom_us_d.D2:xom_us_d.D763 xom_us_d.F1:xom_us_d.F1 xom_us_d.F2:xom_us_d.F763 xom_us_d.G1:xom_us_d.G1 xom_us_d.G2:xom_us_d.G7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A21</text:p>
          </table:table-cell>
          <table:table-cell office:value-type="string" calcext:value-type="string">
            <text:p>MA50</text:p>
          </table:table-cell>
          <table:table-cell office:value-type="string" calcext:value-type="string">
            <text:p>MA100</text:p>
          </table:table-cell>
          <table:table-cell office:value-type="string" calcext:value-type="string">
            <text:p>VWAP</text:p>
          </table:table-cell>
          <table:table-cell office:value-type="string" calcext:value-type="string">
            <text:p>VWAP+2SD</text:p>
          </table:table-cell>
          <table:table-cell office:value-type="string" calcext:value-type="string">
            <text:p>VWAP-2SD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112.67" calcext:value-type="float">
            <text:p>112.67</text:p>
          </table:table-cell>
          <table:table-cell office:value-type="float" office:value="19412238" calcext:value-type="float">
            <text:p>194122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113.12" calcext:value-type="float">
            <text:p>113.12</text:p>
          </table:table-cell>
          <table:table-cell office:value-type="float" office:value="14863516" calcext:value-type="float">
            <text:p>148635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113.97" calcext:value-type="float">
            <text:p>113.97</text:p>
          </table:table-cell>
          <table:table-cell office:value-type="float" office:value="13154094" calcext:value-type="float">
            <text:p>131540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08" calcext:value-type="date">
            <text:p>2024-06-08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09" calcext:value-type="date">
            <text:p>2024-06-09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13.08" calcext:value-type="float">
            <text:p>113.08</text:p>
          </table:table-cell>
          <table:table-cell office:value-type="float" office:value="15245227" calcext:value-type="float">
            <text:p>152452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112.17" calcext:value-type="float">
            <text:p>112.17</text:p>
          </table:table-cell>
          <table:table-cell office:value-type="float" office:value="12462403" calcext:value-type="float">
            <text:p>1246240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110.93" calcext:value-type="float">
            <text:p>110.93</text:p>
          </table:table-cell>
          <table:table-cell office:value-type="float" office:value="13606788" calcext:value-type="float">
            <text:p>136067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110.04" calcext:value-type="float">
            <text:p>110.04</text:p>
          </table:table-cell>
          <table:table-cell office:value-type="float" office:value="14466868" calcext:value-type="float">
            <text:p>1446686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5" calcext:value-type="date">
            <text:p>2024-06-15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6" calcext:value-type="date">
            <text:p>2024-06-16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147943" calcext:value-type="float">
            <text:p>2114794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109.38" calcext:value-type="float">
            <text:p>109.38</text:p>
          </table:table-cell>
          <table:table-cell office:value-type="float" office:value="17762915" calcext:value-type="float">
            <text:p>1776291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19" calcext:value-type="date">
            <text:p>2024-06-19</text:p>
          </table:table-cell>
          <table:table-cell office:value-type="float" office:value="109.38" calcext:value-type="float">
            <text:p>109.38</text:p>
          </table:table-cell>
          <table:table-cell office:value-type="float" office:value="17762915" calcext:value-type="float">
            <text:p>1776291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111.74" calcext:value-type="float">
            <text:p>111.74</text:p>
          </table:table-cell>
          <table:table-cell office:value-type="float" office:value="17433192" calcext:value-type="float">
            <text:p>174331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2" calcext:value-type="date">
            <text:p>2024-06-22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14.05" calcext:value-type="float">
            <text:p>114.05</text:p>
          </table:table-cell>
          <table:table-cell office:value-type="float" office:value="16266688" calcext:value-type="float">
            <text:p>162666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6213682" calcext:value-type="float">
            <text:p>1621368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114.41" calcext:value-type="float">
            <text:p>114.41</text:p>
          </table:table-cell>
          <table:table-cell office:value-type="float" office:value="15771751" calcext:value-type="float">
            <text:p>1577175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114.9" calcext:value-type="float">
            <text:p>114.9</text:p>
          </table:table-cell>
          <table:table-cell office:value-type="float" office:value="16812731" calcext:value-type="float">
            <text:p>168127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29" calcext:value-type="date">
            <text:p>2024-06-29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14.96" calcext:value-type="float">
            <text:p>114.96</text:p>
          </table:table-cell>
          <table:table-cell office:value-type="float" office:value="11972881" calcext:value-type="float">
            <text:p>1197288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114.18" calcext:value-type="float">
            <text:p>114.18</text:p>
          </table:table-cell>
          <table:table-cell office:value-type="float" office:value="13326703" calcext:value-type="float">
            <text:p>1332670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114.76" calcext:value-type="float">
            <text:p>114.76</text:p>
          </table:table-cell>
          <table:table-cell office:value-type="float" office:value="7732928" calcext:value-type="float">
            <text:p>773292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4" calcext:value-type="date">
            <text:p>2024-07-04</text:p>
          </table:table-cell>
          <table:table-cell office:value-type="float" office:value="114.76" calcext:value-type="float">
            <text:p>114.76</text:p>
          </table:table-cell>
          <table:table-cell office:value-type="float" office:value="7732928" calcext:value-type="float">
            <text:p>773292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6" calcext:value-type="date">
            <text:p>2024-07-06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7" calcext:value-type="date">
            <text:p>2024-07-07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12.18" calcext:value-type="float">
            <text:p>112.18</text:p>
          </table:table-cell>
          <table:table-cell office:value-type="float" office:value="13350549" calcext:value-type="float">
            <text:p>133505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110.94" calcext:value-type="float">
            <text:p>110.94</text:p>
          </table:table-cell>
          <table:table-cell office:value-type="float" office:value="11729085" calcext:value-type="float">
            <text:p>117290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111.92" calcext:value-type="float">
            <text:p>111.92</text:p>
          </table:table-cell>
          <table:table-cell office:value-type="float" office:value="10004094" calcext:value-type="float">
            <text:p>100040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113.25" calcext:value-type="float">
            <text:p>113.25</text:p>
          </table:table-cell>
          <table:table-cell office:value-type="float" office:value="13084875" calcext:value-type="float">
            <text:p>1308487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3" calcext:value-type="date">
            <text:p>2024-07-13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4" calcext:value-type="date">
            <text:p>2024-07-14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15.21" calcext:value-type="float">
            <text:p>115.21</text:p>
          </table:table-cell>
          <table:table-cell office:value-type="float" office:value="13032503" calcext:value-type="float">
            <text:p>1303250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116.04" calcext:value-type="float">
            <text:p>116.04</text:p>
          </table:table-cell>
          <table:table-cell office:value-type="float" office:value="13614050" calcext:value-type="float">
            <text:p>1361405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117.64" calcext:value-type="float">
            <text:p>117.64</text:p>
          </table:table-cell>
          <table:table-cell office:value-type="float" office:value="13602766" calcext:value-type="float">
            <text:p>136027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118.8" calcext:value-type="float">
            <text:p>118.8</text:p>
          </table:table-cell>
          <table:table-cell office:value-type="float" office:value="13033563" calcext:value-type="float">
            <text:p>130335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0" calcext:value-type="date">
            <text:p>2024-07-20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1" calcext:value-type="date">
            <text:p>2024-07-21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15.27" calcext:value-type="float">
            <text:p>115.27</text:p>
          </table:table-cell>
          <table:table-cell office:value-type="float" office:value="12065877" calcext:value-type="float">
            <text:p>120658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113.41" calcext:value-type="float">
            <text:p>113.41</text:p>
          </table:table-cell>
          <table:table-cell office:value-type="float" office:value="11251733" calcext:value-type="float">
            <text:p>112517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115.01" calcext:value-type="float">
            <text:p>115.01</text:p>
          </table:table-cell>
          <table:table-cell office:value-type="float" office:value="14925184" calcext:value-type="float">
            <text:p>1492518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117.43" calcext:value-type="float">
            <text:p>117.43</text:p>
          </table:table-cell>
          <table:table-cell office:value-type="float" office:value="17021698" calcext:value-type="float">
            <text:p>170216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7" calcext:value-type="date">
            <text:p>2024-07-27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8" calcext:value-type="date">
            <text:p>2024-07-28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16.1" calcext:value-type="float">
            <text:p>116.1</text:p>
          </table:table-cell>
          <table:table-cell office:value-type="float" office:value="8861806" calcext:value-type="float">
            <text:p>88618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118.17" calcext:value-type="float">
            <text:p>118.17</text:p>
          </table:table-cell>
          <table:table-cell office:value-type="float" office:value="12483857" calcext:value-type="float">
            <text:p>124838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118.59" calcext:value-type="float">
            <text:p>118.59</text:p>
          </table:table-cell>
          <table:table-cell office:value-type="float" office:value="15137710" calcext:value-type="float">
            <text:p>1513771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116.95" calcext:value-type="float">
            <text:p>116.95</text:p>
          </table:table-cell>
          <table:table-cell office:value-type="float" office:value="15051482" calcext:value-type="float">
            <text:p>1505148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3" calcext:value-type="date">
            <text:p>2024-08-03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4" calcext:value-type="date">
            <text:p>2024-08-04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8025858" calcext:value-type="float">
            <text:p>1802585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114.16" calcext:value-type="float">
            <text:p>114.16</text:p>
          </table:table-cell>
          <table:table-cell office:value-type="float" office:value="13647778" calcext:value-type="float">
            <text:p>1364777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115.68" calcext:value-type="float">
            <text:p>115.68</text:p>
          </table:table-cell>
          <table:table-cell office:value-type="float" office:value="13660657" calcext:value-type="float">
            <text:p>136606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117.89" calcext:value-type="float">
            <text:p>117.89</text:p>
          </table:table-cell>
          <table:table-cell office:value-type="float" office:value="13850993" calcext:value-type="float">
            <text:p>138509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0" calcext:value-type="date">
            <text:p>2024-08-10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1" calcext:value-type="date">
            <text:p>2024-08-11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19" calcext:value-type="float">
            <text:p>119</text:p>
          </table:table-cell>
          <table:table-cell office:value-type="float" office:value="13228911" calcext:value-type="float">
            <text:p>1322891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117.86" calcext:value-type="float">
            <text:p>117.86</text:p>
          </table:table-cell>
          <table:table-cell office:value-type="float" office:value="11585067" calcext:value-type="float">
            <text:p>115850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194520" calcext:value-type="float">
            <text:p>1219452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579432" calcext:value-type="float">
            <text:p>1157943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7" calcext:value-type="date">
            <text:p>2024-08-17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8" calcext:value-type="date">
            <text:p>2024-08-18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18.53" calcext:value-type="float">
            <text:p>118.53</text:p>
          </table:table-cell>
          <table:table-cell office:value-type="float" office:value="12417467" calcext:value-type="float">
            <text:p>124174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114.58" calcext:value-type="float">
            <text:p>114.58</text:p>
          </table:table-cell>
          <table:table-cell office:value-type="float" office:value="15631967" calcext:value-type="float">
            <text:p>156319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752358" calcext:value-type="float">
            <text:p>1175235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114.73" calcext:value-type="float">
            <text:p>114.73</text:p>
          </table:table-cell>
          <table:table-cell office:value-type="float" office:value="10609501" calcext:value-type="float">
            <text:p>106095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4" calcext:value-type="date">
            <text:p>2024-08-24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5" calcext:value-type="date">
            <text:p>2024-08-25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18.81" calcext:value-type="float">
            <text:p>118.81</text:p>
          </table:table-cell>
          <table:table-cell office:value-type="float" office:value="13671016" calcext:value-type="float">
            <text:p>136710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117.68" calcext:value-type="float">
            <text:p>117.68</text:p>
          </table:table-cell>
          <table:table-cell office:value-type="float" office:value="9991631" calcext:value-type="float">
            <text:p>99916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116.52" calcext:value-type="float">
            <text:p>116.52</text:p>
          </table:table-cell>
          <table:table-cell office:value-type="float" office:value="10742867" calcext:value-type="float">
            <text:p>107428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118.13" calcext:value-type="float">
            <text:p>118.13</text:p>
          </table:table-cell>
          <table:table-cell office:value-type="float" office:value="10753895" calcext:value-type="float">
            <text:p>107538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115.47" calcext:value-type="float">
            <text:p>115.47</text:p>
          </table:table-cell>
          <table:table-cell office:value-type="float" office:value="15725139" calcext:value-type="float">
            <text:p>157251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114.06" calcext:value-type="float">
            <text:p>114.06</text:p>
          </table:table-cell>
          <table:table-cell office:value-type="float" office:value="12620584" calcext:value-type="float">
            <text:p>1262058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113.17" calcext:value-type="float">
            <text:p>113.17</text:p>
          </table:table-cell>
          <table:table-cell office:value-type="float" office:value="17200770" calcext:value-type="float">
            <text:p>172007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7" calcext:value-type="date">
            <text:p>2024-09-07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8" calcext:value-type="date">
            <text:p>2024-09-08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15.01" calcext:value-type="float">
            <text:p>115.01</text:p>
          </table:table-cell>
          <table:table-cell office:value-type="float" office:value="21645325" calcext:value-type="float">
            <text:p>216453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110.82" calcext:value-type="float">
            <text:p>110.82</text:p>
          </table:table-cell>
          <table:table-cell office:value-type="float" office:value="20913405" calcext:value-type="float">
            <text:p>2091340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109.72" calcext:value-type="float">
            <text:p>109.72</text:p>
          </table:table-cell>
          <table:table-cell office:value-type="float" office:value="19571945" calcext:value-type="float">
            <text:p>195719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111.23" calcext:value-type="float">
            <text:p>111.23</text:p>
          </table:table-cell>
          <table:table-cell office:value-type="float" office:value="15923318" calcext:value-type="float">
            <text:p>159233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4" calcext:value-type="date">
            <text:p>2024-09-14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5" calcext:value-type="date">
            <text:p>2024-09-15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12.71" calcext:value-type="float">
            <text:p>112.71</text:p>
          </table:table-cell>
          <table:table-cell office:value-type="float" office:value="11729034" calcext:value-type="float">
            <text:p>1172903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114.18" calcext:value-type="float">
            <text:p>114.18</text:p>
          </table:table-cell>
          <table:table-cell office:value-type="float" office:value="12202556" calcext:value-type="float">
            <text:p>122025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114.58" calcext:value-type="float">
            <text:p>114.58</text:p>
          </table:table-cell>
          <table:table-cell office:value-type="float" office:value="12569929" calcext:value-type="float">
            <text:p>125699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116" calcext:value-type="float">
            <text:p>116</text:p>
          </table:table-cell>
          <table:table-cell office:value-type="float" office:value="12660642" calcext:value-type="float">
            <text:p>1266064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1" calcext:value-type="date">
            <text:p>2024-09-21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2" calcext:value-type="date">
            <text:p>2024-09-22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17.36" calcext:value-type="float">
            <text:p>117.36</text:p>
          </table:table-cell>
          <table:table-cell office:value-type="float" office:value="16066285" calcext:value-type="float">
            <text:p>160662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984863" calcext:value-type="float">
            <text:p>119848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3816041" calcext:value-type="float">
            <text:p>1381604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112.8" calcext:value-type="float">
            <text:p>112.8</text:p>
          </table:table-cell>
          <table:table-cell office:value-type="float" office:value="16887908" calcext:value-type="float">
            <text:p>168879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29" calcext:value-type="date">
            <text:p>2024-09-29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17.22" calcext:value-type="float">
            <text:p>117.22</text:p>
          </table:table-cell>
          <table:table-cell office:value-type="float" office:value="13250657" calcext:value-type="float">
            <text:p>132506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119.93" calcext:value-type="float">
            <text:p>119.93</text:p>
          </table:table-cell>
          <table:table-cell office:value-type="float" office:value="23235878" calcext:value-type="float">
            <text:p>2323587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121.52" calcext:value-type="float">
            <text:p>121.52</text:p>
          </table:table-cell>
          <table:table-cell office:value-type="float" office:value="17129676" calcext:value-type="float">
            <text:p>1712967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122.58" calcext:value-type="float">
            <text:p>122.58</text:p>
          </table:table-cell>
          <table:table-cell office:value-type="float" office:value="16524334" calcext:value-type="float">
            <text:p>1652433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5" calcext:value-type="date">
            <text:p>2024-10-05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6" calcext:value-type="date">
            <text:p>2024-10-0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25.37" calcext:value-type="float">
            <text:p>125.37</text:p>
          </table:table-cell>
          <table:table-cell office:value-type="float" office:value="15714440" calcext:value-type="float">
            <text:p>1571444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122.04" calcext:value-type="float">
            <text:p>122.04</text:p>
          </table:table-cell>
          <table:table-cell office:value-type="float" office:value="14818475" calcext:value-type="float">
            <text:p>1481847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122.09" calcext:value-type="float">
            <text:p>122.09</text:p>
          </table:table-cell>
          <table:table-cell office:value-type="float" office:value="11144864" calcext:value-type="float">
            <text:p>1114486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123.14" calcext:value-type="float">
            <text:p>123.14</text:p>
          </table:table-cell>
          <table:table-cell office:value-type="float" office:value="10243320" calcext:value-type="float">
            <text:p>1024332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2" calcext:value-type="date">
            <text:p>2024-10-12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3" calcext:value-type="date">
            <text:p>2024-10-13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24.08" calcext:value-type="float">
            <text:p>124.08</text:p>
          </table:table-cell>
          <table:table-cell office:value-type="float" office:value="9808122" calcext:value-type="float">
            <text:p>980812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120.35" calcext:value-type="float">
            <text:p>120.35</text:p>
          </table:table-cell>
          <table:table-cell office:value-type="float" office:value="15771317" calcext:value-type="float">
            <text:p>157713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120.66" calcext:value-type="float">
            <text:p>120.66</text:p>
          </table:table-cell>
          <table:table-cell office:value-type="float" office:value="8426770" calcext:value-type="float">
            <text:p>84267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204857" calcext:value-type="float">
            <text:p>112048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19" calcext:value-type="date">
            <text:p>2024-10-19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0" calcext:value-type="date">
            <text:p>2024-10-20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177777" calcext:value-type="float">
            <text:p>101777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120.7" calcext:value-type="float">
            <text:p>120.7</text:p>
          </table:table-cell>
          <table:table-cell office:value-type="float" office:value="9201408" calcext:value-type="float">
            <text:p>92014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120.27" calcext:value-type="float">
            <text:p>120.27</text:p>
          </table:table-cell>
          <table:table-cell office:value-type="float" office:value="8320330" calcext:value-type="float">
            <text:p>83203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119.59" calcext:value-type="float">
            <text:p>119.59</text:p>
          </table:table-cell>
          <table:table-cell office:value-type="float" office:value="9905556" calcext:value-type="float">
            <text:p>99055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6" calcext:value-type="date">
            <text:p>2024-10-26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7" calcext:value-type="date">
            <text:p>2024-10-27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18.9" calcext:value-type="float">
            <text:p>118.9</text:p>
          </table:table-cell>
          <table:table-cell office:value-type="float" office:value="11844545" calcext:value-type="float">
            <text:p>118445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117.28" calcext:value-type="float">
            <text:p>117.28</text:p>
          </table:table-cell>
          <table:table-cell office:value-type="float" office:value="14731024" calcext:value-type="float">
            <text:p>147310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116.69" calcext:value-type="float">
            <text:p>116.69</text:p>
          </table:table-cell>
          <table:table-cell office:value-type="float" office:value="12303738" calcext:value-type="float">
            <text:p>123037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116.78" calcext:value-type="float">
            <text:p>116.78</text:p>
          </table:table-cell>
          <table:table-cell office:value-type="float" office:value="20511977" calcext:value-type="float">
            <text:p>205119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3" calcext:value-type="date">
            <text:p>2024-11-03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18.61" calcext:value-type="float">
            <text:p>118.61</text:p>
          </table:table-cell>
          <table:table-cell office:value-type="float" office:value="14965433" calcext:value-type="float">
            <text:p>149654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118.96" calcext:value-type="float">
            <text:p>118.96</text:p>
          </table:table-cell>
          <table:table-cell office:value-type="float" office:value="10436744" calcext:value-type="float">
            <text:p>104367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121" calcext:value-type="float">
            <text:p>121</text:p>
          </table:table-cell>
          <table:table-cell office:value-type="float" office:value="20807681" calcext:value-type="float">
            <text:p>2080768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121.15" calcext:value-type="float">
            <text:p>121.15</text:p>
          </table:table-cell>
          <table:table-cell office:value-type="float" office:value="12184431" calcext:value-type="float">
            <text:p>121844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09" calcext:value-type="date">
            <text:p>2024-11-09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0" calcext:value-type="date">
            <text:p>2024-11-10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969663" calcext:value-type="float">
            <text:p>119696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972802" calcext:value-type="float">
            <text:p>1197280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121.47" calcext:value-type="float">
            <text:p>121.47</text:p>
          </table:table-cell>
          <table:table-cell office:value-type="float" office:value="15127877" calcext:value-type="float">
            <text:p>151278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120.56" calcext:value-type="float">
            <text:p>120.56</text:p>
          </table:table-cell>
          <table:table-cell office:value-type="float" office:value="13041845" calcext:value-type="float">
            <text:p>130418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6" calcext:value-type="date">
            <text:p>2024-11-16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7" calcext:value-type="date">
            <text:p>2024-11-17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20.31" calcext:value-type="float">
            <text:p>120.31</text:p>
          </table:table-cell>
          <table:table-cell office:value-type="float" office:value="14243701" calcext:value-type="float">
            <text:p>142437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118.63" calcext:value-type="float">
            <text:p>118.63</text:p>
          </table:table-cell>
          <table:table-cell office:value-type="float" office:value="11584382" calcext:value-type="float">
            <text:p>1158438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360932" calcext:value-type="float">
            <text:p>1136093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121.93" calcext:value-type="float">
            <text:p>121.93</text:p>
          </table:table-cell>
          <table:table-cell office:value-type="float" office:value="14675422" calcext:value-type="float">
            <text:p>1467542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3" calcext:value-type="date">
            <text:p>2024-11-23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4" calcext:value-type="date">
            <text:p>2024-11-24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19.97" calcext:value-type="float">
            <text:p>119.97</text:p>
          </table:table-cell>
          <table:table-cell office:value-type="float" office:value="26580295" calcext:value-type="float">
            <text:p>265802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117.97" calcext:value-type="float">
            <text:p>117.97</text:p>
          </table:table-cell>
          <table:table-cell office:value-type="float" office:value="14827327" calcext:value-type="float">
            <text:p>148273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079122" calcext:value-type="float">
            <text:p>1107912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8" calcext:value-type="date">
            <text:p>2024-11-28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079122" calcext:value-type="float">
            <text:p>1107912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17.85" calcext:value-type="float">
            <text:p>117.85</text:p>
          </table:table-cell>
          <table:table-cell office:value-type="float" office:value="12687317" calcext:value-type="float">
            <text:p>126873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117.67" calcext:value-type="float">
            <text:p>117.67</text:p>
          </table:table-cell>
          <table:table-cell office:value-type="float" office:value="11756566" calcext:value-type="float">
            <text:p>117565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114.28" calcext:value-type="float">
            <text:p>114.28</text:p>
          </table:table-cell>
          <table:table-cell office:value-type="float" office:value="19520583" calcext:value-type="float">
            <text:p>1952058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114.78" calcext:value-type="float">
            <text:p>114.78</text:p>
          </table:table-cell>
          <table:table-cell office:value-type="float" office:value="15751204" calcext:value-type="float">
            <text:p>157512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7" calcext:value-type="date">
            <text:p>2024-12-07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8" calcext:value-type="date">
            <text:p>2024-12-08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12.9" calcext:value-type="float">
            <text:p>112.9</text:p>
          </table:table-cell>
          <table:table-cell office:value-type="float" office:value="17412565" calcext:value-type="float">
            <text:p>174125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112.67" calcext:value-type="float">
            <text:p>112.67</text:p>
          </table:table-cell>
          <table:table-cell office:value-type="float" office:value="20990943" calcext:value-type="float">
            <text:p>2099094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111.92" calcext:value-type="float">
            <text:p>111.92</text:p>
          </table:table-cell>
          <table:table-cell office:value-type="float" office:value="32392238" calcext:value-type="float">
            <text:p>323922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111.82" calcext:value-type="float">
            <text:p>111.82</text:p>
          </table:table-cell>
          <table:table-cell office:value-type="float" office:value="14543256" calcext:value-type="float">
            <text:p>145432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4" calcext:value-type="date">
            <text:p>2024-12-14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5" calcext:value-type="date">
            <text:p>2024-12-15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08.47" calcext:value-type="float">
            <text:p>108.47</text:p>
          </table:table-cell>
          <table:table-cell office:value-type="float" office:value="20256088" calcext:value-type="float">
            <text:p>202560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108.01" calcext:value-type="float">
            <text:p>108.01</text:p>
          </table:table-cell>
          <table:table-cell office:value-type="float" office:value="17553995" calcext:value-type="float">
            <text:p>175539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106.42" calcext:value-type="float">
            <text:p>106.42</text:p>
          </table:table-cell>
          <table:table-cell office:value-type="float" office:value="17114542" calcext:value-type="float">
            <text:p>1711454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105.51" calcext:value-type="float">
            <text:p>105.51</text:p>
          </table:table-cell>
          <table:table-cell office:value-type="float" office:value="20565557" calcext:value-type="float">
            <text:p>205655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1" calcext:value-type="date">
            <text:p>2024-12-21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2" calcext:value-type="date">
            <text:p>2024-12-22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06.3" calcext:value-type="float">
            <text:p>106.3</text:p>
          </table:table-cell>
          <table:table-cell office:value-type="float" office:value="12285078" calcext:value-type="float">
            <text:p>1228507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106.4" calcext:value-type="float">
            <text:p>106.4</text:p>
          </table:table-cell>
          <table:table-cell office:value-type="float" office:value="7806997" calcext:value-type="float">
            <text:p>78069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float" office:value="106.4" calcext:value-type="float">
            <text:p>106.4</text:p>
          </table:table-cell>
          <table:table-cell office:value-type="float" office:value="7806997" calcext:value-type="float">
            <text:p>78069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106.49" calcext:value-type="float">
            <text:p>106.49</text:p>
          </table:table-cell>
          <table:table-cell office:value-type="float" office:value="9653408" calcext:value-type="float">
            <text:p>96534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8" calcext:value-type="date">
            <text:p>2024-12-28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05.76" calcext:value-type="float">
            <text:p>105.76</text:p>
          </table:table-cell>
          <table:table-cell office:value-type="float" office:value="11080770" calcext:value-type="float">
            <text:p>110807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107.57" calcext:value-type="float">
            <text:p>107.57</text:p>
          </table:table-cell>
          <table:table-cell office:value-type="float" office:value="12387756" calcext:value-type="float">
            <text:p>123877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float" office:value="107.57" calcext:value-type="float">
            <text:p>107.57</text:p>
          </table:table-cell>
          <table:table-cell office:value-type="float" office:value="12387756" calcext:value-type="float">
            <text:p>123877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12685447" calcext:value-type="float">
            <text:p>1268544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4" calcext:value-type="date">
            <text:p>2025-01-04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5" calcext:value-type="date">
            <text:p>2025-01-05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07.74" calcext:value-type="float">
            <text:p>107.74</text:p>
          </table:table-cell>
          <table:table-cell office:value-type="float" office:value="15623677" calcext:value-type="float">
            <text:p>156236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2625890" calcext:value-type="float">
            <text:p>1262589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106.93" calcext:value-type="float">
            <text:p>106.93</text:p>
          </table:table-cell>
          <table:table-cell office:value-type="float" office:value="17858110" calcext:value-type="float">
            <text:p>1785811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09" calcext:value-type="date">
            <text:p>2025-01-09</text:p>
          </table:table-cell>
          <table:table-cell office:value-type="float" office:value="106.93" calcext:value-type="float">
            <text:p>106.93</text:p>
          </table:table-cell>
          <table:table-cell office:value-type="float" office:value="17858110" calcext:value-type="float">
            <text:p>1785811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1" calcext:value-type="date">
            <text:p>2025-01-11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2" calcext:value-type="date">
            <text:p>2025-01-12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09.29" calcext:value-type="float">
            <text:p>109.29</text:p>
          </table:table-cell>
          <table:table-cell office:value-type="float" office:value="17073395" calcext:value-type="float">
            <text:p>170733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191175" calcext:value-type="float">
            <text:p>1119117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111.51" calcext:value-type="float">
            <text:p>111.51</text:p>
          </table:table-cell>
          <table:table-cell office:value-type="float" office:value="14521095" calcext:value-type="float">
            <text:p>145210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111.32" calcext:value-type="float">
            <text:p>111.32</text:p>
          </table:table-cell>
          <table:table-cell office:value-type="float" office:value="10366585" calcext:value-type="float">
            <text:p>103665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8" calcext:value-type="date">
            <text:p>2025-01-18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19" calcext:value-type="date">
            <text:p>2025-01-19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111.47" calcext:value-type="float">
            <text:p>111.47</text:p>
          </table:table-cell>
          <table:table-cell office:value-type="float" office:value="20416286" calcext:value-type="float">
            <text:p>2041628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109.53" calcext:value-type="float">
            <text:p>109.53</text:p>
          </table:table-cell>
          <table:table-cell office:value-type="float" office:value="15718012" calcext:value-type="float">
            <text:p>1571801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110.15" calcext:value-type="float">
            <text:p>110.15</text:p>
          </table:table-cell>
          <table:table-cell office:value-type="float" office:value="13726784" calcext:value-type="float">
            <text:p>1372678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5" calcext:value-type="date">
            <text:p>2025-01-25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6" calcext:value-type="date">
            <text:p>2025-01-26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10.17" calcext:value-type="float">
            <text:p>110.17</text:p>
          </table:table-cell>
          <table:table-cell office:value-type="float" office:value="15926670" calcext:value-type="float">
            <text:p>159266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108.04" calcext:value-type="float">
            <text:p>108.04</text:p>
          </table:table-cell>
          <table:table-cell office:value-type="float" office:value="15862029" calcext:value-type="float">
            <text:p>158620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108.67" calcext:value-type="float">
            <text:p>108.67</text:p>
          </table:table-cell>
          <table:table-cell office:value-type="float" office:value="12345523" calcext:value-type="float">
            <text:p>1234552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109.57" calcext:value-type="float">
            <text:p>109.57</text:p>
          </table:table-cell>
          <table:table-cell office:value-type="float" office:value="14346335" calcext:value-type="float">
            <text:p>143463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07.09" calcext:value-type="float">
            <text:p>107.09</text:p>
          </table:table-cell>
          <table:table-cell office:value-type="float" office:value="14623197" calcext:value-type="float">
            <text:p>146231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109.96" calcext:value-type="float">
            <text:p>109.96</text:p>
          </table:table-cell>
          <table:table-cell office:value-type="float" office:value="14835692" calcext:value-type="float">
            <text:p>148356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109.88" calcext:value-type="float">
            <text:p>109.88</text:p>
          </table:table-cell>
          <table:table-cell office:value-type="float" office:value="13364387" calcext:value-type="float">
            <text:p>133643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108.43" calcext:value-type="float">
            <text:p>108.43</text:p>
          </table:table-cell>
          <table:table-cell office:value-type="float" office:value="13411401" calcext:value-type="float">
            <text:p>134114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8" calcext:value-type="date">
            <text:p>2025-02-08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09" calcext:value-type="date">
            <text:p>2025-02-09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10.97" calcext:value-type="float">
            <text:p>110.97</text:p>
          </table:table-cell>
          <table:table-cell office:value-type="float" office:value="12142197" calcext:value-type="float">
            <text:p>121421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111.67" calcext:value-type="float">
            <text:p>111.67</text:p>
          </table:table-cell>
          <table:table-cell office:value-type="float" office:value="12713127" calcext:value-type="float">
            <text:p>127131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8244122" calcext:value-type="float">
            <text:p>1824412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108.13" calcext:value-type="float">
            <text:p>108.13</text:p>
          </table:table-cell>
          <table:table-cell office:value-type="float" office:value="15459952" calcext:value-type="float">
            <text:p>1545995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110.14" calcext:value-type="float">
            <text:p>110.14</text:p>
          </table:table-cell>
          <table:table-cell office:value-type="float" office:value="20060298" calcext:value-type="float">
            <text:p>200602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110.3" calcext:value-type="float">
            <text:p>110.3</text:p>
          </table:table-cell>
          <table:table-cell office:value-type="float" office:value="10964698" calcext:value-type="float">
            <text:p>109646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112" calcext:value-type="float">
            <text:p>112</text:p>
          </table:table-cell>
          <table:table-cell office:value-type="float" office:value="16325803" calcext:value-type="float">
            <text:p>1632580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2" calcext:value-type="date">
            <text:p>2025-02-22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3" calcext:value-type="date">
            <text:p>2025-02-23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11.27" calcext:value-type="float">
            <text:p>111.27</text:p>
          </table:table-cell>
          <table:table-cell office:value-type="float" office:value="13153471" calcext:value-type="float">
            <text:p>131534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109.73" calcext:value-type="float">
            <text:p>109.73</text:p>
          </table:table-cell>
          <table:table-cell office:value-type="float" office:value="14496964" calcext:value-type="float">
            <text:p>1449696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446405" calcext:value-type="float">
            <text:p>1044640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5293173" calcext:value-type="float">
            <text:p>152931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2" calcext:value-type="date">
            <text:p>2025-03-02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07.76" calcext:value-type="float">
            <text:p>107.76</text:p>
          </table:table-cell>
          <table:table-cell office:value-type="float" office:value="18706879" calcext:value-type="float">
            <text:p>187068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float" office:value="107.54" calcext:value-type="float">
            <text:p>107.54</text:p>
          </table:table-cell>
          <table:table-cell office:value-type="float" office:value="19394905" calcext:value-type="float">
            <text:p>1939490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float" office:value="105.44" calcext:value-type="float">
            <text:p>105.44</text:p>
          </table:table-cell>
          <table:table-cell office:value-type="float" office:value="24822245" calcext:value-type="float">
            <text:p>248222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7150233" calcext:value-type="float">
            <text:p>171502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8" calcext:value-type="date">
            <text:p>2025-03-08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09" calcext:value-type="date">
            <text:p>2025-03-09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11.8" calcext:value-type="float">
            <text:p>111.8</text:p>
          </table:table-cell>
          <table:table-cell office:value-type="float" office:value="22749073" calcext:value-type="float">
            <text:p>227490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float" office:value="109.16" calcext:value-type="float">
            <text:p>109.16</text:p>
          </table:table-cell>
          <table:table-cell office:value-type="float" office:value="19904735" calcext:value-type="float">
            <text:p>199047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float" office:value="109.13" calcext:value-type="float">
            <text:p>109.13</text:p>
          </table:table-cell>
          <table:table-cell office:value-type="float" office:value="14051500" calcext:value-type="float">
            <text:p>1405150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108.67" calcext:value-type="float">
            <text:p>108.67</text:p>
          </table:table-cell>
          <table:table-cell office:value-type="float" office:value="17767836" calcext:value-type="float">
            <text:p>1776783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5" calcext:value-type="date">
            <text:p>2025-03-15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6" calcext:value-type="date">
            <text:p>2025-03-16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13.76" calcext:value-type="float">
            <text:p>113.76</text:p>
          </table:table-cell>
          <table:table-cell office:value-type="float" office:value="19908789" calcext:value-type="float">
            <text:p>199087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float" office:value="113.64" calcext:value-type="float">
            <text:p>113.64</text:p>
          </table:table-cell>
          <table:table-cell office:value-type="float" office:value="15998713" calcext:value-type="float">
            <text:p>1599871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float" office:value="115.41" calcext:value-type="float">
            <text:p>115.41</text:p>
          </table:table-cell>
          <table:table-cell office:value-type="float" office:value="17315001" calcext:value-type="float">
            <text:p>173150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float" office:value="115.9" calcext:value-type="float">
            <text:p>115.9</text:p>
          </table:table-cell>
          <table:table-cell office:value-type="float" office:value="16230772" calcext:value-type="float">
            <text:p>1623077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2" calcext:value-type="date">
            <text:p>2025-03-22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3" calcext:value-type="date">
            <text:p>2025-03-23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15.8" calcext:value-type="float">
            <text:p>115.8</text:p>
          </table:table-cell>
          <table:table-cell office:value-type="float" office:value="14207469" calcext:value-type="float">
            <text:p>142074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float" office:value="116.59" calcext:value-type="float">
            <text:p>116.59</text:p>
          </table:table-cell>
          <table:table-cell office:value-type="float" office:value="12081795" calcext:value-type="float">
            <text:p>120817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float" office:value="118.27" calcext:value-type="float">
            <text:p>118.27</text:p>
          </table:table-cell>
          <table:table-cell office:value-type="float" office:value="14112756" calcext:value-type="float">
            <text:p>141127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float" office:value="117.89" calcext:value-type="float">
            <text:p>117.89</text:p>
          </table:table-cell>
          <table:table-cell office:value-type="float" office:value="12740786" calcext:value-type="float">
            <text:p>1274078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29" calcext:value-type="date">
            <text:p>2025-03-29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30" calcext:value-type="date">
            <text:p>2025-03-30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18.93" calcext:value-type="float">
            <text:p>118.93</text:p>
          </table:table-cell>
          <table:table-cell office:value-type="float" office:value="21652345" calcext:value-type="float">
            <text:p>216523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119.04" calcext:value-type="float">
            <text:p>119.04</text:p>
          </table:table-cell>
          <table:table-cell office:value-type="float" office:value="12425434" calcext:value-type="float">
            <text:p>1242543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118.67" calcext:value-type="float">
            <text:p>118.67</text:p>
          </table:table-cell>
          <table:table-cell office:value-type="float" office:value="12614605" calcext:value-type="float">
            <text:p>1261460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float" office:value="112.43" calcext:value-type="float">
            <text:p>112.43</text:p>
          </table:table-cell>
          <table:table-cell office:value-type="float" office:value="21204636" calcext:value-type="float">
            <text:p>2120463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5" calcext:value-type="date">
            <text:p>2025-04-05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6" calcext:value-type="date">
            <text:p>2025-04-06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02.94" calcext:value-type="float">
            <text:p>102.94</text:p>
          </table:table-cell>
          <table:table-cell office:value-type="float" office:value="35068450" calcext:value-type="float">
            <text:p>3506845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float" office:value="100.77" calcext:value-type="float">
            <text:p>100.77</text:p>
          </table:table-cell>
          <table:table-cell office:value-type="float" office:value="27147750" calcext:value-type="float">
            <text:p>2714775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105.8" calcext:value-type="float">
            <text:p>105.8</text:p>
          </table:table-cell>
          <table:table-cell office:value-type="float" office:value="30063287" calcext:value-type="float">
            <text:p>300632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float" office:value="99.93" calcext:value-type="float">
            <text:p>99.93</text:p>
          </table:table-cell>
          <table:table-cell office:value-type="float" office:value="33999317" calcext:value-type="float">
            <text:p>339993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2" calcext:value-type="date">
            <text:p>2025-04-12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3" calcext:value-type="date">
            <text:p>2025-04-13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03.39" calcext:value-type="float">
            <text:p>103.39</text:p>
          </table:table-cell>
          <table:table-cell office:value-type="float" office:value="18019969" calcext:value-type="float">
            <text:p>180199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103.1" calcext:value-type="float">
            <text:p>103.1</text:p>
          </table:table-cell>
          <table:table-cell office:value-type="float" office:value="13164863" calcext:value-type="float">
            <text:p>131648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104.19" calcext:value-type="float">
            <text:p>104.19</text:p>
          </table:table-cell>
          <table:table-cell office:value-type="float" office:value="13607024" calcext:value-type="float">
            <text:p>136070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19" calcext:value-type="date">
            <text:p>2025-04-19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0" calcext:value-type="date">
            <text:p>2025-04-20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05.35" calcext:value-type="float">
            <text:p>105.35</text:p>
          </table:table-cell>
          <table:table-cell office:value-type="float" office:value="16926493" calcext:value-type="float">
            <text:p>169264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108.3" calcext:value-type="float">
            <text:p>108.3</text:p>
          </table:table-cell>
          <table:table-cell office:value-type="float" office:value="13147049" calcext:value-type="float">
            <text:p>131470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4235710" calcext:value-type="float">
            <text:p>1423571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108.63" calcext:value-type="float">
            <text:p>108.63</text:p>
          </table:table-cell>
          <table:table-cell office:value-type="float" office:value="9849553" calcext:value-type="float">
            <text:p>984955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6" calcext:value-type="date">
            <text:p>2025-04-26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7" calcext:value-type="date">
            <text:p>2025-04-27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08.63" calcext:value-type="float">
            <text:p>108.63</text:p>
          </table:table-cell>
          <table:table-cell office:value-type="float" office:value="13890869" calcext:value-type="float">
            <text:p>138908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108.36" calcext:value-type="float">
            <text:p>108.36</text:p>
          </table:table-cell>
          <table:table-cell office:value-type="float" office:value="9483135" calcext:value-type="float">
            <text:p>94831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105.63" calcext:value-type="float">
            <text:p>105.63</text:p>
          </table:table-cell>
          <table:table-cell office:value-type="float" office:value="20379282" calcext:value-type="float">
            <text:p>2037928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105.78" calcext:value-type="float">
            <text:p>105.78</text:p>
          </table:table-cell>
          <table:table-cell office:value-type="float" office:value="18610256" calcext:value-type="float">
            <text:p>186102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3" calcext:value-type="date">
            <text:p>2025-05-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4" calcext:value-type="date">
            <text:p>2025-05-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03.27" calcext:value-type="float">
            <text:p>103.27</text:p>
          </table:table-cell>
          <table:table-cell office:value-type="float" office:value="19623970" calcext:value-type="float">
            <text:p>196239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104.71" calcext:value-type="float">
            <text:p>104.71</text:p>
          </table:table-cell>
          <table:table-cell office:value-type="float" office:value="16303449" calcext:value-type="float">
            <text:p>163034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04.61" calcext:value-type="float">
            <text:p>104.61</text:p>
          </table:table-cell>
          <table:table-cell office:value-type="float" office:value="12335924" calcext:value-type="float">
            <text:p>123359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196548" calcext:value-type="float">
            <text:p>1919654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0" calcext:value-type="date">
            <text:p>2025-05-10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1" calcext:value-type="date">
            <text:p>2025-05-11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09.16" calcext:value-type="float">
            <text:p>109.16</text:p>
          </table:table-cell>
          <table:table-cell office:value-type="float" office:value="14244559" calcext:value-type="float">
            <text:p>1424455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3" calcext:value-type="date">
            <text:p>2025-05-13</text:p>
          </table:table-cell>
          <table:table-cell office:value-type="float" office:value="109.46" calcext:value-type="float">
            <text:p>109.46</text:p>
          </table:table-cell>
          <table:table-cell office:value-type="float" office:value="13350836" calcext:value-type="float">
            <text:p>1335083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4" calcext:value-type="date">
            <text:p>2025-05-14</text:p>
          </table:table-cell>
          <table:table-cell office:value-type="float" office:value="108.48" calcext:value-type="float">
            <text:p>108.48</text:p>
          </table:table-cell>
          <table:table-cell office:value-type="float" office:value="15494932" calcext:value-type="float">
            <text:p>1549493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108.58" calcext:value-type="float">
            <text:p>108.58</text:p>
          </table:table-cell>
          <table:table-cell office:value-type="float" office:value="15004291" calcext:value-type="float">
            <text:p>1500429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7" calcext:value-type="date">
            <text:p>2025-05-17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8" calcext:value-type="date">
            <text:p>2025-05-18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06.47" calcext:value-type="float">
            <text:p>106.47</text:p>
          </table:table-cell>
          <table:table-cell office:value-type="float" office:value="16802719" calcext:value-type="float">
            <text:p>1680271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0" calcext:value-type="date">
            <text:p>2025-05-20</text:p>
          </table:table-cell>
          <table:table-cell office:value-type="float" office:value="104.95" calcext:value-type="float">
            <text:p>104.95</text:p>
          </table:table-cell>
          <table:table-cell office:value-type="float" office:value="12429321" calcext:value-type="float">
            <text:p>1242932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103.66" calcext:value-type="float">
            <text:p>103.66</text:p>
          </table:table-cell>
          <table:table-cell office:value-type="float" office:value="16716079" calcext:value-type="float">
            <text:p>167160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102.97" calcext:value-type="float">
            <text:p>102.97</text:p>
          </table:table-cell>
          <table:table-cell office:value-type="float" office:value="13417378" calcext:value-type="float">
            <text:p>1341737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4" calcext:value-type="date">
            <text:p>2025-05-24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103.52" calcext:value-type="float">
            <text:p>103.52</text:p>
          </table:table-cell>
          <table:table-cell office:value-type="float" office:value="13043604" calcext:value-type="float">
            <text:p>130436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102.11" calcext:value-type="float">
            <text:p>102.11</text:p>
          </table:table-cell>
          <table:table-cell office:value-type="float" office:value="14292377" calcext:value-type="float">
            <text:p>142923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102.69" calcext:value-type="float">
            <text:p>102.69</text:p>
          </table:table-cell>
          <table:table-cell office:value-type="float" office:value="13832487" calcext:value-type="float">
            <text:p>138324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30" calcext:value-type="date">
            <text:p>2025-05-30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5-31" calcext:value-type="date">
            <text:p>2025-05-31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1" calcext:value-type="date">
            <text:p>2025-06-01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03.05" calcext:value-type="float">
            <text:p>103.05</text:p>
          </table:table-cell>
          <table:table-cell office:value-type="float" office:value="17290462" calcext:value-type="float">
            <text:p>1729046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103.8" calcext:value-type="float">
            <text:p>103.8</text:p>
          </table:table-cell>
          <table:table-cell office:value-type="float" office:value="19194335" calcext:value-type="float">
            <text:p>191943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4" calcext:value-type="date">
            <text:p>2025-06-04</text:p>
          </table:table-cell>
          <table:table-cell office:value-type="float" office:value="102.3" calcext:value-type="float">
            <text:p>102.3</text:p>
          </table:table-cell>
          <table:table-cell office:value-type="float" office:value="15648515" calcext:value-type="float">
            <text:p>1564851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942218" calcext:value-type="float">
            <text:p>139422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7" calcext:value-type="date">
            <text:p>2025-06-07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8" calcext:value-type="date">
            <text:p>2025-06-08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04.97" calcext:value-type="float">
            <text:p>104.97</text:p>
          </table:table-cell>
          <table:table-cell office:value-type="float" office:value="17087328" calcext:value-type="float">
            <text:p>1708732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107.22" calcext:value-type="float">
            <text:p>107.22</text:p>
          </table:table-cell>
          <table:table-cell office:value-type="float" office:value="17634793" calcext:value-type="float">
            <text:p>176347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1" calcext:value-type="date">
            <text:p>2025-06-11</text:p>
          </table:table-cell>
          <table:table-cell office:value-type="float" office:value="109.31" calcext:value-type="float">
            <text:p>109.31</text:p>
          </table:table-cell>
          <table:table-cell office:value-type="float" office:value="22648191" calcext:value-type="float">
            <text:p>2264819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109.73" calcext:value-type="float">
            <text:p>109.73</text:p>
          </table:table-cell>
          <table:table-cell office:value-type="float" office:value="17469408" calcext:value-type="float">
            <text:p>174694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4" calcext:value-type="date">
            <text:p>2025-06-14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5" calcext:value-type="date">
            <text:p>2025-06-15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12.48" calcext:value-type="float">
            <text:p>112.48</text:p>
          </table:table-cell>
          <table:table-cell office:value-type="float" office:value="22986113" calcext:value-type="float">
            <text:p>2298611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7" calcext:value-type="date">
            <text:p>2025-06-17</text:p>
          </table:table-cell>
          <table:table-cell office:value-type="float" office:value="114" calcext:value-type="float">
            <text:p>114</text:p>
          </table:table-cell>
          <table:table-cell office:value-type="float" office:value="19451701" calcext:value-type="float">
            <text:p>194517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8" calcext:value-type="date">
            <text:p>2025-06-18</text:p>
          </table:table-cell>
          <table:table-cell office:value-type="float" office:value="113.19" calcext:value-type="float">
            <text:p>113.19</text:p>
          </table:table-cell>
          <table:table-cell office:value-type="float" office:value="17968893" calcext:value-type="float">
            <text:p>179688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19" calcext:value-type="date">
            <text:p>2025-06-19</text:p>
          </table:table-cell>
          <table:table-cell office:value-type="float" office:value="113.19" calcext:value-type="float">
            <text:p>113.19</text:p>
          </table:table-cell>
          <table:table-cell office:value-type="float" office:value="17968893" calcext:value-type="float">
            <text:p>1796889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1" calcext:value-type="date">
            <text:p>2025-06-21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2" calcext:value-type="date">
            <text:p>2025-06-22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11.74" calcext:value-type="float">
            <text:p>111.74</text:p>
          </table:table-cell>
          <table:table-cell office:value-type="float" office:value="26631056" calcext:value-type="float">
            <text:p>266310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4" calcext:value-type="date">
            <text:p>2025-06-24</text:p>
          </table:table-cell>
          <table:table-cell office:value-type="float" office:value="108.34" calcext:value-type="float">
            <text:p>108.34</text:p>
          </table:table-cell>
          <table:table-cell office:value-type="float" office:value="24828277" calcext:value-type="float">
            <text:p>248282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5" calcext:value-type="date">
            <text:p>2025-06-25</text:p>
          </table:table-cell>
          <table:table-cell office:value-type="float" office:value="108.37" calcext:value-type="float">
            <text:p>108.37</text:p>
          </table:table-cell>
          <table:table-cell office:value-type="float" office:value="17483231" calcext:value-type="float">
            <text:p>174832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109.99" calcext:value-type="float">
            <text:p>109.99</text:p>
          </table:table-cell>
          <table:table-cell office:value-type="float" office:value="18304841" calcext:value-type="float">
            <text:p>1830484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7" calcext:value-type="date">
            <text:p>2025-06-27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8" calcext:value-type="date">
            <text:p>2025-06-28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29" calcext:value-type="date">
            <text:p>2025-06-29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07.8" calcext:value-type="float">
            <text:p>107.8</text:p>
          </table:table-cell>
          <table:table-cell office:value-type="float" office:value="19199048" calcext:value-type="float">
            <text:p>1919904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109.24" calcext:value-type="float">
            <text:p>109.24</text:p>
          </table:table-cell>
          <table:table-cell office:value-type="float" office:value="15536896" calcext:value-type="float">
            <text:p>1553689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892160" calcext:value-type="float">
            <text:p>1189216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3" calcext:value-type="date">
            <text:p>2025-07-03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4" calcext:value-type="date">
            <text:p>2025-07-04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5" calcext:value-type="date">
            <text:p>2025-07-05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6" calcext:value-type="date">
            <text:p>2025-07-06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11.11" calcext:value-type="float">
            <text:p>111.11</text:p>
          </table:table-cell>
          <table:table-cell office:value-type="float" office:value="15415889" calcext:value-type="float">
            <text:p>154158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114.19" calcext:value-type="float">
            <text:p>114.19</text:p>
          </table:table-cell>
          <table:table-cell office:value-type="float" office:value="17913404" calcext:value-type="float">
            <text:p>179134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113.8" calcext:value-type="float">
            <text:p>113.8</text:p>
          </table:table-cell>
          <table:table-cell office:value-type="float" office:value="10652062" calcext:value-type="float">
            <text:p>1065206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114.93" calcext:value-type="float">
            <text:p>114.93</text:p>
          </table:table-cell>
          <table:table-cell office:value-type="float" office:value="14903884" calcext:value-type="float">
            <text:p>1490388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1" calcext:value-type="date">
            <text:p>2025-07-11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2" calcext:value-type="date">
            <text:p>2025-07-12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3" calcext:value-type="date">
            <text:p>2025-07-13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13.92" calcext:value-type="float">
            <text:p>113.92</text:p>
          </table:table-cell>
          <table:table-cell office:value-type="float" office:value="13220303" calcext:value-type="float">
            <text:p>1322030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59347" calcext:value-type="float">
            <text:p>1095934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112.23" calcext:value-type="float">
            <text:p>112.23</text:p>
          </table:table-cell>
          <table:table-cell office:value-type="float" office:value="11158852" calcext:value-type="float">
            <text:p>1115885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111.66" calcext:value-type="float">
            <text:p>111.66</text:p>
          </table:table-cell>
          <table:table-cell office:value-type="float" office:value="13151446" calcext:value-type="float">
            <text:p>1315144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19" calcext:value-type="date">
            <text:p>2025-07-19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0" calcext:value-type="date">
            <text:p>2025-07-20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08.05" calcext:value-type="float">
            <text:p>108.05</text:p>
          </table:table-cell>
          <table:table-cell office:value-type="float" office:value="17010405" calcext:value-type="float">
            <text:p>1701040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108.54" calcext:value-type="float">
            <text:p>108.54</text:p>
          </table:table-cell>
          <table:table-cell office:value-type="float" office:value="13970885" calcext:value-type="float">
            <text:p>139708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3" calcext:value-type="date">
            <text:p>2025-07-23</text:p>
          </table:table-cell>
          <table:table-cell office:value-type="float" office:value="109.93" calcext:value-type="float">
            <text:p>109.93</text:p>
          </table:table-cell>
          <table:table-cell office:value-type="float" office:value="12002687" calcext:value-type="float">
            <text:p>120026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110.79" calcext:value-type="float">
            <text:p>110.79</text:p>
          </table:table-cell>
          <table:table-cell office:value-type="float" office:value="15647208" calcext:value-type="float">
            <text:p>156472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5" calcext:value-type="date">
            <text:p>2025-07-25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6" calcext:value-type="date">
            <text:p>2025-07-26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7" calcext:value-type="date">
            <text:p>2025-07-27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11.44" calcext:value-type="float">
            <text:p>111.44</text:p>
          </table:table-cell>
          <table:table-cell office:value-type="float" office:value="12352966" calcext:value-type="float">
            <text:p>123529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29" calcext:value-type="date">
            <text:p>2025-07-29</text:p>
          </table:table-cell>
          <table:table-cell office:value-type="float" office:value="112.88" calcext:value-type="float">
            <text:p>112.88</text:p>
          </table:table-cell>
          <table:table-cell office:value-type="float" office:value="15927998" calcext:value-type="float">
            <text:p>159279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111.9" calcext:value-type="float">
            <text:p>111.9</text:p>
          </table:table-cell>
          <table:table-cell office:value-type="float" office:value="12996905" calcext:value-type="float">
            <text:p>1299690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7-31" calcext:value-type="date">
            <text:p>2025-07-31</text:p>
          </table:table-cell>
          <table:table-cell office:value-type="float" office:value="111.64" calcext:value-type="float">
            <text:p>111.64</text:p>
          </table:table-cell>
          <table:table-cell office:value-type="float" office:value="17233744" calcext:value-type="float">
            <text:p>172337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3" calcext:value-type="date">
            <text:p>2025-08-03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07.37" calcext:value-type="float">
            <text:p>107.37</text:p>
          </table:table-cell>
          <table:table-cell office:value-type="float" office:value="19129474" calcext:value-type="float">
            <text:p>191294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107.24" calcext:value-type="float">
            <text:p>107.24</text:p>
          </table:table-cell>
          <table:table-cell office:value-type="float" office:value="21314254" calcext:value-type="float">
            <text:p>213142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6" calcext:value-type="date">
            <text:p>2025-08-06</text:p>
          </table:table-cell>
          <table:table-cell office:value-type="float" office:value="106.51" calcext:value-type="float">
            <text:p>106.51</text:p>
          </table:table-cell>
          <table:table-cell office:value-type="float" office:value="15321811" calcext:value-type="float">
            <text:p>1532181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7" calcext:value-type="date">
            <text:p>2025-08-07</text:p>
          </table:table-cell>
          <table:table-cell office:value-type="float" office:value="105.95" calcext:value-type="float">
            <text:p>105.95</text:p>
          </table:table-cell>
          <table:table-cell office:value-type="float" office:value="13468287" calcext:value-type="float">
            <text:p>134682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09" calcext:value-type="date">
            <text:p>2025-08-09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0" calcext:value-type="date">
            <text:p>2025-08-10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05.83" calcext:value-type="float">
            <text:p>105.83</text:p>
          </table:table-cell>
          <table:table-cell office:value-type="float" office:value="13570661" calcext:value-type="float">
            <text:p>1357066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2" calcext:value-type="date">
            <text:p>2025-08-12</text:p>
          </table:table-cell>
          <table:table-cell office:value-type="float" office:value="106.13" calcext:value-type="float">
            <text:p>106.13</text:p>
          </table:table-cell>
          <table:table-cell office:value-type="float" office:value="14113216" calcext:value-type="float">
            <text:p>141132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3" calcext:value-type="date">
            <text:p>2025-08-13</text:p>
          </table:table-cell>
          <table:table-cell office:value-type="float" office:value="107.6" calcext:value-type="float">
            <text:p>107.6</text:p>
          </table:table-cell>
          <table:table-cell office:value-type="float" office:value="17958695" calcext:value-type="float">
            <text:p>179586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4" calcext:value-type="date">
            <text:p>2025-08-14</text:p>
          </table:table-cell>
          <table:table-cell office:value-type="float" office:value="107.38" calcext:value-type="float">
            <text:p>107.38</text:p>
          </table:table-cell>
          <table:table-cell office:value-type="float" office:value="13683472" calcext:value-type="float">
            <text:p>1368347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6" calcext:value-type="date">
            <text:p>2025-08-16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06.72" calcext:value-type="float">
            <text:p>106.72</text:p>
          </table:table-cell>
          <table:table-cell office:value-type="float" office:value="13040018" calcext:value-type="float">
            <text:p>130400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107.42" calcext:value-type="float">
            <text:p>107.42</text:p>
          </table:table-cell>
          <table:table-cell office:value-type="float" office:value="16113611" calcext:value-type="float">
            <text:p>1611361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0" calcext:value-type="date">
            <text:p>2025-08-20</text:p>
          </table:table-cell>
          <table:table-cell office:value-type="float" office:value="108.53" calcext:value-type="float">
            <text:p>108.53</text:p>
          </table:table-cell>
          <table:table-cell office:value-type="float" office:value="18959716" calcext:value-type="float">
            <text:p>189597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109.23" calcext:value-type="float">
            <text:p>109.23</text:p>
          </table:table-cell>
          <table:table-cell office:value-type="float" office:value="12194897" calcext:value-type="float">
            <text:p>121948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3" calcext:value-type="date">
            <text:p>2025-08-23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4" calcext:value-type="date">
            <text:p>2025-08-24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11.74" calcext:value-type="float">
            <text:p>111.74</text:p>
          </table:table-cell>
          <table:table-cell office:value-type="float" office:value="9744897" calcext:value-type="float">
            <text:p>97448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6" calcext:value-type="date">
            <text:p>2025-08-26</text:p>
          </table:table-cell>
          <table:table-cell office:value-type="float" office:value="111.49" calcext:value-type="float">
            <text:p>111.49</text:p>
          </table:table-cell>
          <table:table-cell office:value-type="float" office:value="18143880" calcext:value-type="float">
            <text:p>1814388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7" calcext:value-type="date">
            <text:p>2025-08-27</text:p>
          </table:table-cell>
          <table:table-cell office:value-type="float" office:value="112.75" calcext:value-type="float">
            <text:p>112.75</text:p>
          </table:table-cell>
          <table:table-cell office:value-type="float" office:value="15262630" calcext:value-type="float">
            <text:p>152626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8" calcext:value-type="date">
            <text:p>2025-08-28</text:p>
          </table:table-cell>
          <table:table-cell office:value-type="float" office:value="113.35" calcext:value-type="float">
            <text:p>113.35</text:p>
          </table:table-cell>
          <table:table-cell office:value-type="float" office:value="14189829" calcext:value-type="float">
            <text:p>141898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29" calcext:value-type="date">
            <text:p>2025-08-29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30" calcext:value-type="date">
            <text:p>2025-08-30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8-31" calcext:value-type="date">
            <text:p>2025-08-31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float" office:value="114.69" calcext:value-type="float">
            <text:p>114.69</text:p>
          </table:table-cell>
          <table:table-cell office:value-type="float" office:value="15206667" calcext:value-type="float">
            <text:p>152066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3" calcext:value-type="date">
            <text:p>2025-09-03</text:p>
          </table:table-cell>
          <table:table-cell office:value-type="float" office:value="111.91" calcext:value-type="float">
            <text:p>111.91</text:p>
          </table:table-cell>
          <table:table-cell office:value-type="float" office:value="14920087" calcext:value-type="float">
            <text:p>149200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4" calcext:value-type="date">
            <text:p>2025-09-04</text:p>
          </table:table-cell>
          <table:table-cell office:value-type="float" office:value="112.4" calcext:value-type="float">
            <text:p>112.4</text:p>
          </table:table-cell>
          <table:table-cell office:value-type="float" office:value="12864438" calcext:value-type="float">
            <text:p>128644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6" calcext:value-type="date">
            <text:p>2025-09-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7" calcext:value-type="date">
            <text:p>2025-09-07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09.85" calcext:value-type="float">
            <text:p>109.85</text:p>
          </table:table-cell>
          <table:table-cell office:value-type="float" office:value="15440513" calcext:value-type="float">
            <text:p>1544051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4899502" calcext:value-type="float">
            <text:p>1489950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0" calcext:value-type="date">
            <text:p>2025-09-10</text:p>
          </table:table-cell>
          <table:table-cell office:value-type="float" office:value="112.5" calcext:value-type="float">
            <text:p>112.5</text:p>
          </table:table-cell>
          <table:table-cell office:value-type="float" office:value="15837583" calcext:value-type="float">
            <text:p>1583758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12.14" calcext:value-type="float">
            <text:p>112.14</text:p>
          </table:table-cell>
          <table:table-cell office:value-type="float" office:value="11534502" calcext:value-type="float">
            <text:p>1153450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2" calcext:value-type="date">
            <text:p>2025-09-12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4" calcext:value-type="date">
            <text:p>2025-09-14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12.35" calcext:value-type="float">
            <text:p>112.35</text:p>
          </table:table-cell>
          <table:table-cell office:value-type="float" office:value="12880487" calcext:value-type="float">
            <text:p>128804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6" calcext:value-type="date">
            <text:p>2025-09-16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208044" calcext:value-type="float">
            <text:p>172080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15.29" calcext:value-type="float">
            <text:p>115.29</text:p>
          </table:table-cell>
          <table:table-cell office:value-type="float" office:value="13302030" calcext:value-type="float">
            <text:p>133020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8" calcext:value-type="date">
            <text:p>2025-09-18</text:p>
          </table:table-cell>
          <table:table-cell office:value-type="float" office:value="113.93" calcext:value-type="float">
            <text:p>113.93</text:p>
          </table:table-cell>
          <table:table-cell office:value-type="float" office:value="14628726" calcext:value-type="float">
            <text:p>1462872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0" calcext:value-type="date">
            <text:p>2025-09-20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1" calcext:value-type="date">
            <text:p>2025-09-21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5611495" calcext:value-type="float">
            <text:p>156114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3" calcext:value-type="date">
            <text:p>2025-09-23</text:p>
          </table:table-cell>
          <table:table-cell office:value-type="float" office:value="113.95" calcext:value-type="float">
            <text:p>113.95</text:p>
          </table:table-cell>
          <table:table-cell office:value-type="float" office:value="25369106" calcext:value-type="float">
            <text:p>253691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float" office:value="114.56" calcext:value-type="float">
            <text:p>114.56</text:p>
          </table:table-cell>
          <table:table-cell office:value-type="float" office:value="14756050" calcext:value-type="float">
            <text:p>1475605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5" calcext:value-type="date">
            <text:p>2025-09-25</text:p>
          </table:table-cell>
          <table:table-cell office:value-type="float" office:value="115.59" calcext:value-type="float">
            <text:p>115.59</text:p>
          </table:table-cell>
          <table:table-cell office:value-type="float" office:value="15012553" calcext:value-type="float">
            <text:p>1501255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6" calcext:value-type="date">
            <text:p>2025-09-26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7" calcext:value-type="date">
            <text:p>2025-09-27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8" calcext:value-type="date">
            <text:p>2025-09-28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14.22" calcext:value-type="float">
            <text:p>114.22</text:p>
          </table:table-cell>
          <table:table-cell office:value-type="float" office:value="19189260" calcext:value-type="float">
            <text:p>1918926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float" office:value="112.75" calcext:value-type="float">
            <text:p>112.75</text:p>
          </table:table-cell>
          <table:table-cell office:value-type="float" office:value="18076211" calcext:value-type="float">
            <text:p>1807621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111.99" calcext:value-type="float">
            <text:p>111.99</text:p>
          </table:table-cell>
          <table:table-cell office:value-type="float" office:value="16613992" calcext:value-type="float">
            <text:p>166139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float" office:value="111.29" calcext:value-type="float">
            <text:p>111.29</text:p>
          </table:table-cell>
          <table:table-cell office:value-type="float" office:value="13062563" calcext:value-type="float">
            <text:p>130625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5" calcext:value-type="date">
            <text:p>2025-10-05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14.2" calcext:value-type="float">
            <text:p>114.2</text:p>
          </table:table-cell>
          <table:table-cell office:value-type="float" office:value="12036830" calcext:value-type="float">
            <text:p>120368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945032" calcext:value-type="float">
            <text:p>1194503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300968" calcext:value-type="float">
            <text:p>1230096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76215" calcext:value-type="float">
            <text:p>1097621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1" calcext:value-type="date">
            <text:p>2025-10-11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12.24" calcext:value-type="float">
            <text:p>112.24</text:p>
          </table:table-cell>
          <table:table-cell office:value-type="float" office:value="10296499" calcext:value-type="float">
            <text:p>1029649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float" office:value="112.29" calcext:value-type="float">
            <text:p>112.29</text:p>
          </table:table-cell>
          <table:table-cell office:value-type="float" office:value="11167154" calcext:value-type="float">
            <text:p>111671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float" office:value="111.61" calcext:value-type="float">
            <text:p>111.61</text:p>
          </table:table-cell>
          <table:table-cell office:value-type="float" office:value="12182935" calcext:value-type="float">
            <text:p>121829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782202" calcext:value-type="float">
            <text:p>1178220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112.7" calcext:value-type="float">
            <text:p>112.7</text:p>
          </table:table-cell>
          <table:table-cell office:value-type="float" office:value="9523617" calcext:value-type="float">
            <text:p>95236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float" office:value="112.71" calcext:value-type="float">
            <text:p>112.71</text:p>
          </table:table-cell>
          <table:table-cell office:value-type="float" office:value="9202349" calcext:value-type="float">
            <text:p>92023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float" office:value="114.71" calcext:value-type="float">
            <text:p>114.71</text:p>
          </table:table-cell>
          <table:table-cell office:value-type="float" office:value="12938790" calcext:value-type="float">
            <text:p>1293879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float" office:value="115.98" calcext:value-type="float">
            <text:p>115.98</text:p>
          </table:table-cell>
          <table:table-cell office:value-type="float" office:value="15001088" calcext:value-type="float">
            <text:p>150010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5" calcext:value-type="date">
            <text:p>2025-10-25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6" calcext:value-type="date">
            <text:p>2025-10-26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975412" calcext:value-type="float">
            <text:p>1097541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8" calcext:value-type="date">
            <text:p>2025-10-28</text:p>
          </table:table-cell>
          <table:table-cell office:value-type="float" office:value="115.03" calcext:value-type="float">
            <text:p>115.03</text:p>
          </table:table-cell>
          <table:table-cell office:value-type="float" office:value="9535211" calcext:value-type="float">
            <text:p>953521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29" calcext:value-type="date">
            <text:p>2025-10-29</text:p>
          </table:table-cell>
          <table:table-cell office:value-type="float" office:value="116.45" calcext:value-type="float">
            <text:p>116.45</text:p>
          </table:table-cell>
          <table:table-cell office:value-type="float" office:value="12570572" calcext:value-type="float">
            <text:p>1257057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30" calcext:value-type="date">
            <text:p>2025-10-30</text:p>
          </table:table-cell>
          <table:table-cell office:value-type="float" office:value="114.69" calcext:value-type="float">
            <text:p>114.69</text:p>
          </table:table-cell>
          <table:table-cell office:value-type="float" office:value="16172943" calcext:value-type="float">
            <text:p>1617294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0-31" calcext:value-type="date">
            <text:p>2025-10-31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2" calcext:value-type="date">
            <text:p>2025-11-02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113.76" calcext:value-type="float">
            <text:p>113.76</text:p>
          </table:table-cell>
          <table:table-cell office:value-type="float" office:value="12290304" calcext:value-type="float">
            <text:p>122903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4" calcext:value-type="date">
            <text:p>2025-11-04</text:p>
          </table:table-cell>
          <table:table-cell office:value-type="float" office:value="114.14" calcext:value-type="float">
            <text:p>114.14</text:p>
          </table:table-cell>
          <table:table-cell office:value-type="float" office:value="16860741" calcext:value-type="float">
            <text:p>1686074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5" calcext:value-type="date">
            <text:p>2025-11-05</text:p>
          </table:table-cell>
          <table:table-cell office:value-type="float" office:value="113.68" calcext:value-type="float">
            <text:p>113.68</text:p>
          </table:table-cell>
          <table:table-cell office:value-type="float" office:value="12400921" calcext:value-type="float">
            <text:p>1240092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float" office:value="114.5" calcext:value-type="float">
            <text:p>114.5</text:p>
          </table:table-cell>
          <table:table-cell office:value-type="float" office:value="14219654" calcext:value-type="float">
            <text:p>142196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7" calcext:value-type="date">
            <text:p>2025-11-07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8" calcext:value-type="date">
            <text:p>2025-11-08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09" calcext:value-type="date">
            <text:p>2025-11-09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118.22" calcext:value-type="float">
            <text:p>118.22</text:p>
          </table:table-cell>
          <table:table-cell office:value-type="float" office:value="13047958" calcext:value-type="float">
            <text:p>1304795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float" office:value="119.78" calcext:value-type="float">
            <text:p>119.78</text:p>
          </table:table-cell>
          <table:table-cell office:value-type="float" office:value="16077101" calcext:value-type="float">
            <text:p>160771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2" calcext:value-type="date">
            <text:p>2025-11-12</text:p>
          </table:table-cell>
          <table:table-cell office:value-type="float" office:value="118.12" calcext:value-type="float">
            <text:p>118.12</text:p>
          </table:table-cell>
          <table:table-cell office:value-type="float" office:value="13790889" calcext:value-type="float">
            <text:p>137908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3" calcext:value-type="date">
            <text:p>2025-11-13</text:p>
          </table:table-cell>
          <table:table-cell office:value-type="float" office:value="118.79" calcext:value-type="float">
            <text:p>118.79</text:p>
          </table:table-cell>
          <table:table-cell office:value-type="float" office:value="17291874" calcext:value-type="float">
            <text:p>172918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5" calcext:value-type="date">
            <text:p>2025-11-15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6" calcext:value-type="date">
            <text:p>2025-11-16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117.68" calcext:value-type="float">
            <text:p>117.68</text:p>
          </table:table-cell>
          <table:table-cell office:value-type="float" office:value="16034860" calcext:value-type="float">
            <text:p>1603486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float" office:value="119.03" calcext:value-type="float">
            <text:p>119.03</text:p>
          </table:table-cell>
          <table:table-cell office:value-type="float" office:value="15808518" calcext:value-type="float">
            <text:p>1580851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19" calcext:value-type="date">
            <text:p>2025-11-19</text:p>
          </table:table-cell>
          <table:table-cell office:value-type="float" office:value="117.35" calcext:value-type="float">
            <text:p>117.35</text:p>
          </table:table-cell>
          <table:table-cell office:value-type="float" office:value="15919239" calcext:value-type="float">
            <text:p>159192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float" office:value="117.02" calcext:value-type="float">
            <text:p>117.02</text:p>
          </table:table-cell>
          <table:table-cell office:value-type="float" office:value="14401011" calcext:value-type="float">
            <text:p>1440101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115.97" calcext:value-type="float">
            <text:p>115.97</text:p>
          </table:table-cell>
          <table:table-cell office:value-type="float" office:value="18034923" calcext:value-type="float">
            <text:p>1803492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5" calcext:value-type="date">
            <text:p>2025-11-25</text:p>
          </table:table-cell>
          <table:table-cell office:value-type="float" office:value="114.51" calcext:value-type="float">
            <text:p>114.51</text:p>
          </table:table-cell>
          <table:table-cell office:value-type="float" office:value="14434558" calcext:value-type="float">
            <text:p>1443455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6" calcext:value-type="date">
            <text:p>2025-11-26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650597" calcext:value-type="float">
            <text:p>116505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7" calcext:value-type="date">
            <text:p>2025-11-27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650597" calcext:value-type="float">
            <text:p>116505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8" calcext:value-type="date">
            <text:p>2025-11-28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29" calcext:value-type="date">
            <text:p>2025-11-29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1-30" calcext:value-type="date">
            <text:p>2025-11-30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116.63" calcext:value-type="float">
            <text:p>116.63</text:p>
          </table:table-cell>
          <table:table-cell office:value-type="float" office:value="12658100" calcext:value-type="float">
            <text:p>1265810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float" office:value="115.38" calcext:value-type="float">
            <text:p>115.38</text:p>
          </table:table-cell>
          <table:table-cell office:value-type="float" office:value="14607704" calcext:value-type="float">
            <text:p>146077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3" calcext:value-type="date">
            <text:p>2025-12-03</text:p>
          </table:table-cell>
          <table:table-cell office:value-type="float" office:value="117.8" calcext:value-type="float">
            <text:p>117.8</text:p>
          </table:table-cell>
          <table:table-cell office:value-type="float" office:value="16819130" calcext:value-type="float">
            <text:p>168191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float" office:value="117.14" calcext:value-type="float">
            <text:p>117.14</text:p>
          </table:table-cell>
          <table:table-cell office:value-type="float" office:value="13686897" calcext:value-type="float">
            <text:p>1368689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115.98" calcext:value-type="float">
            <text:p>115.98</text:p>
          </table:table-cell>
          <table:table-cell office:value-type="float" office:value="14904164" calcext:value-type="float">
            <text:p>1490416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09" calcext:value-type="date">
            <text:p>2025-12-09</text:p>
          </table:table-cell>
          <table:table-cell office:value-type="float" office:value="118.25" calcext:value-type="float">
            <text:p>118.25</text:p>
          </table:table-cell>
          <table:table-cell office:value-type="float" office:value="23790815" calcext:value-type="float">
            <text:p>2379081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float" office:value="119.54" calcext:value-type="float">
            <text:p>119.54</text:p>
          </table:table-cell>
          <table:table-cell office:value-type="float" office:value="19845192" calcext:value-type="float">
            <text:p>1984519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float" office:value="119.54" calcext:value-type="float">
            <text:p>119.54</text:p>
          </table:table-cell>
          <table:table-cell office:value-type="float" office:value="14781787" calcext:value-type="float">
            <text:p>147817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3" calcext:value-type="date">
            <text:p>2025-12-13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4" calcext:value-type="date">
            <text:p>2025-12-14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117.76" calcext:value-type="float">
            <text:p>117.76</text:p>
          </table:table-cell>
          <table:table-cell office:value-type="float" office:value="16358669" calcext:value-type="float">
            <text:p>163586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638716" calcext:value-type="float">
            <text:p>1763871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float" office:value="117.41" calcext:value-type="float">
            <text:p>117.41</text:p>
          </table:table-cell>
          <table:table-cell office:value-type="float" office:value="18502152" calcext:value-type="float">
            <text:p>1850215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8" calcext:value-type="date">
            <text:p>2025-12-18</text:p>
          </table:table-cell>
          <table:table-cell office:value-type="float" office:value="116.54" calcext:value-type="float">
            <text:p>116.54</text:p>
          </table:table-cell>
          <table:table-cell office:value-type="float" office:value="13705560" calcext:value-type="float">
            <text:p>1370556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19" calcext:value-type="date">
            <text:p>2025-12-19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0" calcext:value-type="date">
            <text:p>2025-12-20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1" calcext:value-type="date">
            <text:p>2025-12-21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768611" calcext:value-type="float">
            <text:p>1176861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3" calcext:value-type="date">
            <text:p>2025-12-23</text:p>
          </table:table-cell>
          <table:table-cell office:value-type="float" office:value="119.42" calcext:value-type="float">
            <text:p>119.42</text:p>
          </table:table-cell>
          <table:table-cell office:value-type="float" office:value="12567630" calcext:value-type="float">
            <text:p>125676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4" calcext:value-type="date">
            <text:p>2025-12-24</text:p>
          </table:table-cell>
          <table:table-cell office:value-type="float" office:value="119.22" calcext:value-type="float">
            <text:p>119.22</text:p>
          </table:table-cell>
          <table:table-cell office:value-type="float" office:value="6137406" calcext:value-type="float">
            <text:p>61374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float" office:value="119.22" calcext:value-type="float">
            <text:p>119.22</text:p>
          </table:table-cell>
          <table:table-cell office:value-type="float" office:value="6137406" calcext:value-type="float">
            <text:p>613740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7" calcext:value-type="date">
            <text:p>2025-12-27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8" calcext:value-type="date">
            <text:p>2025-12-28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120.53" calcext:value-type="float">
            <text:p>120.53</text:p>
          </table:table-cell>
          <table:table-cell office:value-type="float" office:value="14782512" calcext:value-type="float">
            <text:p>1478251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120.99" calcext:value-type="float">
            <text:p>120.99</text:p>
          </table:table-cell>
          <table:table-cell office:value-type="float" office:value="11150486" calcext:value-type="float">
            <text:p>1115048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120.34" calcext:value-type="float">
            <text:p>120.34</text:p>
          </table:table-cell>
          <table:table-cell office:value-type="float" office:value="10559866" calcext:value-type="float">
            <text:p>105598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120.34" calcext:value-type="float">
            <text:p>120.34</text:p>
          </table:table-cell>
          <table:table-cell office:value-type="float" office:value="10559866" calcext:value-type="float">
            <text:p>105598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3" calcext:value-type="date">
            <text:p>2026-01-03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4" calcext:value-type="date">
            <text:p>2026-01-04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125.36" calcext:value-type="float">
            <text:p>125.36</text:p>
          </table:table-cell>
          <table:table-cell office:value-type="float" office:value="30112238" calcext:value-type="float">
            <text:p>301122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121.05" calcext:value-type="float">
            <text:p>121.05</text:p>
          </table:table-cell>
          <table:table-cell office:value-type="float" office:value="23328636" calcext:value-type="float">
            <text:p>2332863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118.49" calcext:value-type="float">
            <text:p>118.49</text:p>
          </table:table-cell>
          <table:table-cell office:value-type="float" office:value="20352950" calcext:value-type="float">
            <text:p>2035295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122.91" calcext:value-type="float">
            <text:p>122.91</text:p>
          </table:table-cell>
          <table:table-cell office:value-type="float" office:value="20232721" calcext:value-type="float">
            <text:p>2023272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0" calcext:value-type="date">
            <text:p>2026-01-10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1" calcext:value-type="date">
            <text:p>2026-01-11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124.03" calcext:value-type="float">
            <text:p>124.03</text:p>
          </table:table-cell>
          <table:table-cell office:value-type="float" office:value="15314895" calcext:value-type="float">
            <text:p>1531489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3" calcext:value-type="date">
            <text:p>2026-01-13</text:p>
          </table:table-cell>
          <table:table-cell office:value-type="float" office:value="126.54" calcext:value-type="float">
            <text:p>126.54</text:p>
          </table:table-cell>
          <table:table-cell office:value-type="float" office:value="21619727" calcext:value-type="float">
            <text:p>216197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4" calcext:value-type="date">
            <text:p>2026-01-14</text:p>
          </table:table-cell>
          <table:table-cell office:value-type="float" office:value="130.2" calcext:value-type="float">
            <text:p>130.2</text:p>
          </table:table-cell>
          <table:table-cell office:value-type="float" office:value="27593938" calcext:value-type="float">
            <text:p>2759393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5" calcext:value-type="date">
            <text:p>2026-01-15</text:p>
          </table:table-cell>
          <table:table-cell office:value-type="float" office:value="129.13" calcext:value-type="float">
            <text:p>129.13</text:p>
          </table:table-cell>
          <table:table-cell office:value-type="float" office:value="17400039" calcext:value-type="float">
            <text:p>174000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6" calcext:value-type="date">
            <text:p>2026-01-16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7" calcext:value-type="date">
            <text:p>2026-01-17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8" calcext:value-type="date">
            <text:p>2026-01-18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0" calcext:value-type="date">
            <text:p>2026-01-20</text:p>
          </table:table-cell>
          <table:table-cell office:value-type="float" office:value="130.46" calcext:value-type="float">
            <text:p>130.46</text:p>
          </table:table-cell>
          <table:table-cell office:value-type="float" office:value="16477282" calcext:value-type="float">
            <text:p>1647728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1" calcext:value-type="date">
            <text:p>2026-01-21</text:p>
          </table:table-cell>
          <table:table-cell office:value-type="float" office:value="133.61" calcext:value-type="float">
            <text:p>133.61</text:p>
          </table:table-cell>
          <table:table-cell office:value-type="float" office:value="18879887" calcext:value-type="float">
            <text:p>1887988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2" calcext:value-type="date">
            <text:p>2026-01-22</text:p>
          </table:table-cell>
          <table:table-cell office:value-type="float" office:value="133.64" calcext:value-type="float">
            <text:p>133.64</text:p>
          </table:table-cell>
          <table:table-cell office:value-type="float" office:value="16600126" calcext:value-type="float">
            <text:p>1660012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3" calcext:value-type="date">
            <text:p>2026-01-23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4" calcext:value-type="date">
            <text:p>2026-01-24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5" calcext:value-type="date">
            <text:p>2026-01-25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float" office:value="134.84" calcext:value-type="float">
            <text:p>134.84</text:p>
          </table:table-cell>
          <table:table-cell office:value-type="float" office:value="16056066" calcext:value-type="float">
            <text:p>1605606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7" calcext:value-type="date">
            <text:p>2026-01-27</text:p>
          </table:table-cell>
          <table:table-cell office:value-type="float" office:value="136.83" calcext:value-type="float">
            <text:p>136.83</text:p>
          </table:table-cell>
          <table:table-cell office:value-type="float" office:value="14517025" calcext:value-type="float">
            <text:p>145170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8" calcext:value-type="date">
            <text:p>2026-01-28</text:p>
          </table:table-cell>
          <table:table-cell office:value-type="float" office:value="137.58" calcext:value-type="float">
            <text:p>137.58</text:p>
          </table:table-cell>
          <table:table-cell office:value-type="float" office:value="15637279" calcext:value-type="float">
            <text:p>1563727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29" calcext:value-type="date">
            <text:p>2026-01-29</text:p>
          </table:table-cell>
          <table:table-cell office:value-type="float" office:value="140.51" calcext:value-type="float">
            <text:p>140.51</text:p>
          </table:table-cell>
          <table:table-cell office:value-type="float" office:value="35760620" calcext:value-type="float">
            <text:p>3576062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30" calcext:value-type="date">
            <text:p>2026-01-30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1-31" calcext:value-type="date">
            <text:p>2026-01-31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1" calcext:value-type="date">
            <text:p>2026-02-01</text:p>
          </table:table-cell>
          <table:table-cell office:value-type="float" office:value="141.4" calcext:value-type="float">
            <text:p>141.4</text:p>
          </table:table-cell>
          <table:table-cell office:value-type="float" office:value="29657667" calcext:value-type="float">
            <text:p>296576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float" office:value="138.4" calcext:value-type="float">
            <text:p>138.4</text:p>
          </table:table-cell>
          <table:table-cell office:value-type="float" office:value="27735570" calcext:value-type="float">
            <text:p>277355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3" calcext:value-type="date">
            <text:p>2026-02-03</text:p>
          </table:table-cell>
          <table:table-cell office:value-type="float" office:value="143.73" calcext:value-type="float">
            <text:p>143.73</text:p>
          </table:table-cell>
          <table:table-cell office:value-type="float" office:value="37577844" calcext:value-type="float">
            <text:p>375778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4" calcext:value-type="date">
            <text:p>2026-02-04</text:p>
          </table:table-cell>
          <table:table-cell office:value-type="float" office:value="147.59" calcext:value-type="float">
            <text:p>147.59</text:p>
          </table:table-cell>
          <table:table-cell office:value-type="float" office:value="29426241" calcext:value-type="float">
            <text:p>2942624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5" calcext:value-type="date">
            <text:p>2026-02-05</text:p>
          </table:table-cell>
          <table:table-cell office:value-type="float" office:value="146.08" calcext:value-type="float">
            <text:p>146.08</text:p>
          </table:table-cell>
          <table:table-cell office:value-type="float" office:value="18431739" calcext:value-type="float">
            <text:p>184317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6" calcext:value-type="date">
            <text:p>2026-02-06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7" calcext:value-type="date">
            <text:p>2026-02-07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8" calcext:value-type="date">
            <text:p>2026-02-08</text:p>
          </table:table-cell>
          <table:table-cell office:value-type="float" office:value="149.05" calcext:value-type="float">
            <text:p>149.05</text:p>
          </table:table-cell>
          <table:table-cell office:value-type="float" office:value="17216025" calcext:value-type="float">
            <text:p>1721602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297302" calcext:value-type="float">
            <text:p>2129730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0" calcext:value-type="date">
            <text:p>2026-02-10</text:p>
          </table:table-cell>
          <table:table-cell office:value-type="float" office:value="151.59" calcext:value-type="float">
            <text:p>151.59</text:p>
          </table:table-cell>
          <table:table-cell office:value-type="float" office:value="15800255" calcext:value-type="float">
            <text:p>1580025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1" calcext:value-type="date">
            <text:p>2026-02-11</text:p>
          </table:table-cell>
          <table:table-cell office:value-type="float" office:value="155.56" calcext:value-type="float">
            <text:p>155.56</text:p>
          </table:table-cell>
          <table:table-cell office:value-type="float" office:value="23091488" calcext:value-type="float">
            <text:p>2309148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2" calcext:value-type="date">
            <text:p>2026-02-12</text:p>
          </table:table-cell>
          <table:table-cell office:value-type="float" office:value="149.93" calcext:value-type="float">
            <text:p>149.93</text:p>
          </table:table-cell>
          <table:table-cell office:value-type="float" office:value="30652471" calcext:value-type="float">
            <text:p>306524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3" calcext:value-type="date">
            <text:p>2026-02-13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4" calcext:value-type="date">
            <text:p>2026-02-14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5" calcext:value-type="date">
            <text:p>2026-02-15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float" office:value="148.45" calcext:value-type="float">
            <text:p>148.45</text:p>
          </table:table-cell>
          <table:table-cell office:value-type="float" office:value="20166031" calcext:value-type="float">
            <text:p>201660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float" office:value="146.19" calcext:value-type="float">
            <text:p>146.19</text:p>
          </table:table-cell>
          <table:table-cell office:value-type="float" office:value="19766567" calcext:value-type="float">
            <text:p>1976656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8" calcext:value-type="date">
            <text:p>2026-02-18</text:p>
          </table:table-cell>
          <table:table-cell office:value-type="float" office:value="150.68" calcext:value-type="float">
            <text:p>150.68</text:p>
          </table:table-cell>
          <table:table-cell office:value-type="float" office:value="19849670" calcext:value-type="float">
            <text:p>198496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19" calcext:value-type="date">
            <text:p>2026-02-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20305026" calcext:value-type="float">
            <text:p>2030502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0" calcext:value-type="date">
            <text:p>2026-02-20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1" calcext:value-type="date">
            <text:p>2026-02-21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2" calcext:value-type="date">
            <text:p>2026-02-22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908581" calcext:value-type="float">
            <text:p>2590858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office:value-type="float" office:value="150.76" calcext:value-type="float">
            <text:p>150.76</text:p>
          </table:table-cell>
          <table:table-cell office:value-type="float" office:value="16073100" calcext:value-type="float">
            <text:p>1607310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4" calcext:value-type="date">
            <text:p>2026-02-24</text:p>
          </table:table-cell>
          <table:table-cell office:value-type="float" office:value="149.26" calcext:value-type="float">
            <text:p>149.26</text:p>
          </table:table-cell>
          <table:table-cell office:value-type="float" office:value="14185500" calcext:value-type="float">
            <text:p>1418550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5" calcext:value-type="date">
            <text:p>2026-02-25</text:p>
          </table:table-cell>
          <table:table-cell office:value-type="float" office:value="149.06" calcext:value-type="float">
            <text:p>149.06</text:p>
          </table:table-cell>
          <table:table-cell office:value-type="float" office:value="15225745" calcext:value-type="float">
            <text:p>152257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6" calcext:value-type="date">
            <text:p>2026-02-26</text:p>
          </table:table-cell>
          <table:table-cell office:value-type="float" office:value="148.54" calcext:value-type="float">
            <text:p>148.54</text:p>
          </table:table-cell>
          <table:table-cell office:value-type="float" office:value="15606231" calcext:value-type="float">
            <text:p>156062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7" calcext:value-type="date">
            <text:p>2026-02-27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2-28" calcext:value-type="date">
            <text:p>2026-02-28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1" calcext:value-type="date">
            <text:p>2026-03-01</text:p>
          </table:table-cell>
          <table:table-cell office:value-type="float" office:value="152.5" calcext:value-type="float">
            <text:p>152.5</text:p>
          </table:table-cell>
          <table:table-cell office:value-type="float" office:value="30245933" calcext:value-type="float">
            <text:p>302459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float" office:value="154.22" calcext:value-type="float">
            <text:p>154.22</text:p>
          </table:table-cell>
          <table:table-cell office:value-type="float" office:value="31493082" calcext:value-type="float">
            <text:p>3149308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3" calcext:value-type="date">
            <text:p>2026-03-03</text:p>
          </table:table-cell>
          <table:table-cell office:value-type="float" office:value="151.83" calcext:value-type="float">
            <text:p>151.83</text:p>
          </table:table-cell>
          <table:table-cell office:value-type="float" office:value="25198835" calcext:value-type="float">
            <text:p>2519883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4" calcext:value-type="date">
            <text:p>2026-03-04</text:p>
          </table:table-cell>
          <table:table-cell office:value-type="float" office:value="149.82" calcext:value-type="float">
            <text:p>149.82</text:p>
          </table:table-cell>
          <table:table-cell office:value-type="float" office:value="16764761" calcext:value-type="float">
            <text:p>1676476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5" calcext:value-type="date">
            <text:p>2026-03-05</text:p>
          </table:table-cell>
          <table:table-cell office:value-type="float" office:value="150.76" calcext:value-type="float">
            <text:p>150.76</text:p>
          </table:table-cell>
          <table:table-cell office:value-type="float" office:value="22969271" calcext:value-type="float">
            <text:p>229692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6" calcext:value-type="date">
            <text:p>2026-03-06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7" calcext:value-type="date">
            <text:p>2026-03-07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8" calcext:value-type="date">
            <text:p>2026-03-08</text:p>
          </table:table-cell>
          <table:table-cell office:value-type="float" office:value="151.21" calcext:value-type="float">
            <text:p>151.21</text:p>
          </table:table-cell>
          <table:table-cell office:value-type="float" office:value="21136427" calcext:value-type="float">
            <text:p>211364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office:value-type="float" office:value="150.44" calcext:value-type="float">
            <text:p>150.44</text:p>
          </table:table-cell>
          <table:table-cell office:value-type="float" office:value="25532656" calcext:value-type="float">
            <text:p>25532656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0" calcext:value-type="date">
            <text:p>2026-03-10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617590" calcext:value-type="float">
            <text:p>1961759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1" calcext:value-type="date">
            <text:p>2026-03-11</text:p>
          </table:table-cell>
          <table:table-cell office:value-type="float" office:value="151.58" calcext:value-type="float">
            <text:p>151.58</text:p>
          </table:table-cell>
          <table:table-cell office:value-type="float" office:value="15297412" calcext:value-type="float">
            <text:p>1529741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2" calcext:value-type="date">
            <text:p>2026-03-12</text:p>
          </table:table-cell>
          <table:table-cell office:value-type="float" office:value="153.53" calcext:value-type="float">
            <text:p>153.53</text:p>
          </table:table-cell>
          <table:table-cell office:value-type="float" office:value="26053965" calcext:value-type="float">
            <text:p>2605396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3" calcext:value-type="date">
            <text:p>2026-03-13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4" calcext:value-type="date">
            <text:p>2026-03-14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5" calcext:value-type="date">
            <text:p>2026-03-15</text:p>
          </table:table-cell>
          <table:table-cell office:value-type="float" office:value="156.12" calcext:value-type="float">
            <text:p>156.12</text:p>
          </table:table-cell>
          <table:table-cell office:value-type="float" office:value="22414094" calcext:value-type="float">
            <text:p>2241409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office:value-type="float" office:value="157.23" calcext:value-type="float">
            <text:p>157.23</text:p>
          </table:table-cell>
          <table:table-cell office:value-type="float" office:value="22835633" calcext:value-type="float">
            <text:p>228356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7" calcext:value-type="date">
            <text:p>2026-03-17</text:p>
          </table:table-cell>
          <table:table-cell office:value-type="float" office:value="158.81" calcext:value-type="float">
            <text:p>158.81</text:p>
          </table:table-cell>
          <table:table-cell office:value-type="float" office:value="21592171" calcext:value-type="float">
            <text:p>2159217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8" calcext:value-type="date">
            <text:p>2026-03-18</text:p>
          </table:table-cell>
          <table:table-cell office:value-type="float" office:value="157.59" calcext:value-type="float">
            <text:p>157.59</text:p>
          </table:table-cell>
          <table:table-cell office:value-type="float" office:value="18947142" calcext:value-type="float">
            <text:p>1894714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19" calcext:value-type="date">
            <text:p>2026-03-19</text:p>
          </table:table-cell>
          <table:table-cell office:value-type="float" office:value="158.16" calcext:value-type="float">
            <text:p>158.16</text:p>
          </table:table-cell>
          <table:table-cell office:value-type="float" office:value="27082733" calcext:value-type="float">
            <text:p>270827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0" calcext:value-type="date">
            <text:p>2026-03-20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1" calcext:value-type="date">
            <text:p>2026-03-21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2" calcext:value-type="date">
            <text:p>2026-03-22</text:p>
          </table:table-cell>
          <table:table-cell office:value-type="float" office:value="159.67" calcext:value-type="float">
            <text:p>159.67</text:p>
          </table:table-cell>
          <table:table-cell office:value-type="float" office:value="53942143" calcext:value-type="float">
            <text:p>5394214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office:value-type="float" office:value="161.13" calcext:value-type="float">
            <text:p>161.13</text:p>
          </table:table-cell>
          <table:table-cell office:value-type="float" office:value="25021289" calcext:value-type="float">
            <text:p>2502128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float" office:value="165.38" calcext:value-type="float">
            <text:p>165.38</text:p>
          </table:table-cell>
          <table:table-cell office:value-type="float" office:value="26131824" calcext:value-type="float">
            <text:p>261318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5" calcext:value-type="date">
            <text:p>2026-03-25</text:p>
          </table:table-cell>
          <table:table-cell office:value-type="float" office:value="163.26" calcext:value-type="float">
            <text:p>163.26</text:p>
          </table:table-cell>
          <table:table-cell office:value-type="float" office:value="17192333" calcext:value-type="float">
            <text:p>171923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float" office:value="165.43" calcext:value-type="float">
            <text:p>165.43</text:p>
          </table:table-cell>
          <table:table-cell office:value-type="float" office:value="18625249" calcext:value-type="float">
            <text:p>1862524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7" calcext:value-type="date">
            <text:p>2026-03-27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8" calcext:value-type="date">
            <text:p>2026-03-28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29" calcext:value-type="date">
            <text:p>2026-03-29</text:p>
          </table:table-cell>
          <table:table-cell office:value-type="float" office:value="170.99" calcext:value-type="float">
            <text:p>170.99</text:p>
          </table:table-cell>
          <table:table-cell office:value-type="float" office:value="30338314" calcext:value-type="float">
            <text:p>3033831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30" calcext:value-type="date">
            <text:p>2026-03-30</text:p>
          </table:table-cell>
          <table:table-cell office:value-type="float" office:value="171.47" calcext:value-type="float">
            <text:p>171.47</text:p>
          </table:table-cell>
          <table:table-cell office:value-type="float" office:value="29813504" calcext:value-type="float">
            <text:p>2981350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3-31" calcext:value-type="date">
            <text:p>2026-03-31</text:p>
          </table:table-cell>
          <table:table-cell office:value-type="float" office:value="169.66" calcext:value-type="float">
            <text:p>169.66</text:p>
          </table:table-cell>
          <table:table-cell office:value-type="float" office:value="32006724" calcext:value-type="float">
            <text:p>3200672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1" calcext:value-type="date">
            <text:p>2026-04-01</text:p>
          </table:table-cell>
          <table:table-cell office:value-type="float" office:value="160.78" calcext:value-type="float">
            <text:p>160.78</text:p>
          </table:table-cell>
          <table:table-cell office:value-type="float" office:value="37927639" calcext:value-type="float">
            <text:p>3792763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4" calcext:value-type="date">
            <text:p>2026-04-04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5" calcext:value-type="date">
            <text:p>2026-04-05</text:p>
          </table:table-cell>
          <table:table-cell office:value-type="float" office:value="160.69" calcext:value-type="float">
            <text:p>160.69</text:p>
          </table:table-cell>
          <table:table-cell office:value-type="float" office:value="25377657" calcext:value-type="float">
            <text:p>253776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office:value-type="float" office:value="163.37" calcext:value-type="float">
            <text:p>163.37</text:p>
          </table:table-cell>
          <table:table-cell office:value-type="float" office:value="16344261" calcext:value-type="float">
            <text:p>1634426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7" calcext:value-type="date">
            <text:p>2026-04-07</text:p>
          </table:table-cell>
          <table:table-cell office:value-type="float" office:value="163.91" calcext:value-type="float">
            <text:p>163.91</text:p>
          </table:table-cell>
          <table:table-cell office:value-type="float" office:value="25227501" calcext:value-type="float">
            <text:p>252275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8" calcext:value-type="date">
            <text:p>2026-04-08</text:p>
          </table:table-cell>
          <table:table-cell office:value-type="float" office:value="156.22" calcext:value-type="float">
            <text:p>156.22</text:p>
          </table:table-cell>
          <table:table-cell office:value-type="float" office:value="31311201" calcext:value-type="float">
            <text:p>313112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09" calcext:value-type="date">
            <text:p>2026-04-09</text:p>
          </table:table-cell>
          <table:table-cell office:value-type="float" office:value="155.04" calcext:value-type="float">
            <text:p>155.04</text:p>
          </table:table-cell>
          <table:table-cell office:value-type="float" office:value="25868377" calcext:value-type="float">
            <text:p>258683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0" calcext:value-type="date">
            <text:p>2026-04-10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1" calcext:value-type="date">
            <text:p>2026-04-11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2" calcext:value-type="date">
            <text:p>2026-04-12</text:p>
          </table:table-cell>
          <table:table-cell office:value-type="float" office:value="152.51" calcext:value-type="float">
            <text:p>152.51</text:p>
          </table:table-cell>
          <table:table-cell office:value-type="float" office:value="21065019" calcext:value-type="float">
            <text:p>2106501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3" calcext:value-type="date">
            <text:p>2026-04-13</text:p>
          </table:table-cell>
          <table:table-cell office:value-type="float" office:value="152.64" calcext:value-type="float">
            <text:p>152.64</text:p>
          </table:table-cell>
          <table:table-cell office:value-type="float" office:value="18685605" calcext:value-type="float">
            <text:p>1868560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4" calcext:value-type="date">
            <text:p>2026-04-14</text:p>
          </table:table-cell>
          <table:table-cell office:value-type="float" office:value="149.24" calcext:value-type="float">
            <text:p>149.24</text:p>
          </table:table-cell>
          <table:table-cell office:value-type="float" office:value="18528163" calcext:value-type="float">
            <text:p>1852816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5" calcext:value-type="date">
            <text:p>2026-04-15</text:p>
          </table:table-cell>
          <table:table-cell office:value-type="float" office:value="149.01" calcext:value-type="float">
            <text:p>149.01</text:p>
          </table:table-cell>
          <table:table-cell office:value-type="float" office:value="15626519" calcext:value-type="float">
            <text:p>1562651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6" calcext:value-type="date">
            <text:p>2026-04-16</text:p>
          </table:table-cell>
          <table:table-cell office:value-type="float" office:value="151.98" calcext:value-type="float">
            <text:p>151.98</text:p>
          </table:table-cell>
          <table:table-cell office:value-type="float" office:value="15191033" calcext:value-type="float">
            <text:p>151910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7" calcext:value-type="date">
            <text:p>2026-04-17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8" calcext:value-type="date">
            <text:p>2026-04-18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19" calcext:value-type="date">
            <text:p>2026-04-19</text:p>
          </table:table-cell>
          <table:table-cell office:value-type="float" office:value="146.44" calcext:value-type="float">
            <text:p>146.44</text:p>
          </table:table-cell>
          <table:table-cell office:value-type="float" office:value="28947445" calcext:value-type="float">
            <text:p>2894744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0" calcext:value-type="date">
            <text:p>2026-04-20</text:p>
          </table:table-cell>
          <table:table-cell office:value-type="float" office:value="147.68" calcext:value-type="float">
            <text:p>147.68</text:p>
          </table:table-cell>
          <table:table-cell office:value-type="float" office:value="16354430" calcext:value-type="float">
            <text:p>163544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1" calcext:value-type="date">
            <text:p>2026-04-21</text:p>
          </table:table-cell>
          <table:table-cell office:value-type="float" office:value="148.36" calcext:value-type="float">
            <text:p>148.36</text:p>
          </table:table-cell>
          <table:table-cell office:value-type="float" office:value="17515930" calcext:value-type="float">
            <text:p>1751593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2" calcext:value-type="date">
            <text:p>2026-04-22</text:p>
          </table:table-cell>
          <table:table-cell office:value-type="float" office:value="149.5" calcext:value-type="float">
            <text:p>149.5</text:p>
          </table:table-cell>
          <table:table-cell office:value-type="float" office:value="13738701" calcext:value-type="float">
            <text:p>137387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3" calcext:value-type="date">
            <text:p>2026-04-23</text:p>
          </table:table-cell>
          <table:table-cell office:value-type="float" office:value="150.53" calcext:value-type="float">
            <text:p>150.53</text:p>
          </table:table-cell>
          <table:table-cell office:value-type="float" office:value="12970401" calcext:value-type="float">
            <text:p>1297040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4" calcext:value-type="date">
            <text:p>2026-04-24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5" calcext:value-type="date">
            <text:p>2026-04-25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6" calcext:value-type="date">
            <text:p>2026-04-26</text:p>
          </table:table-cell>
          <table:table-cell office:value-type="float" office:value="148.91" calcext:value-type="float">
            <text:p>148.91</text:p>
          </table:table-cell>
          <table:table-cell office:value-type="float" office:value="13735857" calcext:value-type="float">
            <text:p>1373585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7" calcext:value-type="date">
            <text:p>2026-04-27</text:p>
          </table:table-cell>
          <table:table-cell office:value-type="float" office:value="148.19" calcext:value-type="float">
            <text:p>148.19</text:p>
          </table:table-cell>
          <table:table-cell office:value-type="float" office:value="13940841" calcext:value-type="float">
            <text:p>1394084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8" calcext:value-type="date">
            <text:p>2026-04-28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173622" calcext:value-type="float">
            <text:p>1517362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29" calcext:value-type="date">
            <text:p>2026-04-29</text:p>
          </table:table-cell>
          <table:table-cell office:value-type="float" office:value="154.67" calcext:value-type="float">
            <text:p>154.67</text:p>
          </table:table-cell>
          <table:table-cell office:value-type="float" office:value="14669140" calcext:value-type="float">
            <text:p>1466914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4-30" calcext:value-type="date">
            <text:p>2026-04-30</text:p>
          </table:table-cell>
          <table:table-cell office:value-type="float" office:value="154.33" calcext:value-type="float">
            <text:p>154.33</text:p>
          </table:table-cell>
          <table:table-cell office:value-type="float" office:value="22885900" calcext:value-type="float">
            <text:p>2288590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2" calcext:value-type="date">
            <text:p>2026-05-02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3" calcext:value-type="date">
            <text:p>2026-05-03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458208" calcext:value-type="float">
            <text:p>1545820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4" calcext:value-type="date">
            <text:p>2026-05-04</text:p>
          </table:table-cell>
          <table:table-cell office:value-type="float" office:value="153.69" calcext:value-type="float">
            <text:p>153.69</text:p>
          </table:table-cell>
          <table:table-cell office:value-type="float" office:value="14238533" calcext:value-type="float">
            <text:p>142385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5" calcext:value-type="date">
            <text:p>2026-05-05</text:p>
          </table:table-cell>
          <table:table-cell office:value-type="float" office:value="154.88" calcext:value-type="float">
            <text:p>154.88</text:p>
          </table:table-cell>
          <table:table-cell office:value-type="float" office:value="12494644" calcext:value-type="float">
            <text:p>1249464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6" calcext:value-type="date">
            <text:p>2026-05-06</text:p>
          </table:table-cell>
          <table:table-cell office:value-type="float" office:value="148.69" calcext:value-type="float">
            <text:p>148.69</text:p>
          </table:table-cell>
          <table:table-cell office:value-type="float" office:value="20526977" calcext:value-type="float">
            <text:p>2052697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7" calcext:value-type="date">
            <text:p>2026-05-07</text:p>
          </table:table-cell>
          <table:table-cell office:value-type="float" office:value="146.58" calcext:value-type="float">
            <text:p>146.58</text:p>
          </table:table-cell>
          <table:table-cell office:value-type="float" office:value="22509403" calcext:value-type="float">
            <text:p>2250940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8" calcext:value-type="date">
            <text:p>2026-05-08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09" calcext:value-type="date">
            <text:p>2026-05-09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0" calcext:value-type="date">
            <text:p>2026-05-10</text:p>
          </table:table-cell>
          <table:table-cell office:value-type="float" office:value="144.57" calcext:value-type="float">
            <text:p>144.57</text:p>
          </table:table-cell>
          <table:table-cell office:value-type="float" office:value="19550073" calcext:value-type="float">
            <text:p>195500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1" calcext:value-type="date">
            <text:p>2026-05-11</text:p>
          </table:table-cell>
          <table:table-cell office:value-type="float" office:value="149.68" calcext:value-type="float">
            <text:p>149.68</text:p>
          </table:table-cell>
          <table:table-cell office:value-type="float" office:value="14849473" calcext:value-type="float">
            <text:p>1484947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2" calcext:value-type="date">
            <text:p>2026-05-12</text:p>
          </table:table-cell>
          <table:table-cell office:value-type="float" office:value="150.63" calcext:value-type="float">
            <text:p>150.63</text:p>
          </table:table-cell>
          <table:table-cell office:value-type="float" office:value="16443098" calcext:value-type="float">
            <text:p>164430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3" calcext:value-type="date">
            <text:p>2026-05-13</text:p>
          </table:table-cell>
          <table:table-cell office:value-type="float" office:value="151.57" calcext:value-type="float">
            <text:p>151.57</text:p>
          </table:table-cell>
          <table:table-cell office:value-type="float" office:value="15772782" calcext:value-type="float">
            <text:p>1577278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4" calcext:value-type="date">
            <text:p>2026-05-14</text:p>
          </table:table-cell>
          <table:table-cell office:value-type="float" office:value="152.78" calcext:value-type="float">
            <text:p>152.78</text:p>
          </table:table-cell>
          <table:table-cell office:value-type="float" office:value="11331469" calcext:value-type="float">
            <text:p>11331469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5" calcext:value-type="date">
            <text:p>2026-05-15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7" calcext:value-type="date">
            <text:p>2026-05-17</text:p>
          </table:table-cell>
          <table:table-cell office:value-type="float" office:value="157.92" calcext:value-type="float">
            <text:p>157.92</text:p>
          </table:table-cell>
          <table:table-cell office:value-type="float" office:value="27882407" calcext:value-type="float">
            <text:p>2788240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8" calcext:value-type="date">
            <text:p>2026-05-18</text:p>
          </table:table-cell>
          <table:table-cell office:value-type="float" office:value="160.49" calcext:value-type="float">
            <text:p>160.49</text:p>
          </table:table-cell>
          <table:table-cell office:value-type="float" office:value="20065227" calcext:value-type="float">
            <text:p>2006522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19" calcext:value-type="date">
            <text:p>2026-05-19</text:p>
          </table:table-cell>
          <table:table-cell office:value-type="float" office:value="162.55" calcext:value-type="float">
            <text:p>162.55</text:p>
          </table:table-cell>
          <table:table-cell office:value-type="float" office:value="20715553" calcext:value-type="float">
            <text:p>2071555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0" calcext:value-type="date">
            <text:p>2026-05-20</text:p>
          </table:table-cell>
          <table:table-cell office:value-type="float" office:value="156.28" calcext:value-type="float">
            <text:p>156.28</text:p>
          </table:table-cell>
          <table:table-cell office:value-type="float" office:value="18509731" calcext:value-type="float">
            <text:p>18509731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1" calcext:value-type="date">
            <text:p>2026-05-21</text:p>
          </table:table-cell>
          <table:table-cell office:value-type="float" office:value="155.29" calcext:value-type="float">
            <text:p>155.29</text:p>
          </table:table-cell>
          <table:table-cell office:value-type="float" office:value="17061717" calcext:value-type="float">
            <text:p>17061717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2" calcext:value-type="date">
            <text:p>2026-05-22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3" calcext:value-type="date">
            <text:p>2026-05-23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4" calcext:value-type="date">
            <text:p>2026-05-24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float" office:value="154.92" calcext:value-type="float">
            <text:p>154.92</text:p>
          </table:table-cell>
          <table:table-cell office:value-type="float" office:value="12948454" calcext:value-type="float">
            <text:p>12948454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6" calcext:value-type="date">
            <text:p>2026-05-26</text:p>
          </table:table-cell>
          <table:table-cell office:value-type="float" office:value="149.81" calcext:value-type="float">
            <text:p>149.81</text:p>
          </table:table-cell>
          <table:table-cell office:value-type="float" office:value="13057760" calcext:value-type="float">
            <text:p>1305776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7" calcext:value-type="date">
            <text:p>2026-05-27</text:p>
          </table:table-cell>
          <table:table-cell office:value-type="float" office:value="147.9" calcext:value-type="float">
            <text:p>147.9</text:p>
          </table:table-cell>
          <table:table-cell office:value-type="float" office:value="16241133" calcext:value-type="float">
            <text:p>16241133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8" calcext:value-type="date">
            <text:p>2026-05-28</text:p>
          </table:table-cell>
          <table:table-cell office:value-type="float" office:value="146.96" calcext:value-type="float">
            <text:p>146.96</text:p>
          </table:table-cell>
          <table:table-cell office:value-type="float" office:value="14012470" calcext:value-type="float">
            <text:p>14012470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29" calcext:value-type="date">
            <text:p>2026-05-29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30" calcext:value-type="date">
            <text:p>2026-05-30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5-31" calcext:value-type="date">
            <text:p>2026-05-31</text:p>
          </table:table-cell>
          <table:table-cell office:value-type="float" office:value="145.26" calcext:value-type="float">
            <text:p>145.26</text:p>
          </table:table-cell>
          <table:table-cell office:value-type="float" office:value="27959898" calcext:value-type="float">
            <text:p>2795989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1" calcext:value-type="date">
            <text:p>2026-06-01</text:p>
          </table:table-cell>
          <table:table-cell office:value-type="float" office:value="149.38" calcext:value-type="float">
            <text:p>149.38</text:p>
          </table:table-cell>
          <table:table-cell office:value-type="float" office:value="16732078" calcext:value-type="float">
            <text:p>1673207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2" calcext:value-type="date">
            <text:p>2026-06-02</text:p>
          </table:table-cell>
          <table:table-cell office:value-type="float" office:value="149.56" calcext:value-type="float">
            <text:p>149.56</text:p>
          </table:table-cell>
          <table:table-cell office:value-type="float" office:value="10462402" calcext:value-type="float">
            <text:p>1046240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3" calcext:value-type="date">
            <text:p>2026-06-03</text:p>
          </table:table-cell>
          <table:table-cell office:value-type="float" office:value="152.53" calcext:value-type="float">
            <text:p>152.53</text:p>
          </table:table-cell>
          <table:table-cell office:value-type="float" office:value="14372958" calcext:value-type="float">
            <text:p>14372958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4" calcext:value-type="date">
            <text:p>2026-06-04</text:p>
          </table:table-cell>
          <table:table-cell office:value-type="float" office:value="152.04" calcext:value-type="float">
            <text:p>152.04</text:p>
          </table:table-cell>
          <table:table-cell office:value-type="float" office:value="11799385" calcext:value-type="float">
            <text:p>11799385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5" calcext:value-type="date">
            <text:p>2026-06-05</text:p>
          </table:table-cell>
          <table:table-cell office:value-type="float" office:value="149.92" calcext:value-type="float">
            <text:p>149.92</text:p>
          </table:table-cell>
          <table:table-cell office:value-type="float" office:value="16583962" calcext:value-type="float">
            <text:p>16583962</text:p>
          </table:table-cell>
          <table:table-cell table:number-columns-repeated="4"/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6" calcext:value-type="date">
            <text:p>2026-06-06</text:p>
          </table:table-cell>
          <table:table-cell table:number-columns-repeated="2"/>
          <table:table-cell table:formula="of:=COM.MICROSOFT.FORECAST.ETS([.A734];[.$B$2:.$B$733];[.$A$2:.$A$733];1;1; )" office:value-type="float" office:value="151.07960572187" calcext:value-type="float">
            <text:p>151.07960572187</text:p>
          </table:table-cell>
          <table:table-cell table:formula="of:=COM.MICROSOFT.FORECAST.ETS.CONFINT([.A734];[.$B$2:.$B$733];[.$A$2:.$A$733];0.95;1;1;1)" office:value-type="float" office:value="3.20390553721526" calcext:value-type="float">
            <text:p>3.20390553721526</text:p>
          </table:table-cell>
          <table:table-cell table:formula="of:=[.D734]-[.E734]" office:value-type="float" office:value="147.875700184655" calcext:value-type="float">
            <text:p>147.875700184655</text:p>
          </table:table-cell>
          <table:table-cell table:formula="of:=[.D734]+[.E734]" office:value-type="float" office:value="154.283511259085" calcext:value-type="float">
            <text:p>154.283511259085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7" calcext:value-type="date">
            <text:p>2026-06-07</text:p>
          </table:table-cell>
          <table:table-cell table:number-columns-repeated="2"/>
          <table:table-cell table:formula="of:=COM.MICROSOFT.FORECAST.ETS([.A735];[.$B$2:.$B$733];[.$A$2:.$A$733];1;1; )" office:value-type="float" office:value="151.286641735536" calcext:value-type="float">
            <text:p>151.286641735536</text:p>
          </table:table-cell>
          <table:table-cell table:formula="of:=COM.MICROSOFT.FORECAST.ETS.CONFINT([.A735];[.$B$2:.$B$733];[.$A$2:.$A$733];0.95;1;1;1)" office:value-type="float" office:value="3.46974719935932" calcext:value-type="float">
            <text:p>3.46974719935932</text:p>
          </table:table-cell>
          <table:table-cell table:formula="of:=[.D735]-[.E735]" office:value-type="float" office:value="147.816894536177" calcext:value-type="float">
            <text:p>147.816894536177</text:p>
          </table:table-cell>
          <table:table-cell table:formula="of:=[.D735]+[.E735]" office:value-type="float" office:value="154.756388934895" calcext:value-type="float">
            <text:p>154.756388934895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8" calcext:value-type="date">
            <text:p>2026-06-08</text:p>
          </table:table-cell>
          <table:table-cell table:number-columns-repeated="2"/>
          <table:table-cell table:formula="of:=COM.MICROSOFT.FORECAST.ETS([.A736];[.$B$2:.$B$733];[.$A$2:.$A$733];1;1; )" office:value-type="float" office:value="151.135298874844" calcext:value-type="float">
            <text:p>151.135298874844</text:p>
          </table:table-cell>
          <table:table-cell table:formula="of:=COM.MICROSOFT.FORECAST.ETS.CONFINT([.A736];[.$B$2:.$B$733];[.$A$2:.$A$733];0.95;1;1;1)" office:value-type="float" office:value="3.6164254157427" calcext:value-type="float">
            <text:p>3.6164254157427</text:p>
          </table:table-cell>
          <table:table-cell table:formula="of:=[.D736]-[.E736]" office:value-type="float" office:value="147.518873459102" calcext:value-type="float">
            <text:p>147.518873459102</text:p>
          </table:table-cell>
          <table:table-cell table:formula="of:=[.D736]+[.E736]" office:value-type="float" office:value="154.751724290587" calcext:value-type="float">
            <text:p>154.751724290587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09" calcext:value-type="date">
            <text:p>2026-06-09</text:p>
          </table:table-cell>
          <table:table-cell table:number-columns-repeated="2"/>
          <table:table-cell table:formula="of:=COM.MICROSOFT.FORECAST.ETS([.A737];[.$B$2:.$B$733];[.$A$2:.$A$733];1;1; )" office:value-type="float" office:value="151.616065324221" calcext:value-type="float">
            <text:p>151.616065324221</text:p>
          </table:table-cell>
          <table:table-cell table:formula="of:=COM.MICROSOFT.FORECAST.ETS.CONFINT([.A737];[.$B$2:.$B$733];[.$A$2:.$A$733];0.95;1;1;1)" office:value-type="float" office:value="4.12529259812007" calcext:value-type="float">
            <text:p>4.12529259812007</text:p>
          </table:table-cell>
          <table:table-cell table:formula="of:=[.D737]-[.E737]" office:value-type="float" office:value="147.490772726101" calcext:value-type="float">
            <text:p>147.490772726101</text:p>
          </table:table-cell>
          <table:table-cell table:formula="of:=[.D737]+[.E737]" office:value-type="float" office:value="155.741357922341" calcext:value-type="float">
            <text:p>155.741357922341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0" calcext:value-type="date">
            <text:p>2026-06-10</text:p>
          </table:table-cell>
          <table:table-cell table:number-columns-repeated="2"/>
          <table:table-cell table:formula="of:=COM.MICROSOFT.FORECAST.ETS([.A738];[.$B$2:.$B$733];[.$A$2:.$A$733];1;1; )" office:value-type="float" office:value="151.522337992827" calcext:value-type="float">
            <text:p>151.522337992827</text:p>
          </table:table-cell>
          <table:table-cell table:formula="of:=COM.MICROSOFT.FORECAST.ETS.CONFINT([.A738];[.$B$2:.$B$733];[.$A$2:.$A$733];0.95;1;1;1)" office:value-type="float" office:value="4.98122074960676" calcext:value-type="float">
            <text:p>4.98122074960676</text:p>
          </table:table-cell>
          <table:table-cell table:formula="of:=[.D738]-[.E738]" office:value-type="float" office:value="146.54111724322" calcext:value-type="float">
            <text:p>146.54111724322</text:p>
          </table:table-cell>
          <table:table-cell table:formula="of:=[.D738]+[.E738]" office:value-type="float" office:value="156.503558742434" calcext:value-type="float">
            <text:p>156.503558742434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1" calcext:value-type="date">
            <text:p>2026-06-11</text:p>
          </table:table-cell>
          <table:table-cell table:number-columns-repeated="2"/>
          <table:table-cell table:formula="of:=COM.MICROSOFT.FORECAST.ETS([.A739];[.$B$2:.$B$733];[.$A$2:.$A$733];1;1; )" office:value-type="float" office:value="151.786866797687" calcext:value-type="float">
            <text:p>151.786866797687</text:p>
          </table:table-cell>
          <table:table-cell table:formula="of:=COM.MICROSOFT.FORECAST.ETS.CONFINT([.A739];[.$B$2:.$B$733];[.$A$2:.$A$733];0.95;1;1;1)" office:value-type="float" office:value="5.49164912420437" calcext:value-type="float">
            <text:p>5.49164912420437</text:p>
          </table:table-cell>
          <table:table-cell table:formula="of:=[.D739]-[.E739]" office:value-type="float" office:value="146.295217673483" calcext:value-type="float">
            <text:p>146.295217673483</text:p>
          </table:table-cell>
          <table:table-cell table:formula="of:=[.D739]+[.E739]" office:value-type="float" office:value="157.278515921892" calcext:value-type="float">
            <text:p>157.278515921892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2" calcext:value-type="date">
            <text:p>2026-06-12</text:p>
          </table:table-cell>
          <table:table-cell table:number-columns-repeated="2"/>
          <table:table-cell table:formula="of:=COM.MICROSOFT.FORECAST.ETS([.A740];[.$B$2:.$B$733];[.$A$2:.$A$733];1;1; )" office:value-type="float" office:value="151.235655751591" calcext:value-type="float">
            <text:p>151.235655751591</text:p>
          </table:table-cell>
          <table:table-cell table:formula="of:=COM.MICROSOFT.FORECAST.ETS.CONFINT([.A740];[.$B$2:.$B$733];[.$A$2:.$A$733];0.95;1;1;1)" office:value-type="float" office:value="5.28507911034629" calcext:value-type="float">
            <text:p>5.28507911034629</text:p>
          </table:table-cell>
          <table:table-cell table:formula="of:=[.D740]-[.E740]" office:value-type="float" office:value="145.950576641245" calcext:value-type="float">
            <text:p>145.950576641245</text:p>
          </table:table-cell>
          <table:table-cell table:formula="of:=[.D740]+[.E740]" office:value-type="float" office:value="156.520734861937" calcext:value-type="float">
            <text:p>156.520734861937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3" calcext:value-type="date">
            <text:p>2026-06-13</text:p>
          </table:table-cell>
          <table:table-cell table:number-columns-repeated="2"/>
          <table:table-cell table:formula="of:=COM.MICROSOFT.FORECAST.ETS([.A741];[.$B$2:.$B$733];[.$A$2:.$A$733];1;1; )" office:value-type="float" office:value="150.875400032059" calcext:value-type="float">
            <text:p>150.875400032059</text:p>
          </table:table-cell>
          <table:table-cell table:formula="of:=COM.MICROSOFT.FORECAST.ETS.CONFINT([.A741];[.$B$2:.$B$733];[.$A$2:.$A$733];0.95;1;1;1)" office:value-type="float" office:value="5.94512194764258" calcext:value-type="float">
            <text:p>5.94512194764258</text:p>
          </table:table-cell>
          <table:table-cell table:formula="of:=[.D741]-[.E741]" office:value-type="float" office:value="144.930278084416" calcext:value-type="float">
            <text:p>144.930278084416</text:p>
          </table:table-cell>
          <table:table-cell table:formula="of:=[.D741]+[.E741]" office:value-type="float" office:value="156.820521979701" calcext:value-type="float">
            <text:p>156.820521979701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4" calcext:value-type="date">
            <text:p>2026-06-14</text:p>
          </table:table-cell>
          <table:table-cell table:number-columns-repeated="2"/>
          <table:table-cell table:formula="of:=COM.MICROSOFT.FORECAST.ETS([.A742];[.$B$2:.$B$733];[.$A$2:.$A$733];1;1; )" office:value-type="float" office:value="150.750526556474" calcext:value-type="float">
            <text:p>150.750526556474</text:p>
          </table:table-cell>
          <table:table-cell table:formula="of:=COM.MICROSOFT.FORECAST.ETS.CONFINT([.A742];[.$B$2:.$B$733];[.$A$2:.$A$733];0.95;1;1;1)" office:value-type="float" office:value="6.41762448943803" calcext:value-type="float">
            <text:p>6.41762448943803</text:p>
          </table:table-cell>
          <table:table-cell table:formula="of:=[.D742]-[.E742]" office:value-type="float" office:value="144.332902067036" calcext:value-type="float">
            <text:p>144.332902067036</text:p>
          </table:table-cell>
          <table:table-cell table:formula="of:=[.D742]+[.E742]" office:value-type="float" office:value="157.168151045912" calcext:value-type="float">
            <text:p>157.168151045912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5" calcext:value-type="date">
            <text:p>2026-06-15</text:p>
          </table:table-cell>
          <table:table-cell table:number-columns-repeated="2"/>
          <table:table-cell table:formula="of:=COM.MICROSOFT.FORECAST.ETS([.A743];[.$B$2:.$B$733];[.$A$2:.$A$733];1;1; )" office:value-type="float" office:value="150.431354631312" calcext:value-type="float">
            <text:p>150.431354631312</text:p>
          </table:table-cell>
          <table:table-cell table:formula="of:=COM.MICROSOFT.FORECAST.ETS.CONFINT([.A743];[.$B$2:.$B$733];[.$A$2:.$A$733];0.95;1;1;1)" office:value-type="float" office:value="6.51142041748096" calcext:value-type="float">
            <text:p>6.51142041748096</text:p>
          </table:table-cell>
          <table:table-cell table:formula="of:=[.D743]-[.E743]" office:value-type="float" office:value="143.919934213831" calcext:value-type="float">
            <text:p>143.919934213831</text:p>
          </table:table-cell>
          <table:table-cell table:formula="of:=[.D743]+[.E743]" office:value-type="float" office:value="156.942775048793" calcext:value-type="float">
            <text:p>156.942775048793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6" calcext:value-type="date">
            <text:p>2026-06-16</text:p>
          </table:table-cell>
          <table:table-cell table:number-columns-repeated="2"/>
          <table:table-cell table:formula="of:=COM.MICROSOFT.FORECAST.ETS([.A744];[.$B$2:.$B$733];[.$A$2:.$A$733];1;1; )" office:value-type="float" office:value="150.336447329176" calcext:value-type="float">
            <text:p>150.336447329176</text:p>
          </table:table-cell>
          <table:table-cell table:formula="of:=COM.MICROSOFT.FORECAST.ETS.CONFINT([.A744];[.$B$2:.$B$733];[.$A$2:.$A$733];0.95;1;1;1)" office:value-type="float" office:value="6.62859867965395" calcext:value-type="float">
            <text:p>6.62859867965395</text:p>
          </table:table-cell>
          <table:table-cell table:formula="of:=[.D744]-[.E744]" office:value-type="float" office:value="143.707848649522" calcext:value-type="float">
            <text:p>143.707848649522</text:p>
          </table:table-cell>
          <table:table-cell table:formula="of:=[.D744]+[.E744]" office:value-type="float" office:value="156.96504600883" calcext:value-type="float">
            <text:p>156.96504600883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table:number-columns-repeated="2"/>
          <table:table-cell table:formula="of:=COM.MICROSOFT.FORECAST.ETS([.A745];[.$B$2:.$B$733];[.$A$2:.$A$733];1;1; )" office:value-type="float" office:value="148.427007640733" calcext:value-type="float">
            <text:p>148.427007640733</text:p>
          </table:table-cell>
          <table:table-cell table:formula="of:=COM.MICROSOFT.FORECAST.ETS.CONFINT([.A745];[.$B$2:.$B$733];[.$A$2:.$A$733];0.95;1;1;1)" office:value-type="float" office:value="7.07246028996909" calcext:value-type="float">
            <text:p>7.07246028996909</text:p>
          </table:table-cell>
          <table:table-cell table:formula="of:=[.D745]-[.E745]" office:value-type="float" office:value="141.354547350764" calcext:value-type="float">
            <text:p>141.354547350764</text:p>
          </table:table-cell>
          <table:table-cell table:formula="of:=[.D745]+[.E745]" office:value-type="float" office:value="155.499467930702" calcext:value-type="float">
            <text:p>155.499467930702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8" calcext:value-type="date">
            <text:p>2026-06-18</text:p>
          </table:table-cell>
          <table:table-cell table:number-columns-repeated="2"/>
          <table:table-cell table:formula="of:=COM.MICROSOFT.FORECAST.ETS([.A746];[.$B$2:.$B$733];[.$A$2:.$A$733];1;1; )" office:value-type="float" office:value="147.223214697359" calcext:value-type="float">
            <text:p>147.223214697359</text:p>
          </table:table-cell>
          <table:table-cell table:formula="of:=COM.MICROSOFT.FORECAST.ETS.CONFINT([.A746];[.$B$2:.$B$733];[.$A$2:.$A$733];0.95;1;1;1)" office:value-type="float" office:value="7.07767530811569" calcext:value-type="float">
            <text:p>7.07767530811569</text:p>
          </table:table-cell>
          <table:table-cell table:formula="of:=[.D746]-[.E746]" office:value-type="float" office:value="140.145539389243" calcext:value-type="float">
            <text:p>140.145539389243</text:p>
          </table:table-cell>
          <table:table-cell table:formula="of:=[.D746]+[.E746]" office:value-type="float" office:value="154.300890005475" calcext:value-type="float">
            <text:p>154.300890005475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19" calcext:value-type="date">
            <text:p>2026-06-19</text:p>
          </table:table-cell>
          <table:table-cell table:number-columns-repeated="2"/>
          <table:table-cell table:formula="of:=COM.MICROSOFT.FORECAST.ETS([.A747];[.$B$2:.$B$733];[.$A$2:.$A$733];1;1; )" office:value-type="float" office:value="148.715095475192" calcext:value-type="float">
            <text:p>148.715095475192</text:p>
          </table:table-cell>
          <table:table-cell table:formula="of:=COM.MICROSOFT.FORECAST.ETS.CONFINT([.A747];[.$B$2:.$B$733];[.$A$2:.$A$733];0.95;1;1;1)" office:value-type="float" office:value="7.13802501056949" calcext:value-type="float">
            <text:p>7.13802501056949</text:p>
          </table:table-cell>
          <table:table-cell table:formula="of:=[.D747]-[.E747]" office:value-type="float" office:value="141.577070464622" calcext:value-type="float">
            <text:p>141.577070464622</text:p>
          </table:table-cell>
          <table:table-cell table:formula="of:=[.D747]+[.E747]" office:value-type="float" office:value="155.853120485761" calcext:value-type="float">
            <text:p>155.853120485761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table:number-columns-repeated="2"/>
          <table:table-cell table:formula="of:=COM.MICROSOFT.FORECAST.ETS([.A748];[.$B$2:.$B$733];[.$A$2:.$A$733];1;1; )" office:value-type="float" office:value="148.690122053562" calcext:value-type="float">
            <text:p>148.690122053562</text:p>
          </table:table-cell>
          <table:table-cell table:formula="of:=COM.MICROSOFT.FORECAST.ETS.CONFINT([.A748];[.$B$2:.$B$733];[.$A$2:.$A$733];0.95;1;1;1)" office:value-type="float" office:value="8.16285386690603" calcext:value-type="float">
            <text:p>8.16285386690603</text:p>
          </table:table-cell>
          <table:table-cell table:formula="of:=[.D748]-[.E748]" office:value-type="float" office:value="140.527268186656" calcext:value-type="float">
            <text:p>140.527268186656</text:p>
          </table:table-cell>
          <table:table-cell table:formula="of:=[.D748]+[.E748]" office:value-type="float" office:value="156.852975920468" calcext:value-type="float">
            <text:p>156.852975920468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1" calcext:value-type="date">
            <text:p>2026-06-21</text:p>
          </table:table-cell>
          <table:table-cell table:number-columns-repeated="2"/>
          <table:table-cell table:formula="of:=COM.MICROSOFT.FORECAST.ETS([.A749];[.$B$2:.$B$733];[.$A$2:.$A$733];1;1; )" office:value-type="float" office:value="148.782771734584" calcext:value-type="float">
            <text:p>148.782771734584</text:p>
          </table:table-cell>
          <table:table-cell table:formula="of:=COM.MICROSOFT.FORECAST.ETS.CONFINT([.A749];[.$B$2:.$B$733];[.$A$2:.$A$733];0.95;1;1;1)" office:value-type="float" office:value="8.00873859152057" calcext:value-type="float">
            <text:p>8.00873859152057</text:p>
          </table:table-cell>
          <table:table-cell table:formula="of:=[.D749]-[.E749]" office:value-type="float" office:value="140.774033143064" calcext:value-type="float">
            <text:p>140.774033143064</text:p>
          </table:table-cell>
          <table:table-cell table:formula="of:=[.D749]+[.E749]" office:value-type="float" office:value="156.791510326105" calcext:value-type="float">
            <text:p>156.791510326105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2" calcext:value-type="date">
            <text:p>2026-06-22</text:p>
          </table:table-cell>
          <table:table-cell table:number-columns-repeated="2"/>
          <table:table-cell table:formula="of:=COM.MICROSOFT.FORECAST.ETS([.A750];[.$B$2:.$B$733];[.$A$2:.$A$733];1;1; )" office:value-type="float" office:value="149.782633018968" calcext:value-type="float">
            <text:p>149.782633018968</text:p>
          </table:table-cell>
          <table:table-cell table:formula="of:=COM.MICROSOFT.FORECAST.ETS.CONFINT([.A750];[.$B$2:.$B$733];[.$A$2:.$A$733];0.95;1;1;1)" office:value-type="float" office:value="7.97567255110647" calcext:value-type="float">
            <text:p>7.97567255110647</text:p>
          </table:table-cell>
          <table:table-cell table:formula="of:=[.D750]-[.E750]" office:value-type="float" office:value="141.806960467861" calcext:value-type="float">
            <text:p>141.806960467861</text:p>
          </table:table-cell>
          <table:table-cell table:formula="of:=[.D750]+[.E750]" office:value-type="float" office:value="157.758305570074" calcext:value-type="float">
            <text:p>157.758305570074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3" calcext:value-type="date">
            <text:p>2026-06-23</text:p>
          </table:table-cell>
          <table:table-cell table:number-columns-repeated="2"/>
          <table:table-cell table:formula="of:=COM.MICROSOFT.FORECAST.ETS([.A751];[.$B$2:.$B$733];[.$A$2:.$A$733];1;1; )" office:value-type="float" office:value="149.90899994422" calcext:value-type="float">
            <text:p>149.90899994422</text:p>
          </table:table-cell>
          <table:table-cell table:formula="of:=COM.MICROSOFT.FORECAST.ETS.CONFINT([.A751];[.$B$2:.$B$733];[.$A$2:.$A$733];0.95;1;1;1)" office:value-type="float" office:value="8.58490454945357" calcext:value-type="float">
            <text:p>8.58490454945357</text:p>
          </table:table-cell>
          <table:table-cell table:formula="of:=[.D751]-[.E751]" office:value-type="float" office:value="141.324095394766" calcext:value-type="float">
            <text:p>141.324095394766</text:p>
          </table:table-cell>
          <table:table-cell table:formula="of:=[.D751]+[.E751]" office:value-type="float" office:value="158.493904493673" calcext:value-type="float">
            <text:p>158.493904493673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4" calcext:value-type="date">
            <text:p>2026-06-24</text:p>
          </table:table-cell>
          <table:table-cell table:number-columns-repeated="2"/>
          <table:table-cell table:formula="of:=COM.MICROSOFT.FORECAST.ETS([.A752];[.$B$2:.$B$733];[.$A$2:.$A$733];1;1; )" office:value-type="float" office:value="149.789924290642" calcext:value-type="float">
            <text:p>149.789924290642</text:p>
          </table:table-cell>
          <table:table-cell table:formula="of:=COM.MICROSOFT.FORECAST.ETS.CONFINT([.A752];[.$B$2:.$B$733];[.$A$2:.$A$733];0.95;1;1;1)" office:value-type="float" office:value="8.6177091362735" calcext:value-type="float">
            <text:p>8.6177091362735</text:p>
          </table:table-cell>
          <table:table-cell table:formula="of:=[.D752]-[.E752]" office:value-type="float" office:value="141.172215154369" calcext:value-type="float">
            <text:p>141.172215154369</text:p>
          </table:table-cell>
          <table:table-cell table:formula="of:=[.D752]+[.E752]" office:value-type="float" office:value="158.407633426916" calcext:value-type="float">
            <text:p>158.407633426916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5" calcext:value-type="date">
            <text:p>2026-06-25</text:p>
          </table:table-cell>
          <table:table-cell table:number-columns-repeated="2"/>
          <table:table-cell table:formula="of:=COM.MICROSOFT.FORECAST.ETS([.A753];[.$B$2:.$B$733];[.$A$2:.$A$733];1;1; )" office:value-type="float" office:value="148.842836066184" calcext:value-type="float">
            <text:p>148.842836066184</text:p>
          </table:table-cell>
          <table:table-cell table:formula="of:=COM.MICROSOFT.FORECAST.ETS.CONFINT([.A753];[.$B$2:.$B$733];[.$A$2:.$A$733];0.95;1;1;1)" office:value-type="float" office:value="9.16911600445343" calcext:value-type="float">
            <text:p>9.16911600445343</text:p>
          </table:table-cell>
          <table:table-cell table:formula="of:=[.D753]-[.E753]" office:value-type="float" office:value="139.673720061731" calcext:value-type="float">
            <text:p>139.673720061731</text:p>
          </table:table-cell>
          <table:table-cell table:formula="of:=[.D753]+[.E753]" office:value-type="float" office:value="158.011952070637" calcext:value-type="float">
            <text:p>158.011952070637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6" calcext:value-type="date">
            <text:p>2026-06-26</text:p>
          </table:table-cell>
          <table:table-cell table:number-columns-repeated="2"/>
          <table:table-cell table:formula="of:=COM.MICROSOFT.FORECAST.ETS([.A754];[.$B$2:.$B$733];[.$A$2:.$A$733];1;1; )" office:value-type="float" office:value="150.044601646452" calcext:value-type="float">
            <text:p>150.044601646452</text:p>
          </table:table-cell>
          <table:table-cell table:formula="of:=COM.MICROSOFT.FORECAST.ETS.CONFINT([.A754];[.$B$2:.$B$733];[.$A$2:.$A$733];0.95;1;1;1)" office:value-type="float" office:value="9.56230508587228" calcext:value-type="float">
            <text:p>9.56230508587228</text:p>
          </table:table-cell>
          <table:table-cell table:formula="of:=[.D754]-[.E754]" office:value-type="float" office:value="140.48229656058" calcext:value-type="float">
            <text:p>140.48229656058</text:p>
          </table:table-cell>
          <table:table-cell table:formula="of:=[.D754]+[.E754]" office:value-type="float" office:value="159.606906732325" calcext:value-type="float">
            <text:p>159.606906732325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7" calcext:value-type="date">
            <text:p>2026-06-27</text:p>
          </table:table-cell>
          <table:table-cell table:number-columns-repeated="2"/>
          <table:table-cell table:formula="of:=COM.MICROSOFT.FORECAST.ETS([.A755];[.$B$2:.$B$733];[.$A$2:.$A$733];1;1; )" office:value-type="float" office:value="150.389248410652" calcext:value-type="float">
            <text:p>150.389248410652</text:p>
          </table:table-cell>
          <table:table-cell table:formula="of:=COM.MICROSOFT.FORECAST.ETS.CONFINT([.A755];[.$B$2:.$B$733];[.$A$2:.$A$733];0.95;1;1;1)" office:value-type="float" office:value="9.40251099555047" calcext:value-type="float">
            <text:p>9.40251099555047</text:p>
          </table:table-cell>
          <table:table-cell table:formula="of:=[.D755]-[.E755]" office:value-type="float" office:value="140.986737415101" calcext:value-type="float">
            <text:p>140.986737415101</text:p>
          </table:table-cell>
          <table:table-cell table:formula="of:=[.D755]+[.E755]" office:value-type="float" office:value="159.791759406202" calcext:value-type="float">
            <text:p>159.791759406202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8" calcext:value-type="date">
            <text:p>2026-06-28</text:p>
          </table:table-cell>
          <table:table-cell table:number-columns-repeated="2"/>
          <table:table-cell table:formula="of:=COM.MICROSOFT.FORECAST.ETS([.A756];[.$B$2:.$B$733];[.$A$2:.$A$733];1;1; )" office:value-type="float" office:value="150.447164033703" calcext:value-type="float">
            <text:p>150.447164033703</text:p>
          </table:table-cell>
          <table:table-cell table:formula="of:=COM.MICROSOFT.FORECAST.ETS.CONFINT([.A756];[.$B$2:.$B$733];[.$A$2:.$A$733];0.95;1;1;1)" office:value-type="float" office:value="9.54874910939532" calcext:value-type="float">
            <text:p>9.54874910939532</text:p>
          </table:table-cell>
          <table:table-cell table:formula="of:=[.D756]-[.E756]" office:value-type="float" office:value="140.898414924307" calcext:value-type="float">
            <text:p>140.898414924307</text:p>
          </table:table-cell>
          <table:table-cell table:formula="of:=[.D756]+[.E756]" office:value-type="float" office:value="159.995913143098" calcext:value-type="float">
            <text:p>159.995913143098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29" calcext:value-type="date">
            <text:p>2026-06-29</text:p>
          </table:table-cell>
          <table:table-cell table:number-columns-repeated="2"/>
          <table:table-cell table:formula="of:=COM.MICROSOFT.FORECAST.ETS([.A757];[.$B$2:.$B$733];[.$A$2:.$A$733];1;1; )" office:value-type="float" office:value="150.851838602774" calcext:value-type="float">
            <text:p>150.851838602774</text:p>
          </table:table-cell>
          <table:table-cell table:formula="of:=COM.MICROSOFT.FORECAST.ETS.CONFINT([.A757];[.$B$2:.$B$733];[.$A$2:.$A$733];0.95;1;1;1)" office:value-type="float" office:value="9.97467265496809" calcext:value-type="float">
            <text:p>9.97467265496809</text:p>
          </table:table-cell>
          <table:table-cell table:formula="of:=[.D757]-[.E757]" office:value-type="float" office:value="140.877165947806" calcext:value-type="float">
            <text:p>140.877165947806</text:p>
          </table:table-cell>
          <table:table-cell table:formula="of:=[.D757]+[.E757]" office:value-type="float" office:value="160.826511257742" calcext:value-type="float">
            <text:p>160.826511257742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6-30" calcext:value-type="date">
            <text:p>2026-06-30</text:p>
          </table:table-cell>
          <table:table-cell table:number-columns-repeated="2"/>
          <table:table-cell table:formula="of:=COM.MICROSOFT.FORECAST.ETS([.A758];[.$B$2:.$B$733];[.$A$2:.$A$733];1;1; )" office:value-type="float" office:value="149.202542946947" calcext:value-type="float">
            <text:p>149.202542946947</text:p>
          </table:table-cell>
          <table:table-cell table:formula="of:=COM.MICROSOFT.FORECAST.ETS.CONFINT([.A758];[.$B$2:.$B$733];[.$A$2:.$A$733];0.95;1;1;1)" office:value-type="float" office:value="9.96501783243767" calcext:value-type="float">
            <text:p>9.96501783243767</text:p>
          </table:table-cell>
          <table:table-cell table:formula="of:=[.D758]-[.E758]" office:value-type="float" office:value="139.237525114509" calcext:value-type="float">
            <text:p>139.237525114509</text:p>
          </table:table-cell>
          <table:table-cell table:formula="of:=[.D758]+[.E758]" office:value-type="float" office:value="159.167560779385" calcext:value-type="float">
            <text:p>159.167560779385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7-01" calcext:value-type="date">
            <text:p>2026-07-01</text:p>
          </table:table-cell>
          <table:table-cell table:number-columns-repeated="2"/>
          <table:table-cell table:formula="of:=COM.MICROSOFT.FORECAST.ETS([.A759];[.$B$2:.$B$733];[.$A$2:.$A$733];1;1; )" office:value-type="float" office:value="148.557730160399" calcext:value-type="float">
            <text:p>148.557730160399</text:p>
          </table:table-cell>
          <table:table-cell table:formula="of:=COM.MICROSOFT.FORECAST.ETS.CONFINT([.A759];[.$B$2:.$B$733];[.$A$2:.$A$733];0.95;1;1;1)" office:value-type="float" office:value="10.4428919007102" calcext:value-type="float">
            <text:p>10.4428919007102</text:p>
          </table:table-cell>
          <table:table-cell table:formula="of:=[.D759]-[.E759]" office:value-type="float" office:value="138.114838259689" calcext:value-type="float">
            <text:p>138.114838259689</text:p>
          </table:table-cell>
          <table:table-cell table:formula="of:=[.D759]+[.E759]" office:value-type="float" office:value="159.00062206111" calcext:value-type="float">
            <text:p>159.00062206111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7-02" calcext:value-type="date">
            <text:p>2026-07-02</text:p>
          </table:table-cell>
          <table:table-cell table:number-columns-repeated="2"/>
          <table:table-cell table:formula="of:=COM.MICROSOFT.FORECAST.ETS([.A760];[.$B$2:.$B$733];[.$A$2:.$A$733];1;1; )" office:value-type="float" office:value="146.682518919464" calcext:value-type="float">
            <text:p>146.682518919464</text:p>
          </table:table-cell>
          <table:table-cell table:formula="of:=COM.MICROSOFT.FORECAST.ETS.CONFINT([.A760];[.$B$2:.$B$733];[.$A$2:.$A$733];0.95;1;1;1)" office:value-type="float" office:value="10.1042992122784" calcext:value-type="float">
            <text:p>10.1042992122784</text:p>
          </table:table-cell>
          <table:table-cell table:formula="of:=[.D760]-[.E760]" office:value-type="float" office:value="136.578219707185" calcext:value-type="float">
            <text:p>136.578219707185</text:p>
          </table:table-cell>
          <table:table-cell table:formula="of:=[.D760]+[.E760]" office:value-type="float" office:value="156.786818131742" calcext:value-type="float">
            <text:p>156.786818131742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7-03" calcext:value-type="date">
            <text:p>2026-07-03</text:p>
          </table:table-cell>
          <table:table-cell table:number-columns-repeated="2"/>
          <table:table-cell table:formula="of:=COM.MICROSOFT.FORECAST.ETS([.A761];[.$B$2:.$B$733];[.$A$2:.$A$733];1;1; )" office:value-type="float" office:value="144.906183773236" calcext:value-type="float">
            <text:p>144.906183773236</text:p>
          </table:table-cell>
          <table:table-cell table:formula="of:=COM.MICROSOFT.FORECAST.ETS.CONFINT([.A761];[.$B$2:.$B$733];[.$A$2:.$A$733];0.95;1;1;1)" office:value-type="float" office:value="10.7243993385055" calcext:value-type="float">
            <text:p>10.7243993385055</text:p>
          </table:table-cell>
          <table:table-cell table:formula="of:=[.D761]-[.E761]" office:value-type="float" office:value="134.18178443473" calcext:value-type="float">
            <text:p>134.18178443473</text:p>
          </table:table-cell>
          <table:table-cell table:formula="of:=[.D761]+[.E761]" office:value-type="float" office:value="155.630583111741" calcext:value-type="float">
            <text:p>155.630583111741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7-04" calcext:value-type="date">
            <text:p>2026-07-04</text:p>
          </table:table-cell>
          <table:table-cell table:number-columns-repeated="2"/>
          <table:table-cell table:formula="of:=COM.MICROSOFT.FORECAST.ETS([.A762];[.$B$2:.$B$733];[.$A$2:.$A$733];1;1; )" office:value-type="float" office:value="145.205600958761" calcext:value-type="float">
            <text:p>145.205600958761</text:p>
          </table:table-cell>
          <table:table-cell table:formula="of:=COM.MICROSOFT.FORECAST.ETS.CONFINT([.A762];[.$B$2:.$B$733];[.$A$2:.$A$733];0.95;1;1;1)" office:value-type="float" office:value="10.1705789837105" calcext:value-type="float">
            <text:p>10.1705789837105</text:p>
          </table:table-cell>
          <table:table-cell table:formula="of:=[.D762]-[.E762]" office:value-type="float" office:value="135.035021975051" calcext:value-type="float">
            <text:p>135.035021975051</text:p>
          </table:table-cell>
          <table:table-cell table:formula="of:=[.D762]+[.E762]" office:value-type="float" office:value="155.376179942472" calcext:value-type="float">
            <text:p>155.376179942472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  <table:table-row table:style-name="ro1">
          <table:table-cell office:value-type="date" office:date-value="2026-07-05" calcext:value-type="date">
            <text:p>2026-07-05</text:p>
          </table:table-cell>
          <table:table-cell table:number-columns-repeated="2"/>
          <table:table-cell table:formula="of:=COM.MICROSOFT.FORECAST.ETS([.A763];[.$B$2:.$B$733];[.$A$2:.$A$733];1;1; )" office:value-type="float" office:value="145.200866022735" calcext:value-type="float">
            <text:p>145.200866022735</text:p>
          </table:table-cell>
          <table:table-cell table:formula="of:=COM.MICROSOFT.FORECAST.ETS.CONFINT([.A763];[.$B$2:.$B$733];[.$A$2:.$A$733];0.95;1;1;1)" office:value-type="float" office:value="10.7188367889078" calcext:value-type="float">
            <text:p>10.7188367889078</text:p>
          </table:table-cell>
          <table:table-cell table:formula="of:=[.D763]-[.E763]" office:value-type="float" office:value="134.482029233827" calcext:value-type="float">
            <text:p>134.482029233827</text:p>
          </table:table-cell>
          <table:table-cell table:formula="of:=[.D763]+[.E763]" office:value-type="float" office:value="155.919702811643" calcext:value-type="float">
            <text:p>155.919702811643</text:p>
          </table:table-cell>
          <table:table-cell table:formula="of:=IF(AND(INDIRECT(&quot;B&quot;&amp;ROW())&lt;&gt;&quot;&quot;;ROW()-1&gt;=21);AVERAGE(INDIRECT(&quot;B&quot;&amp;(ROW()-20)&amp;&quot;:B&quot;&amp;ROW()));&quot;&quot;)"/>
          <table:table-cell table:formula="of:=IF(AND(INDIRECT(&quot;B&quot;&amp;ROW())&lt;&gt;&quot;&quot;;ROW()-1&gt;=50);AVERAGE(INDIRECT(&quot;B&quot;&amp;(ROW()-49)&amp;&quot;:B&quot;&amp;ROW()));&quot;&quot;)"/>
          <table:table-cell table:formula="of:=IF(AND(INDIRECT(&quot;B&quot;&amp;ROW())&lt;&gt;&quot;&quot;;ROW()-1&gt;=100);AVERAGE(INDIRECT(&quot;B&quot;&amp;(ROW()-99)&amp;&quot;:B&quot;&amp;ROW()));&quot;&quot;)"/>
          <table:table-cell table:formula="of:=IF(INDIRECT(&quot;B&quot;&amp;ROW())&lt;&gt;&quot;&quot;;SUMPRODUCT(INDIRECT(&quot;B2:B&quot;&amp;ROW());INDIRECT(&quot;C2:C&quot;&amp;ROW()))/SUM(INDIRECT(&quot;C2:C&quot;&amp;ROW()));&quot;&quot;)"/>
          <table:table-cell table:formula="of:=IF(INDIRECT(&quot;B&quot;&amp;ROW())&lt;&gt;&quot;&quot;;INDIRECT(&quot;K&quot;&amp;ROW())+2*SQRT(SUMPRODUCT(INDIRECT(&quot;C2:C&quot;&amp;ROW());(INDIRECT(&quot;B2:B&quot;&amp;ROW())-INDIRECT(&quot;K&quot;&amp;ROW()))^2)/SUM(INDIRECT(&quot;C2:C&quot;&amp;ROW())));&quot;&quot;)"/>
          <table:table-cell table:formula="of:=IF(INDIRECT(&quot;B&quot;&amp;ROW())&lt;&gt;&quot;&quot;;INDIRECT(&quot;K&quot;&amp;ROW())-2*SQRT(SUMPRODUCT(INDIRECT(&quot;C2:C&quot;&amp;ROW());(INDIRECT(&quot;B2:B&quot;&amp;ROW())-INDIRECT(&quot;K&quot;&amp;ROW()))^2)/SUM(INDIRECT(&quot;C2:C&quot;&amp;ROW())));&quot;&quot;)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3:57:41.677744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6-08T14:02:01.238828066</dc:date>
    <meta:editing-duration>PT20M55S</meta:editing-duration>
    <meta:editing-cycles>4</meta:editing-cycles>
    <meta:document-statistic meta:table-count="1" meta:cell-count="235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49">
      <style:chart-properties chart:display-label="true" chart:logarithmic="false" chart:minimum="46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84cm" svg:height="11.98cm" xlink:href=".." xlink:type="simple" chart:class="chart:line" chart:style-name="ch1">
        <chart:legend chart:legend-position="bottom" svg:x="3.549cm" svg:y="11.381cm" style:legend-expansion="wide" chart:style-name="ch2"/>
        <chart:plot-area chart:style-name="ch3" svg:x="0.176cm" svg:y="0.451cm" svg:width="11.122cm" svg:height="10.719cm">
          <chart:coordinate-region svg:x="1.562cm" svg:y="0.651cm" svg:width="9.736cm" svg:height="8.746cm"/>
          <chart:axis chart:dimension="x" chart:name="primary-x" chart:style-name="ch4" chartooo:axis-type="date">
            <chartooo:date-scale/>
            <chart:categories table:cell-range-address="xom_us_d.A2:xom_us_d.A7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om_us_d.B2:xom_us_d.B763" chart:label-cell-address="xom_us_d.B1:xom_us_d.B1" chart:class="chart:line">
            <chart:data-point chart:repeated="762"/>
          </chart:series>
          <chart:series chart:style-name="ch8" chart:values-cell-range-address="xom_us_d.D2:xom_us_d.D763" chart:label-cell-address="xom_us_d.D1:xom_us_d.D1" chart:class="chart:line">
            <chart:data-point chart:repeated="7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xom_us_d.B1:xom_us_d.B1</svg:desc>
                </draw:g>
              </table:table-cell>
              <table:table-cell office:value-type="string">
                <text:p>Forecast</text:p>
                <draw:g>
                  <svg:desc>xom_us_d.D1:xom_us_d.D1</svg:desc>
                </draw:g>
              </table:table-cell>
            </table:table-row>
          </table:table-header-rows>
          <table:table-rows>
            <table:table-row>
              <table:table-cell office:value-type="float" office:value="45447">
                <text:p>45447</text:p>
                <draw:g>
                  <svg:desc>xom_us_d.A2:xom_us_d.A763</svg:desc>
                </draw:g>
              </table:table-cell>
              <table:table-cell office:value-type="float" office:value="112.67">
                <text:p>112.67</text:p>
                <draw:g>
                  <svg:desc>xom_us_d.B2:xom_us_d.B763</svg:desc>
                </draw:g>
              </table:table-cell>
              <table:table-cell office:value-type="float" office:value="NaN">
                <text:p>NaN</text:p>
                <draw:g>
                  <svg:desc>xom_us_d.D2:xom_us_d.D763</svg:desc>
                </draw:g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13.12">
                <text:p>11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13.97">
                <text:p>113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3.08">
                <text:p>113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12.17">
                <text:p>11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10.93">
                <text:p>11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10.04">
                <text:p>11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05">
                <text:p>11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14.37">
                <text:p>11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14.41">
                <text:p>11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14.9">
                <text:p>11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96">
                <text:p>11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18">
                <text:p>11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10.94">
                <text:p>11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13.25">
                <text:p>11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5.21">
                <text:p>115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16.04">
                <text:p>11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17.64">
                <text:p>117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18.8">
                <text:p>11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3.41">
                <text:p>11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7.43">
                <text:p>11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6.1">
                <text:p>11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18.59">
                <text:p>11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16.95">
                <text:p>11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4.16">
                <text:p>114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15.68">
                <text:p>11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17.86">
                <text:p>11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18.95">
                <text:p>11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18.73">
                <text:p>11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8.53">
                <text:p>11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13.85">
                <text:p>11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14.73">
                <text:p>114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8.81">
                <text:p>11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16.52">
                <text:p>116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18.13">
                <text:p>11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15.47">
                <text:p>115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14.06">
                <text:p>114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13.17">
                <text:p>11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10.82">
                <text:p>11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11.23">
                <text:p>11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7.36">
                <text:p>11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17.05">
                <text:p>117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12.8">
                <text:p>1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19.93">
                <text:p>11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21.52">
                <text:p>12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2.58">
                <text:p>122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5.37">
                <text:p>12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22.04">
                <text:p>12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22.09">
                <text:p>12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23.14">
                <text:p>12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4.08">
                <text:p>12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20.66">
                <text:p>12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8">
                <text:p>12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0.7">
                <text:p>12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0.27">
                <text:p>12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19.59">
                <text:p>11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8.9">
                <text:p>11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17.28">
                <text:p>11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.78">
                <text:p>11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18.61">
                <text:p>11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8.96">
                <text:p>11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21.15">
                <text:p>12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7">
                <text:p>12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21.47">
                <text:p>12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31">
                <text:p>12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18.63">
                <text:p>11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20.32">
                <text:p>12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21.93">
                <text:p>12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9.97">
                <text:p>11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17.97">
                <text:p>117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7.85">
                <text:p>11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17.67">
                <text:p>11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14.28">
                <text:p>114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14.78">
                <text:p>114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12.67">
                <text:p>1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11.82">
                <text:p>111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8.47">
                <text:p>10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08.01">
                <text:p>10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06.42">
                <text:p>106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05.51">
                <text:p>105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3">
                <text:p>10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5.76">
                <text:p>10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74">
                <text:p>10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08.75">
                <text:p>10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9.29">
                <text:p>10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11.51">
                <text:p>11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11.32">
                <text:p>11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11.47">
                <text:p>11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09.53">
                <text:p>10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10.17">
                <text:p>11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08.04">
                <text:p>10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09.57">
                <text:p>10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7.09">
                <text:p>10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09.96">
                <text:p>10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09.88">
                <text:p>109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08.43">
                <text:p>10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10.97">
                <text:p>11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11.67">
                <text:p>111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7.35">
                <text:p>10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08.13">
                <text:p>10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10.14">
                <text:p>11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10.3">
                <text:p>1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1.27">
                <text:p>11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76">
                <text:p>10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07.54">
                <text:p>107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05.44">
                <text:p>10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07.62">
                <text:p>107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09.13">
                <text:p>10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3.64">
                <text:p>11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15.41">
                <text:p>115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15.9">
                <text:p>11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5.8">
                <text:p>11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16.59">
                <text:p>11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18.27">
                <text:p>11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8.93">
                <text:p>11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19.04">
                <text:p>11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18.67">
                <text:p>11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12.43">
                <text:p>11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94">
                <text:p>10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00.77">
                <text:p>10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05.8">
                <text:p>10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99.93">
                <text:p>9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3.39">
                <text:p>10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03.1">
                <text:p>10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04.19">
                <text:p>10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5.35">
                <text:p>10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08.3">
                <text:p>10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05.63">
                <text:p>105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05.78">
                <text:p>105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3.27">
                <text:p>10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04.71">
                <text:p>10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04.61">
                <text:p>10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06.07">
                <text:p>10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08.48">
                <text:p>10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08.58">
                <text:p>10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6.47">
                <text:p>106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04.95">
                <text:p>10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03.66">
                <text:p>10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02.97">
                <text:p>10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03.52">
                <text:p>10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02.11">
                <text:p>102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02.69">
                <text:p>10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03.8">
                <text:p>10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01.83">
                <text:p>10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4.97">
                <text:p>10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07.22">
                <text:p>10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09.31">
                <text:p>10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2.48">
                <text:p>11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08.34">
                <text:p>10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08.37">
                <text:p>10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09.99">
                <text:p>109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09.24">
                <text:p>10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11.05">
                <text:p>11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1.11">
                <text:p>11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14.19">
                <text:p>11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13.8">
                <text:p>1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14.93">
                <text:p>114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3.92">
                <text:p>11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12.23">
                <text:p>112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11.66">
                <text:p>111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8.05">
                <text:p>10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08.54">
                <text:p>10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09.93">
                <text:p>10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10.79">
                <text:p>11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44">
                <text:p>11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12.88">
                <text:p>11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11.64">
                <text:p>1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07.24">
                <text:p>107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06.51">
                <text:p>106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05.95">
                <text:p>105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5.83">
                <text:p>105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06.13">
                <text:p>10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07.6">
                <text:p>10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07.38">
                <text:p>107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6.72">
                <text:p>10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07.42">
                <text:p>10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08.53">
                <text:p>10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11.49">
                <text:p>11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13.35">
                <text:p>11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11.91">
                <text:p>11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12.4">
                <text:p>1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6">
                <text:p>45906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7">
                <text:p>45907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09.85">
                <text:p>109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10.65">
                <text:p>11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12.14">
                <text:p>11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3">
                <text:p>45913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4">
                <text:p>45914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2.35">
                <text:p>11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15.29">
                <text:p>115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13.93">
                <text:p>113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1">
                <text:p>45921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2.02">
                <text:p>11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13.95">
                <text:p>11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14.56">
                <text:p>11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15.59">
                <text:p>115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7">
                <text:p>45927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8">
                <text:p>4592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4.22">
                <text:p>11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11.99">
                <text:p>111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11.29">
                <text:p>111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4.2">
                <text:p>11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14.26">
                <text:p>114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14.02">
                <text:p>11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12.29">
                <text:p>112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11.61">
                <text:p>11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10.64">
                <text:p>11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2.7">
                <text:p>1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14.71">
                <text:p>11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94">
                <text:p>115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15.03">
                <text:p>1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16.45">
                <text:p>11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14.14">
                <text:p>11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13.68">
                <text:p>11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22">
                <text:p>118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19.78">
                <text:p>11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18.12">
                <text:p>118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8.79">
                <text:p>11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19.03">
                <text:p>119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17.35">
                <text:p>11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7.02">
                <text:p>11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97">
                <text:p>11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14.51">
                <text:p>114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3">
                <text:p>116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5.38">
                <text:p>11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7.8">
                <text:p>11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17.14">
                <text:p>11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18.25">
                <text:p>11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7.76">
                <text:p>11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17.41">
                <text:p>11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15">
                <text:p>11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19.42">
                <text:p>11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0.53">
                <text:p>12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20.99">
                <text:p>12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5.36">
                <text:p>12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21.05">
                <text:p>12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18.49">
                <text:p>11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22.91">
                <text:p>12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4.03">
                <text:p>124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26.54">
                <text:p>12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30.2">
                <text:p>13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9.13">
                <text:p>12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30.46">
                <text:p>13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33.61">
                <text:p>13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33.64">
                <text:p>13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34.84">
                <text:p>134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36.83">
                <text:p>13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37.58">
                <text:p>13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140.51">
                <text:p>14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38.4">
                <text:p>13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143.73">
                <text:p>14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147.59">
                <text:p>14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146.08">
                <text:p>14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151.59">
                <text:p>151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149.93">
                <text:p>14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146.19">
                <text:p>146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150.68">
                <text:p>15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150.97">
                <text:p>15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149.26">
                <text:p>149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149.06">
                <text:p>14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148.54">
                <text:p>14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154.22">
                <text:p>15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4">
                <text:p>46084</text:p>
              </table:table-cell>
              <table:table-cell office:value-type="float" office:value="151.83">
                <text:p>15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5">
                <text:p>46085</text:p>
              </table:table-cell>
              <table:table-cell office:value-type="float" office:value="149.82">
                <text:p>149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6">
                <text:p>4608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7">
                <text:p>46087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8">
                <text:p>46088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9">
                <text:p>46089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150.44">
                <text:p>15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1">
                <text:p>46091</text:p>
              </table:table-cell>
              <table:table-cell office:value-type="float" office:value="148.13">
                <text:p>14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2">
                <text:p>46092</text:p>
              </table:table-cell>
              <table:table-cell office:value-type="float" office:value="151.58">
                <text:p>15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3">
                <text:p>46093</text:p>
              </table:table-cell>
              <table:table-cell office:value-type="float" office:value="153.53">
                <text:p>15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4">
                <text:p>46094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5">
                <text:p>46095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6">
                <text:p>46096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157.23">
                <text:p>15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8">
                <text:p>46098</text:p>
              </table:table-cell>
              <table:table-cell office:value-type="float" office:value="158.81">
                <text:p>15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9">
                <text:p>46099</text:p>
              </table:table-cell>
              <table:table-cell office:value-type="float" office:value="157.59">
                <text:p>15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58.16">
                <text:p>15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2">
                <text:p>46102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3">
                <text:p>46103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161.13">
                <text:p>16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5">
                <text:p>46105</text:p>
              </table:table-cell>
              <table:table-cell office:value-type="float" office:value="165.38">
                <text:p>16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6">
                <text:p>46106</text:p>
              </table:table-cell>
              <table:table-cell office:value-type="float" office:value="163.26">
                <text:p>16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7">
                <text:p>46107</text:p>
              </table:table-cell>
              <table:table-cell office:value-type="float" office:value="165.43">
                <text:p>16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8">
                <text:p>46108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9">
                <text:p>46109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169.66">
                <text:p>169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160.78">
                <text:p>16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4">
                <text:p>46114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5">
                <text:p>46115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6">
                <text:p>46116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7">
                <text:p>46117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163.37">
                <text:p>16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9">
                <text:p>46119</text:p>
              </table:table-cell>
              <table:table-cell office:value-type="float" office:value="163.91">
                <text:p>163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156.22">
                <text:p>15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1">
                <text:p>46121</text:p>
              </table:table-cell>
              <table:table-cell office:value-type="float" office:value="155.04">
                <text:p>15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2">
                <text:p>46122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3">
                <text:p>46123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4">
                <text:p>46124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5">
                <text:p>46125</text:p>
              </table:table-cell>
              <table:table-cell office:value-type="float" office:value="152.64">
                <text:p>15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6">
                <text:p>46126</text:p>
              </table:table-cell>
              <table:table-cell office:value-type="float" office:value="149.24">
                <text:p>14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7">
                <text:p>46127</text:p>
              </table:table-cell>
              <table:table-cell office:value-type="float" office:value="149.01">
                <text:p>14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8">
                <text:p>46128</text:p>
              </table:table-cell>
              <table:table-cell office:value-type="float" office:value="151.98">
                <text:p>15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9">
                <text:p>46129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1">
                <text:p>46131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2">
                <text:p>46132</text:p>
              </table:table-cell>
              <table:table-cell office:value-type="float" office:value="147.68">
                <text:p>14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3">
                <text:p>46133</text:p>
              </table:table-cell>
              <table:table-cell office:value-type="float" office:value="148.36">
                <text:p>14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4">
                <text:p>46134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150.53">
                <text:p>15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7">
                <text:p>46137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8">
                <text:p>46138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9">
                <text:p>46139</text:p>
              </table:table-cell>
              <table:table-cell office:value-type="float" office:value="148.19">
                <text:p>14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150.56">
                <text:p>15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1">
                <text:p>46141</text:p>
              </table:table-cell>
              <table:table-cell office:value-type="float" office:value="154.67">
                <text:p>154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154.33">
                <text:p>154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5">
                <text:p>46145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153.69">
                <text:p>1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7">
                <text:p>46147</text:p>
              </table:table-cell>
              <table:table-cell office:value-type="float" office:value="154.88">
                <text:p>15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8">
                <text:p>46148</text:p>
              </table:table-cell>
              <table:table-cell office:value-type="float" office:value="148.69">
                <text:p>14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9">
                <text:p>46149</text:p>
              </table:table-cell>
              <table:table-cell office:value-type="float" office:value="146.58">
                <text:p>146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1">
                <text:p>46151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2">
                <text:p>46152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3">
                <text:p>46153</text:p>
              </table:table-cell>
              <table:table-cell office:value-type="float" office:value="149.68">
                <text:p>14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4">
                <text:p>46154</text:p>
              </table:table-cell>
              <table:table-cell office:value-type="float" office:value="150.63">
                <text:p>15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5">
                <text:p>46155</text:p>
              </table:table-cell>
              <table:table-cell office:value-type="float" office:value="151.57">
                <text:p>151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152.78">
                <text:p>152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7">
                <text:p>46157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8">
                <text:p>46158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9">
                <text:p>46159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160.49">
                <text:p>16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1">
                <text:p>46161</text:p>
              </table:table-cell>
              <table:table-cell office:value-type="float" office:value="162.55">
                <text:p>16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156.28">
                <text:p>15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3">
                <text:p>46163</text:p>
              </table:table-cell>
              <table:table-cell office:value-type="float" office:value="155.29">
                <text:p>155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4">
                <text:p>46164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5">
                <text:p>46165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6">
                <text:p>46166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7">
                <text:p>46167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8">
                <text:p>46168</text:p>
              </table:table-cell>
              <table:table-cell office:value-type="float" office:value="149.81">
                <text:p>14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9">
                <text:p>46169</text:p>
              </table:table-cell>
              <table:table-cell office:value-type="float" office:value="147.9">
                <text:p>14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146.96">
                <text:p>14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1">
                <text:p>46171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2">
                <text:p>46172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149.38">
                <text:p>14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5">
                <text:p>46175</text:p>
              </table:table-cell>
              <table:table-cell office:value-type="float" office:value="149.56">
                <text:p>14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6">
                <text:p>46176</text:p>
              </table:table-cell>
              <table:table-cell office:value-type="float" office:value="152.53">
                <text:p>152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7">
                <text:p>46177</text:p>
              </table:table-cell>
              <table:table-cell office:value-type="float" office:value="152.04">
                <text:p>15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8">
                <text:p>46178</text:p>
              </table:table-cell>
              <table:table-cell office:value-type="float" office:value="149.92">
                <text:p>149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9">
                <text:p>46179</text:p>
              </table:table-cell>
              <table:table-cell office:value-type="float" office:value="NaN">
                <text:p>NaN</text:p>
              </table:table-cell>
              <table:table-cell office:value-type="float" office:value="151.07960572187">
                <text:p>151.07960572187</text:p>
              </table:table-cell>
            </table:table-row>
            <table:table-row>
              <table:table-cell office:value-type="float" office:value="46180">
                <text:p>46180</text:p>
              </table:table-cell>
              <table:table-cell office:value-type="float" office:value="NaN">
                <text:p>NaN</text:p>
              </table:table-cell>
              <table:table-cell office:value-type="float" office:value="151.286641735536">
                <text:p>151.286641735536</text:p>
              </table:table-cell>
            </table:table-row>
            <table:table-row>
              <table:table-cell office:value-type="float" office:value="46181">
                <text:p>46181</text:p>
              </table:table-cell>
              <table:table-cell office:value-type="float" office:value="NaN">
                <text:p>NaN</text:p>
              </table:table-cell>
              <table:table-cell office:value-type="float" office:value="151.135298874844">
                <text:p>151.135298874844</text:p>
              </table:table-cell>
            </table:table-row>
            <table:table-row>
              <table:table-cell office:value-type="float" office:value="46182">
                <text:p>46182</text:p>
              </table:table-cell>
              <table:table-cell office:value-type="float" office:value="NaN">
                <text:p>NaN</text:p>
              </table:table-cell>
              <table:table-cell office:value-type="float" office:value="151.616065324221">
                <text:p>151.616065324221</text:p>
              </table:table-cell>
            </table:table-row>
            <table:table-row>
              <table:table-cell office:value-type="float" office:value="46183">
                <text:p>46183</text:p>
              </table:table-cell>
              <table:table-cell office:value-type="float" office:value="NaN">
                <text:p>NaN</text:p>
              </table:table-cell>
              <table:table-cell office:value-type="float" office:value="151.522337992827">
                <text:p>151.522337992827</text:p>
              </table:table-cell>
            </table:table-row>
            <table:table-row>
              <table:table-cell office:value-type="float" office:value="46184">
                <text:p>46184</text:p>
              </table:table-cell>
              <table:table-cell office:value-type="float" office:value="NaN">
                <text:p>NaN</text:p>
              </table:table-cell>
              <table:table-cell office:value-type="float" office:value="151.786866797687">
                <text:p>151.786866797687</text:p>
              </table:table-cell>
            </table:table-row>
            <table:table-row>
              <table:table-cell office:value-type="float" office:value="46185">
                <text:p>46185</text:p>
              </table:table-cell>
              <table:table-cell office:value-type="float" office:value="NaN">
                <text:p>NaN</text:p>
              </table:table-cell>
              <table:table-cell office:value-type="float" office:value="151.235655751591">
                <text:p>151.235655751591</text:p>
              </table:table-cell>
            </table:table-row>
            <table:table-row>
              <table:table-cell office:value-type="float" office:value="46186">
                <text:p>46186</text:p>
              </table:table-cell>
              <table:table-cell office:value-type="float" office:value="NaN">
                <text:p>NaN</text:p>
              </table:table-cell>
              <table:table-cell office:value-type="float" office:value="150.875400032059">
                <text:p>150.875400032059</text:p>
              </table:table-cell>
            </table:table-row>
            <table:table-row>
              <table:table-cell office:value-type="float" office:value="46187">
                <text:p>46187</text:p>
              </table:table-cell>
              <table:table-cell office:value-type="float" office:value="NaN">
                <text:p>NaN</text:p>
              </table:table-cell>
              <table:table-cell office:value-type="float" office:value="150.750526556474">
                <text:p>150.750526556474</text:p>
              </table:table-cell>
            </table:table-row>
            <table:table-row>
              <table:table-cell office:value-type="float" office:value="46188">
                <text:p>46188</text:p>
              </table:table-cell>
              <table:table-cell office:value-type="float" office:value="NaN">
                <text:p>NaN</text:p>
              </table:table-cell>
              <table:table-cell office:value-type="float" office:value="150.431354631312">
                <text:p>150.431354631312</text:p>
              </table:table-cell>
            </table:table-row>
            <table:table-row>
              <table:table-cell office:value-type="float" office:value="46189">
                <text:p>46189</text:p>
              </table:table-cell>
              <table:table-cell office:value-type="float" office:value="NaN">
                <text:p>NaN</text:p>
              </table:table-cell>
              <table:table-cell office:value-type="float" office:value="150.336447329176">
                <text:p>150.336447329176</text:p>
              </table:table-cell>
            </table:table-row>
            <table:table-row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148.427007640733">
                <text:p>148.427007640733</text:p>
              </table:table-cell>
            </table:table-row>
            <table:table-row>
              <table:table-cell office:value-type="float" office:value="46191">
                <text:p>46191</text:p>
              </table:table-cell>
              <table:table-cell office:value-type="float" office:value="NaN">
                <text:p>NaN</text:p>
              </table:table-cell>
              <table:table-cell office:value-type="float" office:value="147.223214697359">
                <text:p>147.223214697359</text:p>
              </table:table-cell>
            </table:table-row>
            <table:table-row>
              <table:table-cell office:value-type="float" office:value="46192">
                <text:p>46192</text:p>
              </table:table-cell>
              <table:table-cell office:value-type="float" office:value="NaN">
                <text:p>NaN</text:p>
              </table:table-cell>
              <table:table-cell office:value-type="float" office:value="148.715095475192">
                <text:p>148.715095475192</text:p>
              </table:table-cell>
            </table:table-row>
            <table:table-row>
              <table:table-cell office:value-type="float" office:value="46193">
                <text:p>46193</text:p>
              </table:table-cell>
              <table:table-cell office:value-type="float" office:value="NaN">
                <text:p>NaN</text:p>
              </table:table-cell>
              <table:table-cell office:value-type="float" office:value="148.690122053562">
                <text:p>148.690122053562</text:p>
              </table:table-cell>
            </table:table-row>
            <table:table-row>
              <table:table-cell office:value-type="float" office:value="46194">
                <text:p>46194</text:p>
              </table:table-cell>
              <table:table-cell office:value-type="float" office:value="NaN">
                <text:p>NaN</text:p>
              </table:table-cell>
              <table:table-cell office:value-type="float" office:value="148.782771734584">
                <text:p>148.782771734584</text:p>
              </table:table-cell>
            </table:table-row>
            <table:table-row>
              <table:table-cell office:value-type="float" office:value="46195">
                <text:p>46195</text:p>
              </table:table-cell>
              <table:table-cell office:value-type="float" office:value="NaN">
                <text:p>NaN</text:p>
              </table:table-cell>
              <table:table-cell office:value-type="float" office:value="149.782633018968">
                <text:p>149.782633018968</text:p>
              </table:table-cell>
            </table:table-row>
            <table:table-row>
              <table:table-cell office:value-type="float" office:value="46196">
                <text:p>46196</text:p>
              </table:table-cell>
              <table:table-cell office:value-type="float" office:value="NaN">
                <text:p>NaN</text:p>
              </table:table-cell>
              <table:table-cell office:value-type="float" office:value="149.90899994422">
                <text:p>149.90899994422</text:p>
              </table:table-cell>
            </table:table-row>
            <table:table-row>
              <table:table-cell office:value-type="float" office:value="46197">
                <text:p>46197</text:p>
              </table:table-cell>
              <table:table-cell office:value-type="float" office:value="NaN">
                <text:p>NaN</text:p>
              </table:table-cell>
              <table:table-cell office:value-type="float" office:value="149.789924290642">
                <text:p>149.789924290642</text:p>
              </table:table-cell>
            </table:table-row>
            <table:table-row>
              <table:table-cell office:value-type="float" office:value="46198">
                <text:p>46198</text:p>
              </table:table-cell>
              <table:table-cell office:value-type="float" office:value="NaN">
                <text:p>NaN</text:p>
              </table:table-cell>
              <table:table-cell office:value-type="float" office:value="148.842836066184">
                <text:p>148.842836066184</text:p>
              </table:table-cell>
            </table:table-row>
            <table:table-row>
              <table:table-cell office:value-type="float" office:value="46199">
                <text:p>46199</text:p>
              </table:table-cell>
              <table:table-cell office:value-type="float" office:value="NaN">
                <text:p>NaN</text:p>
              </table:table-cell>
              <table:table-cell office:value-type="float" office:value="150.044601646452">
                <text:p>150.044601646452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NaN">
                <text:p>NaN</text:p>
              </table:table-cell>
              <table:table-cell office:value-type="float" office:value="150.389248410652">
                <text:p>150.389248410652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NaN">
                <text:p>NaN</text:p>
              </table:table-cell>
              <table:table-cell office:value-type="float" office:value="150.447164033703">
                <text:p>150.447164033703</text:p>
              </table:table-cell>
            </table:table-row>
            <table:table-row>
              <table:table-cell office:value-type="float" office:value="46202">
                <text:p>46202</text:p>
              </table:table-cell>
              <table:table-cell office:value-type="float" office:value="NaN">
                <text:p>NaN</text:p>
              </table:table-cell>
              <table:table-cell office:value-type="float" office:value="150.851838602774">
                <text:p>150.851838602774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NaN">
                <text:p>NaN</text:p>
              </table:table-cell>
              <table:table-cell office:value-type="float" office:value="149.202542946947">
                <text:p>149.202542946947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NaN">
                <text:p>NaN</text:p>
              </table:table-cell>
              <table:table-cell office:value-type="float" office:value="148.557730160399">
                <text:p>148.557730160399</text:p>
              </table:table-cell>
            </table:table-row>
            <table:table-row>
              <table:table-cell office:value-type="float" office:value="46205">
                <text:p>46205</text:p>
              </table:table-cell>
              <table:table-cell office:value-type="float" office:value="NaN">
                <text:p>NaN</text:p>
              </table:table-cell>
              <table:table-cell office:value-type="float" office:value="146.682518919464">
                <text:p>146.682518919464</text:p>
              </table:table-cell>
            </table:table-row>
            <table:table-row>
              <table:table-cell office:value-type="float" office:value="46206">
                <text:p>46206</text:p>
              </table:table-cell>
              <table:table-cell office:value-type="float" office:value="NaN">
                <text:p>NaN</text:p>
              </table:table-cell>
              <table:table-cell office:value-type="float" office:value="144.906183773236">
                <text:p>144.906183773236</text:p>
              </table:table-cell>
            </table:table-row>
            <table:table-row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145.205600958761">
                <text:p>145.205600958761</text:p>
              </table:table-cell>
            </table:table-row>
            <table:table-row>
              <table:table-cell office:value-type="float" office:value="46208">
                <text:p>46208</text:p>
              </table:table-cell>
              <table:table-cell office:value-type="float" office:value="NaN">
                <text:p>NaN</text:p>
              </table:table-cell>
              <table:table-cell office:value-type="float" office:value="145.200866022735">
                <text:p>145.200866022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6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41cm" svg:height="11.96cm" xlink:href=".." xlink:type="simple" chart:class="chart:line" chart:style-name="ch1">
        <chart:legend chart:legend-position="bottom" svg:x="2.256cm" svg:y="11.361cm" style:legend-expansion="wide" chart:style-name="ch2"/>
        <chart:plot-area chart:style-name="ch3" svg:x="0.262cm" svg:y="0.239cm" svg:width="12.617cm" svg:height="10.699cm">
          <chart:coordinate-region svg:x="1.648cm" svg:y="0.438cm" svg:width="11.231cm" svg:height="8.725cm"/>
          <chart:axis chart:dimension="x" chart:name="primary-x" chart:style-name="ch4" chartooo:axis-type="date">
            <chartooo:date-scale/>
            <chart:categories table:cell-range-address="xom_us_d.A2:xom_us_d.A7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om_us_d.B2:xom_us_d.B763" chart:label-cell-address="xom_us_d.B1:xom_us_d.B1" chart:class="chart:line">
            <chart:data-point chart:repeated="762"/>
          </chart:series>
          <chart:series chart:style-name="ch8" chart:values-cell-range-address="xom_us_d.D2:xom_us_d.D763" chart:label-cell-address="xom_us_d.D1:xom_us_d.D1" chart:class="chart:line">
            <chart:data-point chart:repeated="762"/>
          </chart:series>
          <chart:series chart:style-name="ch9" chart:values-cell-range-address="xom_us_d.F2:xom_us_d.F763" chart:label-cell-address="xom_us_d.F1:xom_us_d.F1" chart:class="chart:line">
            <chart:data-point chart:repeated="762"/>
          </chart:series>
          <chart:series chart:style-name="ch10" chart:values-cell-range-address="xom_us_d.G2:xom_us_d.G763" chart:label-cell-address="xom_us_d.G1:xom_us_d.G1" chart:class="chart:line">
            <chart:data-point chart:repeated="7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xom_us_d.B1:xom_us_d.B1</svg:desc>
                </draw:g>
              </table:table-cell>
              <table:table-cell office:value-type="string">
                <text:p>Forecast</text:p>
                <draw:g>
                  <svg:desc>xom_us_d.D1:xom_us_d.D1</svg:desc>
                </draw:g>
              </table:table-cell>
              <table:table-cell office:value-type="string">
                <text:p>Lower</text:p>
                <draw:g>
                  <svg:desc>xom_us_d.F1:xom_us_d.F1</svg:desc>
                </draw:g>
              </table:table-cell>
              <table:table-cell office:value-type="string">
                <text:p>Upper</text:p>
                <draw:g>
                  <svg:desc>xom_us_d.G1:xom_us_d.G1</svg:desc>
                </draw:g>
              </table:table-cell>
            </table:table-row>
          </table:table-header-rows>
          <table:table-rows>
            <table:table-row>
              <table:table-cell office:value-type="float" office:value="45447">
                <text:p>45447</text:p>
                <draw:g>
                  <svg:desc>xom_us_d.A2:xom_us_d.A763</svg:desc>
                </draw:g>
              </table:table-cell>
              <table:table-cell office:value-type="float" office:value="112.67">
                <text:p>112.67</text:p>
                <draw:g>
                  <svg:desc>xom_us_d.B2:xom_us_d.B763</svg:desc>
                </draw:g>
              </table:table-cell>
              <table:table-cell office:value-type="float" office:value="NaN">
                <text:p>NaN</text:p>
                <draw:g>
                  <svg:desc>xom_us_d.D2:xom_us_d.D763</svg:desc>
                </draw:g>
              </table:table-cell>
              <table:table-cell office:value-type="float" office:value="NaN">
                <text:p>NaN</text:p>
                <draw:g>
                  <svg:desc>xom_us_d.F2:xom_us_d.F763</svg:desc>
                </draw:g>
              </table:table-cell>
              <table:table-cell office:value-type="float" office:value="NaN">
                <text:p>NaN</text:p>
                <draw:g>
                  <svg:desc>xom_us_d.G2:xom_us_d.G763</svg:desc>
                </draw:g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13.12">
                <text:p>11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13.97">
                <text:p>11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3.08">
                <text:p>11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12.17">
                <text:p>11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10.93">
                <text:p>11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10.04">
                <text:p>11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09.11">
                <text:p>10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10.76">
                <text:p>11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05">
                <text:p>11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14.37">
                <text:p>11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14.41">
                <text:p>114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14.9">
                <text:p>1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15.12">
                <text:p>11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96">
                <text:p>11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13.37">
                <text:p>11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18">
                <text:p>11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10.94">
                <text:p>1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13.25">
                <text:p>11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13.27">
                <text:p>11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5.21">
                <text:p>115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16.04">
                <text:p>116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17.64">
                <text:p>11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18.8">
                <text:p>1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6.07">
                <text:p>11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3.41">
                <text:p>11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7.43">
                <text:p>11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17.33">
                <text:p>11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6.1">
                <text:p>1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18.59">
                <text:p>11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16.95">
                <text:p>11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116.88">
                <text:p>11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4.16">
                <text:p>11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15.68">
                <text:p>11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118.85">
                <text:p>1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17.86">
                <text:p>11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18.95">
                <text:p>11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18.73">
                <text:p>11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18.17">
                <text:p>11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8.53">
                <text:p>11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13.85">
                <text:p>11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14.73">
                <text:p>114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16.32">
                <text:p>11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8.81">
                <text:p>11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16.52">
                <text:p>116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18.13">
                <text:p>11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17.94">
                <text:p>1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15.47">
                <text:p>115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14.06">
                <text:p>11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13.17">
                <text:p>11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112.64">
                <text:p>1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5.01">
                <text:p>11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10.82">
                <text:p>11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11.23">
                <text:p>111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111.15">
                <text:p>1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14.18">
                <text:p>11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14.58">
                <text:p>11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115.27">
                <text:p>1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7.36">
                <text:p>11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17.05">
                <text:p>11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12.8">
                <text:p>1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115.82">
                <text:p>11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19.93">
                <text:p>11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21.52">
                <text:p>12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2.58">
                <text:p>122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124.83">
                <text:p>12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5.37">
                <text:p>12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22.04">
                <text:p>12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22.09">
                <text:p>122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23.14">
                <text:p>12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123.61">
                <text:p>12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4.08">
                <text:p>12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20.66">
                <text:p>12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20.01">
                <text:p>12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8">
                <text:p>12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0.7">
                <text:p>1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0.27">
                <text:p>12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19.59">
                <text:p>119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19.49">
                <text:p>11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8.9">
                <text:p>1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17.28">
                <text:p>11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.78">
                <text:p>11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14.95">
                <text:p>1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18.61">
                <text:p>11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8.96">
                <text:p>11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21.15">
                <text:p>1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121.11">
                <text:p>12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7">
                <text:p>12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20.35">
                <text:p>12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21.47">
                <text:p>12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119.31">
                <text:p>1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31">
                <text:p>12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18.63">
                <text:p>11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20.32">
                <text:p>12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21.93">
                <text:p>12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9.97">
                <text:p>11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17.97">
                <text:p>117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117.66">
                <text:p>11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7.85">
                <text:p>11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17.67">
                <text:p>11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14.28">
                <text:p>11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14.78">
                <text:p>11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113.57">
                <text:p>11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12.67">
                <text:p>11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11.92">
                <text:p>111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11.82">
                <text:p>11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110.84">
                <text:p>1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8.47">
                <text:p>10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08.01">
                <text:p>108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06.42">
                <text:p>10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05.51">
                <text:p>105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105.87">
                <text:p>10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3">
                <text:p>10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106.4">
                <text:p>1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106.48">
                <text:p>10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5.76">
                <text:p>10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107.57">
                <text:p>10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107.86">
                <text:p>10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74">
                <text:p>10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08.75">
                <text:p>10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106.93">
                <text:p>10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106.54">
                <text:p>10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9.29">
                <text:p>10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09.72">
                <text:p>10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11.51">
                <text:p>11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11.32">
                <text:p>11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12.32">
                <text:p>1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11.47">
                <text:p>11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09.53">
                <text:p>10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108.66">
                <text:p>108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10.17">
                <text:p>11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08.04">
                <text:p>10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09.57">
                <text:p>109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106.83">
                <text:p>10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7.09">
                <text:p>10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09.96">
                <text:p>109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09.88">
                <text:p>10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08.43">
                <text:p>108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10.97">
                <text:p>11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11.67">
                <text:p>11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7.35">
                <text:p>10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08.13">
                <text:p>10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08.24">
                <text:p>10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10.14">
                <text:p>11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10.3">
                <text:p>1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110.69">
                <text:p>1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1.27">
                <text:p>11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111.33">
                <text:p>11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76">
                <text:p>10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07.54">
                <text:p>107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05.44">
                <text:p>10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07.62">
                <text:p>10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09.13">
                <text:p>10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3.64">
                <text:p>11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15.41">
                <text:p>115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15.9">
                <text:p>11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5.8">
                <text:p>1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16.59">
                <text:p>116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18.27">
                <text:p>118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17.89">
                <text:p>117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117.73">
                <text:p>11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8.93">
                <text:p>11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19.04">
                <text:p>11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18.67">
                <text:p>11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12.43">
                <text:p>11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104.34">
                <text:p>10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94">
                <text:p>10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00.77">
                <text:p>10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05.8">
                <text:p>10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99.93">
                <text:p>9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103.14">
                <text:p>10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3.39">
                <text:p>10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03.1">
                <text:p>10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04.19">
                <text:p>10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106.92">
                <text:p>10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5.35">
                <text:p>105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08.3">
                <text:p>10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108.57">
                <text:p>10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8.63">
                <text:p>10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08.36">
                <text:p>10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05.63">
                <text:p>10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05.78">
                <text:p>10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106.21">
                <text:p>10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3.27">
                <text:p>10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04.71">
                <text:p>10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04.61">
                <text:p>10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06.07">
                <text:p>10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107.31">
                <text:p>1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9.16">
                <text:p>10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09.46">
                <text:p>10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08.48">
                <text:p>10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08.58">
                <text:p>108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108.19">
                <text:p>10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6.47">
                <text:p>10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04.95">
                <text:p>10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03.66">
                <text:p>10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02.97">
                <text:p>10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03.52">
                <text:p>10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02.11">
                <text:p>102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02.69">
                <text:p>10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03.8">
                <text:p>1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01.83">
                <text:p>10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104.27">
                <text:p>10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4.97">
                <text:p>10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07.22">
                <text:p>10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09.31">
                <text:p>10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09.73">
                <text:p>10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112.12">
                <text:p>11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2.48">
                <text:p>11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113.19">
                <text:p>11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08.34">
                <text:p>10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08.37">
                <text:p>10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09.99">
                <text:p>10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09.24">
                <text:p>10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11.05">
                <text:p>11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112.2">
                <text:p>1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1.11">
                <text:p>11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14.19">
                <text:p>11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13.8">
                <text:p>1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14.93">
                <text:p>11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115.43">
                <text:p>1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3.92">
                <text:p>11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12.23">
                <text:p>112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11.66">
                <text:p>11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107.77">
                <text:p>10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8.05">
                <text:p>10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08.54">
                <text:p>10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09.93">
                <text:p>10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10.79">
                <text:p>11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110.4">
                <text:p>1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44">
                <text:p>11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12.88">
                <text:p>11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11.9">
                <text:p>1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11.64">
                <text:p>111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109.64">
                <text:p>10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07.24">
                <text:p>10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06.51">
                <text:p>106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05.95">
                <text:p>10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106.8">
                <text:p>10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5.83">
                <text:p>105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06.13">
                <text:p>10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07.6">
                <text:p>10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07.38">
                <text:p>10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106.49">
                <text:p>10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6.72">
                <text:p>106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07.42">
                <text:p>10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08.53">
                <text:p>10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111.28">
                <text:p>11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1.74">
                <text:p>11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11.49">
                <text:p>111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13.35">
                <text:p>11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14.29">
                <text:p>1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11.91">
                <text:p>11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12.4">
                <text:p>1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6">
                <text:p>45906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7">
                <text:p>45907</text:p>
              </table:table-cell>
              <table:table-cell office:value-type="float" office:value="109.23">
                <text:p>10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09.85">
                <text:p>10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10.65">
                <text:p>11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12.14">
                <text:p>11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3">
                <text:p>45913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4">
                <text:p>45914</text:p>
              </table:table-cell>
              <table:table-cell office:value-type="float" office:value="112.16">
                <text:p>11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2.35">
                <text:p>11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15.29">
                <text:p>11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13.93">
                <text:p>11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1">
                <text:p>45921</text:p>
              </table:table-cell>
              <table:table-cell office:value-type="float" office:value="112.82">
                <text:p>11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2.02">
                <text:p>11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13.95">
                <text:p>11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14.56">
                <text:p>11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15.59">
                <text:p>115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7">
                <text:p>45927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8">
                <text:p>4592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4.22">
                <text:p>114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12.75">
                <text:p>1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11.99">
                <text:p>111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11.29">
                <text:p>11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113.26">
                <text:p>11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4.2">
                <text:p>1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14.26">
                <text:p>11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14.02">
                <text:p>11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12.91">
                <text:p>11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110.73">
                <text:p>1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12.29">
                <text:p>11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11.61">
                <text:p>11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10.64">
                <text:p>11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112.24">
                <text:p>1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2.7">
                <text:p>11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12.71">
                <text:p>11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14.71">
                <text:p>11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115.39">
                <text:p>1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94">
                <text:p>11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15.03">
                <text:p>11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16.45">
                <text:p>11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114.36">
                <text:p>11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3.76">
                <text:p>11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14.14">
                <text:p>114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13.68">
                <text:p>11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117.22">
                <text:p>1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22">
                <text:p>11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19.78">
                <text:p>11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18.12">
                <text:p>11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8.79">
                <text:p>118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119.29">
                <text:p>11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8">
                <text:p>11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19.03">
                <text:p>11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17.35">
                <text:p>11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7.02">
                <text:p>11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117.08">
                <text:p>11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97">
                <text:p>115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14.51">
                <text:p>114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114.77">
                <text:p>1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115.92">
                <text:p>11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3">
                <text:p>11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5.38">
                <text:p>11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7.8">
                <text:p>1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17.14">
                <text:p>11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5.98">
                <text:p>115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18.25">
                <text:p>1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19.54">
                <text:p>119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118.82">
                <text:p>11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7.76">
                <text:p>11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4.68">
                <text:p>11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17.41">
                <text:p>11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16.54">
                <text:p>1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116.69">
                <text:p>1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15">
                <text:p>11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19.42">
                <text:p>11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119.22">
                <text:p>119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119.11">
                <text:p>11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0.53">
                <text:p>12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20.99">
                <text:p>12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120.34">
                <text:p>12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122.65">
                <text:p>12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5.36">
                <text:p>125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21.05">
                <text:p>12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18.49">
                <text:p>11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22.91">
                <text:p>12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124.61">
                <text:p>124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4.03">
                <text:p>12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26.54">
                <text:p>1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30.2">
                <text:p>1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9.13">
                <text:p>12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29.89">
                <text:p>12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30.46">
                <text:p>13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33.61">
                <text:p>13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33.64">
                <text:p>13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134.97">
                <text:p>13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34.84">
                <text:p>13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36.83">
                <text:p>13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37.58">
                <text:p>13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140.51">
                <text:p>14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141.4">
                <text:p>1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38.4">
                <text:p>1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143.73">
                <text:p>14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147.59">
                <text:p>14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146.08">
                <text:p>14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149.05">
                <text:p>1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151.59">
                <text:p>151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149.93">
                <text:p>14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148.45">
                <text:p>14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146.19">
                <text:p>14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150.68">
                <text:p>15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150.97">
                <text:p>15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147.28">
                <text:p>14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149.26">
                <text:p>149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149.06">
                <text:p>1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148.54">
                <text:p>14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154.22">
                <text:p>154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4">
                <text:p>46084</text:p>
              </table:table-cell>
              <table:table-cell office:value-type="float" office:value="151.83">
                <text:p>15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5">
                <text:p>46085</text:p>
              </table:table-cell>
              <table:table-cell office:value-type="float" office:value="149.82">
                <text:p>14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6">
                <text:p>46086</text:p>
              </table:table-cell>
              <table:table-cell office:value-type="float" office:value="150.76">
                <text:p>15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7">
                <text:p>46087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8">
                <text:p>46088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9">
                <text:p>46089</text:p>
              </table:table-cell>
              <table:table-cell office:value-type="float" office:value="151.21">
                <text:p>15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150.44">
                <text:p>15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1">
                <text:p>46091</text:p>
              </table:table-cell>
              <table:table-cell office:value-type="float" office:value="148.13">
                <text:p>14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2">
                <text:p>46092</text:p>
              </table:table-cell>
              <table:table-cell office:value-type="float" office:value="151.58">
                <text:p>15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3">
                <text:p>46093</text:p>
              </table:table-cell>
              <table:table-cell office:value-type="float" office:value="153.53">
                <text:p>15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4">
                <text:p>46094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5">
                <text:p>46095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6">
                <text:p>46096</text:p>
              </table:table-cell>
              <table:table-cell office:value-type="float" office:value="156.12">
                <text:p>15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157.23">
                <text:p>157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8">
                <text:p>46098</text:p>
              </table:table-cell>
              <table:table-cell office:value-type="float" office:value="158.81">
                <text:p>15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9">
                <text:p>46099</text:p>
              </table:table-cell>
              <table:table-cell office:value-type="float" office:value="157.59">
                <text:p>15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58.16">
                <text:p>158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2">
                <text:p>46102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3">
                <text:p>46103</text:p>
              </table:table-cell>
              <table:table-cell office:value-type="float" office:value="159.67">
                <text:p>15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161.13">
                <text:p>1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5">
                <text:p>46105</text:p>
              </table:table-cell>
              <table:table-cell office:value-type="float" office:value="165.38">
                <text:p>16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6">
                <text:p>46106</text:p>
              </table:table-cell>
              <table:table-cell office:value-type="float" office:value="163.26">
                <text:p>16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7">
                <text:p>46107</text:p>
              </table:table-cell>
              <table:table-cell office:value-type="float" office:value="165.43">
                <text:p>16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8">
                <text:p>46108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9">
                <text:p>46109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170.99">
                <text:p>17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2">
                <text:p>46112</text:p>
              </table:table-cell>
              <table:table-cell office:value-type="float" office:value="169.66">
                <text:p>16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160.78">
                <text:p>16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4">
                <text:p>46114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5">
                <text:p>46115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6">
                <text:p>46116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7">
                <text:p>46117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163.37">
                <text:p>16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9">
                <text:p>46119</text:p>
              </table:table-cell>
              <table:table-cell office:value-type="float" office:value="163.91">
                <text:p>16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156.22">
                <text:p>15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1">
                <text:p>46121</text:p>
              </table:table-cell>
              <table:table-cell office:value-type="float" office:value="155.04">
                <text:p>155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2">
                <text:p>46122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3">
                <text:p>46123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4">
                <text:p>46124</text:p>
              </table:table-cell>
              <table:table-cell office:value-type="float" office:value="152.51">
                <text:p>15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5">
                <text:p>46125</text:p>
              </table:table-cell>
              <table:table-cell office:value-type="float" office:value="152.64">
                <text:p>15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6">
                <text:p>46126</text:p>
              </table:table-cell>
              <table:table-cell office:value-type="float" office:value="149.24">
                <text:p>14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7">
                <text:p>46127</text:p>
              </table:table-cell>
              <table:table-cell office:value-type="float" office:value="149.01">
                <text:p>1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8">
                <text:p>46128</text:p>
              </table:table-cell>
              <table:table-cell office:value-type="float" office:value="151.98">
                <text:p>15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29">
                <text:p>46129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1">
                <text:p>46131</text:p>
              </table:table-cell>
              <table:table-cell office:value-type="float" office:value="146.44">
                <text:p>14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2">
                <text:p>46132</text:p>
              </table:table-cell>
              <table:table-cell office:value-type="float" office:value="147.68">
                <text:p>14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3">
                <text:p>46133</text:p>
              </table:table-cell>
              <table:table-cell office:value-type="float" office:value="148.36">
                <text:p>14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4">
                <text:p>46134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150.53">
                <text:p>15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7">
                <text:p>46137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8">
                <text:p>46138</text:p>
              </table:table-cell>
              <table:table-cell office:value-type="float" office:value="148.91">
                <text:p>14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39">
                <text:p>46139</text:p>
              </table:table-cell>
              <table:table-cell office:value-type="float" office:value="148.19">
                <text:p>14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150.56">
                <text:p>15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1">
                <text:p>46141</text:p>
              </table:table-cell>
              <table:table-cell office:value-type="float" office:value="154.67">
                <text:p>154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2">
                <text:p>46142</text:p>
              </table:table-cell>
              <table:table-cell office:value-type="float" office:value="154.33">
                <text:p>15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5">
                <text:p>46145</text:p>
              </table:table-cell>
              <table:table-cell office:value-type="float" office:value="152.75">
                <text:p>1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153.69">
                <text:p>15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7">
                <text:p>46147</text:p>
              </table:table-cell>
              <table:table-cell office:value-type="float" office:value="154.88">
                <text:p>15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8">
                <text:p>46148</text:p>
              </table:table-cell>
              <table:table-cell office:value-type="float" office:value="148.69">
                <text:p>14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49">
                <text:p>46149</text:p>
              </table:table-cell>
              <table:table-cell office:value-type="float" office:value="146.58">
                <text:p>146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1">
                <text:p>46151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2">
                <text:p>46152</text:p>
              </table:table-cell>
              <table:table-cell office:value-type="float" office:value="144.57">
                <text:p>14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3">
                <text:p>46153</text:p>
              </table:table-cell>
              <table:table-cell office:value-type="float" office:value="149.68">
                <text:p>149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4">
                <text:p>46154</text:p>
              </table:table-cell>
              <table:table-cell office:value-type="float" office:value="150.63">
                <text:p>15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5">
                <text:p>46155</text:p>
              </table:table-cell>
              <table:table-cell office:value-type="float" office:value="151.57">
                <text:p>15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152.78">
                <text:p>152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7">
                <text:p>46157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8">
                <text:p>46158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59">
                <text:p>46159</text:p>
              </table:table-cell>
              <table:table-cell office:value-type="float" office:value="157.92">
                <text:p>15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160.49">
                <text:p>16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1">
                <text:p>46161</text:p>
              </table:table-cell>
              <table:table-cell office:value-type="float" office:value="162.55">
                <text:p>16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156.28">
                <text:p>15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3">
                <text:p>46163</text:p>
              </table:table-cell>
              <table:table-cell office:value-type="float" office:value="155.29">
                <text:p>15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4">
                <text:p>46164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5">
                <text:p>46165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6">
                <text:p>46166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7">
                <text:p>46167</text:p>
              </table:table-cell>
              <table:table-cell office:value-type="float" office:value="154.92">
                <text:p>15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8">
                <text:p>46168</text:p>
              </table:table-cell>
              <table:table-cell office:value-type="float" office:value="149.81">
                <text:p>14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69">
                <text:p>46169</text:p>
              </table:table-cell>
              <table:table-cell office:value-type="float" office:value="147.9">
                <text:p>1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146.96">
                <text:p>14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1">
                <text:p>46171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2">
                <text:p>46172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3">
                <text:p>46173</text:p>
              </table:table-cell>
              <table:table-cell office:value-type="float" office:value="145.26">
                <text:p>14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149.38">
                <text:p>14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5">
                <text:p>46175</text:p>
              </table:table-cell>
              <table:table-cell office:value-type="float" office:value="149.56">
                <text:p>14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6">
                <text:p>46176</text:p>
              </table:table-cell>
              <table:table-cell office:value-type="float" office:value="152.53">
                <text:p>152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7">
                <text:p>46177</text:p>
              </table:table-cell>
              <table:table-cell office:value-type="float" office:value="152.04">
                <text:p>15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8">
                <text:p>46178</text:p>
              </table:table-cell>
              <table:table-cell office:value-type="float" office:value="149.92">
                <text:p>149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79">
                <text:p>46179</text:p>
              </table:table-cell>
              <table:table-cell office:value-type="float" office:value="NaN">
                <text:p>NaN</text:p>
              </table:table-cell>
              <table:table-cell office:value-type="float" office:value="151.07960572187">
                <text:p>151.07960572187</text:p>
              </table:table-cell>
              <table:table-cell office:value-type="float" office:value="147.875700184655">
                <text:p>147.875700184655</text:p>
              </table:table-cell>
              <table:table-cell office:value-type="float" office:value="154.283511259085">
                <text:p>154.283511259085</text:p>
              </table:table-cell>
            </table:table-row>
            <table:table-row>
              <table:table-cell office:value-type="float" office:value="46180">
                <text:p>46180</text:p>
              </table:table-cell>
              <table:table-cell office:value-type="float" office:value="NaN">
                <text:p>NaN</text:p>
              </table:table-cell>
              <table:table-cell office:value-type="float" office:value="151.286641735536">
                <text:p>151.286641735536</text:p>
              </table:table-cell>
              <table:table-cell office:value-type="float" office:value="147.816894536177">
                <text:p>147.816894536177</text:p>
              </table:table-cell>
              <table:table-cell office:value-type="float" office:value="154.756388934895">
                <text:p>154.756388934895</text:p>
              </table:table-cell>
            </table:table-row>
            <table:table-row>
              <table:table-cell office:value-type="float" office:value="46181">
                <text:p>46181</text:p>
              </table:table-cell>
              <table:table-cell office:value-type="float" office:value="NaN">
                <text:p>NaN</text:p>
              </table:table-cell>
              <table:table-cell office:value-type="float" office:value="151.135298874844">
                <text:p>151.135298874844</text:p>
              </table:table-cell>
              <table:table-cell office:value-type="float" office:value="147.518873459102">
                <text:p>147.518873459102</text:p>
              </table:table-cell>
              <table:table-cell office:value-type="float" office:value="154.751724290587">
                <text:p>154.751724290587</text:p>
              </table:table-cell>
            </table:table-row>
            <table:table-row>
              <table:table-cell office:value-type="float" office:value="46182">
                <text:p>46182</text:p>
              </table:table-cell>
              <table:table-cell office:value-type="float" office:value="NaN">
                <text:p>NaN</text:p>
              </table:table-cell>
              <table:table-cell office:value-type="float" office:value="151.616065324221">
                <text:p>151.616065324221</text:p>
              </table:table-cell>
              <table:table-cell office:value-type="float" office:value="147.490772726101">
                <text:p>147.490772726101</text:p>
              </table:table-cell>
              <table:table-cell office:value-type="float" office:value="155.741357922341">
                <text:p>155.741357922341</text:p>
              </table:table-cell>
            </table:table-row>
            <table:table-row>
              <table:table-cell office:value-type="float" office:value="46183">
                <text:p>46183</text:p>
              </table:table-cell>
              <table:table-cell office:value-type="float" office:value="NaN">
                <text:p>NaN</text:p>
              </table:table-cell>
              <table:table-cell office:value-type="float" office:value="151.522337992827">
                <text:p>151.522337992827</text:p>
              </table:table-cell>
              <table:table-cell office:value-type="float" office:value="146.54111724322">
                <text:p>146.54111724322</text:p>
              </table:table-cell>
              <table:table-cell office:value-type="float" office:value="156.503558742434">
                <text:p>156.503558742434</text:p>
              </table:table-cell>
            </table:table-row>
            <table:table-row>
              <table:table-cell office:value-type="float" office:value="46184">
                <text:p>46184</text:p>
              </table:table-cell>
              <table:table-cell office:value-type="float" office:value="NaN">
                <text:p>NaN</text:p>
              </table:table-cell>
              <table:table-cell office:value-type="float" office:value="151.786866797687">
                <text:p>151.786866797687</text:p>
              </table:table-cell>
              <table:table-cell office:value-type="float" office:value="146.295217673483">
                <text:p>146.295217673483</text:p>
              </table:table-cell>
              <table:table-cell office:value-type="float" office:value="157.278515921892">
                <text:p>157.278515921892</text:p>
              </table:table-cell>
            </table:table-row>
            <table:table-row>
              <table:table-cell office:value-type="float" office:value="46185">
                <text:p>46185</text:p>
              </table:table-cell>
              <table:table-cell office:value-type="float" office:value="NaN">
                <text:p>NaN</text:p>
              </table:table-cell>
              <table:table-cell office:value-type="float" office:value="151.235655751591">
                <text:p>151.235655751591</text:p>
              </table:table-cell>
              <table:table-cell office:value-type="float" office:value="145.950576641245">
                <text:p>145.950576641245</text:p>
              </table:table-cell>
              <table:table-cell office:value-type="float" office:value="156.520734861937">
                <text:p>156.520734861937</text:p>
              </table:table-cell>
            </table:table-row>
            <table:table-row>
              <table:table-cell office:value-type="float" office:value="46186">
                <text:p>46186</text:p>
              </table:table-cell>
              <table:table-cell office:value-type="float" office:value="NaN">
                <text:p>NaN</text:p>
              </table:table-cell>
              <table:table-cell office:value-type="float" office:value="150.875400032059">
                <text:p>150.875400032059</text:p>
              </table:table-cell>
              <table:table-cell office:value-type="float" office:value="144.930278084416">
                <text:p>144.930278084416</text:p>
              </table:table-cell>
              <table:table-cell office:value-type="float" office:value="156.820521979701">
                <text:p>156.820521979701</text:p>
              </table:table-cell>
            </table:table-row>
            <table:table-row>
              <table:table-cell office:value-type="float" office:value="46187">
                <text:p>46187</text:p>
              </table:table-cell>
              <table:table-cell office:value-type="float" office:value="NaN">
                <text:p>NaN</text:p>
              </table:table-cell>
              <table:table-cell office:value-type="float" office:value="150.750526556474">
                <text:p>150.750526556474</text:p>
              </table:table-cell>
              <table:table-cell office:value-type="float" office:value="144.332902067036">
                <text:p>144.332902067036</text:p>
              </table:table-cell>
              <table:table-cell office:value-type="float" office:value="157.168151045912">
                <text:p>157.168151045912</text:p>
              </table:table-cell>
            </table:table-row>
            <table:table-row>
              <table:table-cell office:value-type="float" office:value="46188">
                <text:p>46188</text:p>
              </table:table-cell>
              <table:table-cell office:value-type="float" office:value="NaN">
                <text:p>NaN</text:p>
              </table:table-cell>
              <table:table-cell office:value-type="float" office:value="150.431354631312">
                <text:p>150.431354631312</text:p>
              </table:table-cell>
              <table:table-cell office:value-type="float" office:value="143.919934213831">
                <text:p>143.919934213831</text:p>
              </table:table-cell>
              <table:table-cell office:value-type="float" office:value="156.942775048793">
                <text:p>156.942775048793</text:p>
              </table:table-cell>
            </table:table-row>
            <table:table-row>
              <table:table-cell office:value-type="float" office:value="46189">
                <text:p>46189</text:p>
              </table:table-cell>
              <table:table-cell office:value-type="float" office:value="NaN">
                <text:p>NaN</text:p>
              </table:table-cell>
              <table:table-cell office:value-type="float" office:value="150.336447329176">
                <text:p>150.336447329176</text:p>
              </table:table-cell>
              <table:table-cell office:value-type="float" office:value="143.707848649522">
                <text:p>143.707848649522</text:p>
              </table:table-cell>
              <table:table-cell office:value-type="float" office:value="156.96504600883">
                <text:p>156.96504600883</text:p>
              </table:table-cell>
            </table:table-row>
            <table:table-row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148.427007640733">
                <text:p>148.427007640733</text:p>
              </table:table-cell>
              <table:table-cell office:value-type="float" office:value="141.354547350764">
                <text:p>141.354547350764</text:p>
              </table:table-cell>
              <table:table-cell office:value-type="float" office:value="155.499467930702">
                <text:p>155.499467930702</text:p>
              </table:table-cell>
            </table:table-row>
            <table:table-row>
              <table:table-cell office:value-type="float" office:value="46191">
                <text:p>46191</text:p>
              </table:table-cell>
              <table:table-cell office:value-type="float" office:value="NaN">
                <text:p>NaN</text:p>
              </table:table-cell>
              <table:table-cell office:value-type="float" office:value="147.223214697359">
                <text:p>147.223214697359</text:p>
              </table:table-cell>
              <table:table-cell office:value-type="float" office:value="140.145539389243">
                <text:p>140.145539389243</text:p>
              </table:table-cell>
              <table:table-cell office:value-type="float" office:value="154.300890005475">
                <text:p>154.300890005475</text:p>
              </table:table-cell>
            </table:table-row>
            <table:table-row>
              <table:table-cell office:value-type="float" office:value="46192">
                <text:p>46192</text:p>
              </table:table-cell>
              <table:table-cell office:value-type="float" office:value="NaN">
                <text:p>NaN</text:p>
              </table:table-cell>
              <table:table-cell office:value-type="float" office:value="148.715095475192">
                <text:p>148.715095475192</text:p>
              </table:table-cell>
              <table:table-cell office:value-type="float" office:value="141.577070464622">
                <text:p>141.577070464622</text:p>
              </table:table-cell>
              <table:table-cell office:value-type="float" office:value="155.853120485761">
                <text:p>155.853120485761</text:p>
              </table:table-cell>
            </table:table-row>
            <table:table-row>
              <table:table-cell office:value-type="float" office:value="46193">
                <text:p>46193</text:p>
              </table:table-cell>
              <table:table-cell office:value-type="float" office:value="NaN">
                <text:p>NaN</text:p>
              </table:table-cell>
              <table:table-cell office:value-type="float" office:value="148.690122053562">
                <text:p>148.690122053562</text:p>
              </table:table-cell>
              <table:table-cell office:value-type="float" office:value="140.527268186656">
                <text:p>140.527268186656</text:p>
              </table:table-cell>
              <table:table-cell office:value-type="float" office:value="156.852975920468">
                <text:p>156.852975920468</text:p>
              </table:table-cell>
            </table:table-row>
            <table:table-row>
              <table:table-cell office:value-type="float" office:value="46194">
                <text:p>46194</text:p>
              </table:table-cell>
              <table:table-cell office:value-type="float" office:value="NaN">
                <text:p>NaN</text:p>
              </table:table-cell>
              <table:table-cell office:value-type="float" office:value="148.782771734584">
                <text:p>148.782771734584</text:p>
              </table:table-cell>
              <table:table-cell office:value-type="float" office:value="140.774033143064">
                <text:p>140.774033143064</text:p>
              </table:table-cell>
              <table:table-cell office:value-type="float" office:value="156.791510326105">
                <text:p>156.791510326105</text:p>
              </table:table-cell>
            </table:table-row>
            <table:table-row>
              <table:table-cell office:value-type="float" office:value="46195">
                <text:p>46195</text:p>
              </table:table-cell>
              <table:table-cell office:value-type="float" office:value="NaN">
                <text:p>NaN</text:p>
              </table:table-cell>
              <table:table-cell office:value-type="float" office:value="149.782633018968">
                <text:p>149.782633018968</text:p>
              </table:table-cell>
              <table:table-cell office:value-type="float" office:value="141.806960467861">
                <text:p>141.806960467861</text:p>
              </table:table-cell>
              <table:table-cell office:value-type="float" office:value="157.758305570074">
                <text:p>157.758305570074</text:p>
              </table:table-cell>
            </table:table-row>
            <table:table-row>
              <table:table-cell office:value-type="float" office:value="46196">
                <text:p>46196</text:p>
              </table:table-cell>
              <table:table-cell office:value-type="float" office:value="NaN">
                <text:p>NaN</text:p>
              </table:table-cell>
              <table:table-cell office:value-type="float" office:value="149.90899994422">
                <text:p>149.90899994422</text:p>
              </table:table-cell>
              <table:table-cell office:value-type="float" office:value="141.324095394766">
                <text:p>141.324095394766</text:p>
              </table:table-cell>
              <table:table-cell office:value-type="float" office:value="158.493904493673">
                <text:p>158.493904493673</text:p>
              </table:table-cell>
            </table:table-row>
            <table:table-row>
              <table:table-cell office:value-type="float" office:value="46197">
                <text:p>46197</text:p>
              </table:table-cell>
              <table:table-cell office:value-type="float" office:value="NaN">
                <text:p>NaN</text:p>
              </table:table-cell>
              <table:table-cell office:value-type="float" office:value="149.789924290642">
                <text:p>149.789924290642</text:p>
              </table:table-cell>
              <table:table-cell office:value-type="float" office:value="141.172215154369">
                <text:p>141.172215154369</text:p>
              </table:table-cell>
              <table:table-cell office:value-type="float" office:value="158.407633426916">
                <text:p>158.407633426916</text:p>
              </table:table-cell>
            </table:table-row>
            <table:table-row>
              <table:table-cell office:value-type="float" office:value="46198">
                <text:p>46198</text:p>
              </table:table-cell>
              <table:table-cell office:value-type="float" office:value="NaN">
                <text:p>NaN</text:p>
              </table:table-cell>
              <table:table-cell office:value-type="float" office:value="148.842836066184">
                <text:p>148.842836066184</text:p>
              </table:table-cell>
              <table:table-cell office:value-type="float" office:value="139.673720061731">
                <text:p>139.673720061731</text:p>
              </table:table-cell>
              <table:table-cell office:value-type="float" office:value="158.011952070637">
                <text:p>158.011952070637</text:p>
              </table:table-cell>
            </table:table-row>
            <table:table-row>
              <table:table-cell office:value-type="float" office:value="46199">
                <text:p>46199</text:p>
              </table:table-cell>
              <table:table-cell office:value-type="float" office:value="NaN">
                <text:p>NaN</text:p>
              </table:table-cell>
              <table:table-cell office:value-type="float" office:value="150.044601646452">
                <text:p>150.044601646452</text:p>
              </table:table-cell>
              <table:table-cell office:value-type="float" office:value="140.48229656058">
                <text:p>140.48229656058</text:p>
              </table:table-cell>
              <table:table-cell office:value-type="float" office:value="159.606906732325">
                <text:p>159.606906732325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NaN">
                <text:p>NaN</text:p>
              </table:table-cell>
              <table:table-cell office:value-type="float" office:value="150.389248410652">
                <text:p>150.389248410652</text:p>
              </table:table-cell>
              <table:table-cell office:value-type="float" office:value="140.986737415101">
                <text:p>140.986737415101</text:p>
              </table:table-cell>
              <table:table-cell office:value-type="float" office:value="159.791759406202">
                <text:p>159.791759406202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NaN">
                <text:p>NaN</text:p>
              </table:table-cell>
              <table:table-cell office:value-type="float" office:value="150.447164033703">
                <text:p>150.447164033703</text:p>
              </table:table-cell>
              <table:table-cell office:value-type="float" office:value="140.898414924307">
                <text:p>140.898414924307</text:p>
              </table:table-cell>
              <table:table-cell office:value-type="float" office:value="159.995913143098">
                <text:p>159.995913143098</text:p>
              </table:table-cell>
            </table:table-row>
            <table:table-row>
              <table:table-cell office:value-type="float" office:value="46202">
                <text:p>46202</text:p>
              </table:table-cell>
              <table:table-cell office:value-type="float" office:value="NaN">
                <text:p>NaN</text:p>
              </table:table-cell>
              <table:table-cell office:value-type="float" office:value="150.851838602774">
                <text:p>150.851838602774</text:p>
              </table:table-cell>
              <table:table-cell office:value-type="float" office:value="140.877165947806">
                <text:p>140.877165947806</text:p>
              </table:table-cell>
              <table:table-cell office:value-type="float" office:value="160.826511257742">
                <text:p>160.826511257742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NaN">
                <text:p>NaN</text:p>
              </table:table-cell>
              <table:table-cell office:value-type="float" office:value="149.202542946947">
                <text:p>149.202542946947</text:p>
              </table:table-cell>
              <table:table-cell office:value-type="float" office:value="139.237525114509">
                <text:p>139.237525114509</text:p>
              </table:table-cell>
              <table:table-cell office:value-type="float" office:value="159.167560779385">
                <text:p>159.167560779385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NaN">
                <text:p>NaN</text:p>
              </table:table-cell>
              <table:table-cell office:value-type="float" office:value="148.557730160399">
                <text:p>148.557730160399</text:p>
              </table:table-cell>
              <table:table-cell office:value-type="float" office:value="138.114838259689">
                <text:p>138.114838259689</text:p>
              </table:table-cell>
              <table:table-cell office:value-type="float" office:value="159.00062206111">
                <text:p>159.00062206111</text:p>
              </table:table-cell>
            </table:table-row>
            <table:table-row>
              <table:table-cell office:value-type="float" office:value="46205">
                <text:p>46205</text:p>
              </table:table-cell>
              <table:table-cell office:value-type="float" office:value="NaN">
                <text:p>NaN</text:p>
              </table:table-cell>
              <table:table-cell office:value-type="float" office:value="146.682518919464">
                <text:p>146.682518919464</text:p>
              </table:table-cell>
              <table:table-cell office:value-type="float" office:value="136.578219707185">
                <text:p>136.578219707185</text:p>
              </table:table-cell>
              <table:table-cell office:value-type="float" office:value="156.786818131742">
                <text:p>156.786818131742</text:p>
              </table:table-cell>
            </table:table-row>
            <table:table-row>
              <table:table-cell office:value-type="float" office:value="46206">
                <text:p>46206</text:p>
              </table:table-cell>
              <table:table-cell office:value-type="float" office:value="NaN">
                <text:p>NaN</text:p>
              </table:table-cell>
              <table:table-cell office:value-type="float" office:value="144.906183773236">
                <text:p>144.906183773236</text:p>
              </table:table-cell>
              <table:table-cell office:value-type="float" office:value="134.18178443473">
                <text:p>134.18178443473</text:p>
              </table:table-cell>
              <table:table-cell office:value-type="float" office:value="155.630583111741">
                <text:p>155.630583111741</text:p>
              </table:table-cell>
            </table:table-row>
            <table:table-row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145.205600958761">
                <text:p>145.205600958761</text:p>
              </table:table-cell>
              <table:table-cell office:value-type="float" office:value="135.035021975051">
                <text:p>135.035021975051</text:p>
              </table:table-cell>
              <table:table-cell office:value-type="float" office:value="155.376179942472">
                <text:p>155.376179942472</text:p>
              </table:table-cell>
            </table:table-row>
            <table:table-row>
              <table:table-cell office:value-type="float" office:value="46208">
                <text:p>46208</text:p>
              </table:table-cell>
              <table:table-cell office:value-type="float" office:value="NaN">
                <text:p>NaN</text:p>
              </table:table-cell>
              <table:table-cell office:value-type="float" office:value="145.200866022735">
                <text:p>145.200866022735</text:p>
              </table:table-cell>
              <table:table-cell office:value-type="float" office:value="134.482029233827">
                <text:p>134.482029233827</text:p>
              </table:table-cell>
              <table:table-cell office:value-type="float" office:value="155.919702811643">
                <text:p>155.919702811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