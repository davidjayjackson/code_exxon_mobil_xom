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m_us_d" table:style-name="ta1">
        <table:shapes>
          <draw:frame draw:z-index="0" draw:style-name="gr1" draw:text-style-name="P1" svg:width="4.5602in" svg:height="4.7161in" svg:x="7.2035in" svg:y="0.5543in">
            <draw:object draw:notify-on-update-of-ranges="xom_us_d.A1:xom_us_d.A1 xom_us_d.A2:xom_us_d.A763 xom_us_d.B1:xom_us_d.B1 xom_us_d.B2:xom_us_d.B763 xom_us_d.D1:xom_us_d.D1 xom_us_d.D2:xom_us_d.D7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112.67" calcext:value-type="float">
            <text:p>112.67</text:p>
          </table:table-cell>
          <table:table-cell office:value-type="float" office:value="19412238" calcext:value-type="float">
            <text:p>19412238</text:p>
          </table:table-cell>
          <table:table-cell table:number-columns-repeated="4"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113.12" calcext:value-type="float">
            <text:p>113.12</text:p>
          </table:table-cell>
          <table:table-cell office:value-type="float" office:value="14863516" calcext:value-type="float">
            <text:p>14863516</text:p>
          </table:table-cell>
          <table:table-cell table:number-columns-repeated="4"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113.97" calcext:value-type="float">
            <text:p>113.97</text:p>
          </table:table-cell>
          <table:table-cell office:value-type="float" office:value="13154094" calcext:value-type="float">
            <text:p>13154094</text:p>
          </table:table-cell>
          <table:table-cell table:number-columns-repeated="4"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</table:table-row>
        <table:table-row table:style-name="ro1">
          <table:table-cell office:value-type="date" office:date-value="2024-06-08" calcext:value-type="date">
            <text:p>2024-06-08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</table:table-row>
        <table:table-row table:style-name="ro1">
          <table:table-cell office:value-type="date" office:date-value="2024-06-09" calcext:value-type="date">
            <text:p>2024-06-09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13.08" calcext:value-type="float">
            <text:p>113.08</text:p>
          </table:table-cell>
          <table:table-cell office:value-type="float" office:value="15245227" calcext:value-type="float">
            <text:p>15245227</text:p>
          </table:table-cell>
          <table:table-cell table:number-columns-repeated="4"/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112.17" calcext:value-type="float">
            <text:p>112.17</text:p>
          </table:table-cell>
          <table:table-cell office:value-type="float" office:value="12462403" calcext:value-type="float">
            <text:p>12462403</text:p>
          </table:table-cell>
          <table:table-cell table:number-columns-repeated="4"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110.93" calcext:value-type="float">
            <text:p>110.93</text:p>
          </table:table-cell>
          <table:table-cell office:value-type="float" office:value="13606788" calcext:value-type="float">
            <text:p>13606788</text:p>
          </table:table-cell>
          <table:table-cell table:number-columns-repeated="4"/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110.04" calcext:value-type="float">
            <text:p>110.04</text:p>
          </table:table-cell>
          <table:table-cell office:value-type="float" office:value="14466868" calcext:value-type="float">
            <text:p>14466868</text:p>
          </table:table-cell>
          <table:table-cell table:number-columns-repeated="4"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</table:table-row>
        <table:table-row table:style-name="ro1">
          <table:table-cell office:value-type="date" office:date-value="2024-06-15" calcext:value-type="date">
            <text:p>2024-06-15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</table:table-row>
        <table:table-row table:style-name="ro1">
          <table:table-cell office:value-type="date" office:date-value="2024-06-16" calcext:value-type="date">
            <text:p>2024-06-16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147943" calcext:value-type="float">
            <text:p>21147943</text:p>
          </table:table-cell>
          <table:table-cell table:number-columns-repeated="4"/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number-columns-repeated="4"/>
        </table:table-row>
        <table:table-row table:style-name="ro1">
          <table:table-cell office:value-type="date" office:date-value="2024-06-19" calcext:value-type="date">
            <text:p>2024-06-19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number-columns-repeated="4"/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111.74" calcext:value-type="float">
            <text:p>111.74</text:p>
          </table:table-cell>
          <table:table-cell office:value-type="float" office:value="17433192" calcext:value-type="float">
            <text:p>17433192</text:p>
          </table:table-cell>
          <table:table-cell table:number-columns-repeated="4"/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</table:table-row>
        <table:table-row table:style-name="ro1">
          <table:table-cell office:value-type="date" office:date-value="2024-06-22" calcext:value-type="date">
            <text:p>2024-06-22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14.05" calcext:value-type="float">
            <text:p>114.05</text:p>
          </table:table-cell>
          <table:table-cell office:value-type="float" office:value="16266688" calcext:value-type="float">
            <text:p>16266688</text:p>
          </table:table-cell>
          <table:table-cell table:number-columns-repeated="4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6213682" calcext:value-type="float">
            <text:p>16213682</text:p>
          </table:table-cell>
          <table:table-cell table:number-columns-repeated="4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114.41" calcext:value-type="float">
            <text:p>114.41</text:p>
          </table:table-cell>
          <table:table-cell office:value-type="float" office:value="15771751" calcext:value-type="float">
            <text:p>15771751</text:p>
          </table:table-cell>
          <table:table-cell table:number-columns-repeated="4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114.9" calcext:value-type="float">
            <text:p>114.9</text:p>
          </table:table-cell>
          <table:table-cell office:value-type="float" office:value="16812731" calcext:value-type="float">
            <text:p>16812731</text:p>
          </table:table-cell>
          <table:table-cell table:number-columns-repeated="4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14.96" calcext:value-type="float">
            <text:p>114.96</text:p>
          </table:table-cell>
          <table:table-cell office:value-type="float" office:value="11972881" calcext:value-type="float">
            <text:p>11972881</text:p>
          </table:table-cell>
          <table:table-cell table:number-columns-repeated="4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114.18" calcext:value-type="float">
            <text:p>114.18</text:p>
          </table:table-cell>
          <table:table-cell office:value-type="float" office:value="13326703" calcext:value-type="float">
            <text:p>13326703</text:p>
          </table:table-cell>
          <table:table-cell table:number-columns-repeated="4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number-columns-repeated="4"/>
        </table:table-row>
        <table:table-row table:style-name="ro1">
          <table:table-cell office:value-type="date" office:date-value="2024-07-04" calcext:value-type="date">
            <text:p>2024-07-04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number-columns-repeated="4"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</table:table-row>
        <table:table-row table:style-name="ro1">
          <table:table-cell office:value-type="date" office:date-value="2024-07-06" calcext:value-type="date">
            <text:p>2024-07-06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</table:table-row>
        <table:table-row table:style-name="ro1">
          <table:table-cell office:value-type="date" office:date-value="2024-07-07" calcext:value-type="date">
            <text:p>2024-07-07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12.18" calcext:value-type="float">
            <text:p>112.18</text:p>
          </table:table-cell>
          <table:table-cell office:value-type="float" office:value="13350549" calcext:value-type="float">
            <text:p>13350549</text:p>
          </table:table-cell>
          <table:table-cell table:number-columns-repeated="4"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110.94" calcext:value-type="float">
            <text:p>110.94</text:p>
          </table:table-cell>
          <table:table-cell office:value-type="float" office:value="11729085" calcext:value-type="float">
            <text:p>11729085</text:p>
          </table:table-cell>
          <table:table-cell table:number-columns-repeated="4"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111.92" calcext:value-type="float">
            <text:p>111.92</text:p>
          </table:table-cell>
          <table:table-cell office:value-type="float" office:value="10004094" calcext:value-type="float">
            <text:p>10004094</text:p>
          </table:table-cell>
          <table:table-cell table:number-columns-repeated="4"/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113.25" calcext:value-type="float">
            <text:p>113.25</text:p>
          </table:table-cell>
          <table:table-cell office:value-type="float" office:value="13084875" calcext:value-type="float">
            <text:p>13084875</text:p>
          </table:table-cell>
          <table:table-cell table:number-columns-repeated="4"/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</table:table-row>
        <table:table-row table:style-name="ro1">
          <table:table-cell office:value-type="date" office:date-value="2024-07-13" calcext:value-type="date">
            <text:p>2024-07-13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</table:table-row>
        <table:table-row table:style-name="ro1">
          <table:table-cell office:value-type="date" office:date-value="2024-07-14" calcext:value-type="date">
            <text:p>2024-07-14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15.21" calcext:value-type="float">
            <text:p>115.21</text:p>
          </table:table-cell>
          <table:table-cell office:value-type="float" office:value="13032503" calcext:value-type="float">
            <text:p>13032503</text:p>
          </table:table-cell>
          <table:table-cell table:number-columns-repeated="4"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116.04" calcext:value-type="float">
            <text:p>116.04</text:p>
          </table:table-cell>
          <table:table-cell office:value-type="float" office:value="13614050" calcext:value-type="float">
            <text:p>13614050</text:p>
          </table:table-cell>
          <table:table-cell table:number-columns-repeated="4"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602766" calcext:value-type="float">
            <text:p>13602766</text:p>
          </table:table-cell>
          <table:table-cell table:number-columns-repeated="4"/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118.8" calcext:value-type="float">
            <text:p>118.8</text:p>
          </table:table-cell>
          <table:table-cell office:value-type="float" office:value="13033563" calcext:value-type="float">
            <text:p>13033563</text:p>
          </table:table-cell>
          <table:table-cell table:number-columns-repeated="4"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</table:table-row>
        <table:table-row table:style-name="ro1">
          <table:table-cell office:value-type="date" office:date-value="2024-07-20" calcext:value-type="date">
            <text:p>2024-07-20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</table:table-row>
        <table:table-row table:style-name="ro1">
          <table:table-cell office:value-type="date" office:date-value="2024-07-21" calcext:value-type="date">
            <text:p>2024-07-21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12065877" calcext:value-type="float">
            <text:p>12065877</text:p>
          </table:table-cell>
          <table:table-cell table:number-columns-repeated="4"/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251733" calcext:value-type="float">
            <text:p>11251733</text:p>
          </table:table-cell>
          <table:table-cell table:number-columns-repeated="4"/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115.01" calcext:value-type="float">
            <text:p>115.01</text:p>
          </table:table-cell>
          <table:table-cell office:value-type="float" office:value="14925184" calcext:value-type="float">
            <text:p>14925184</text:p>
          </table:table-cell>
          <table:table-cell table:number-columns-repeated="4"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117.43" calcext:value-type="float">
            <text:p>117.43</text:p>
          </table:table-cell>
          <table:table-cell office:value-type="float" office:value="17021698" calcext:value-type="float">
            <text:p>17021698</text:p>
          </table:table-cell>
          <table:table-cell table:number-columns-repeated="4"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</table:table-row>
        <table:table-row table:style-name="ro1">
          <table:table-cell office:value-type="date" office:date-value="2024-07-27" calcext:value-type="date">
            <text:p>2024-07-27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</table:table-row>
        <table:table-row table:style-name="ro1">
          <table:table-cell office:value-type="date" office:date-value="2024-07-28" calcext:value-type="date">
            <text:p>2024-07-28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16.1" calcext:value-type="float">
            <text:p>116.1</text:p>
          </table:table-cell>
          <table:table-cell office:value-type="float" office:value="8861806" calcext:value-type="float">
            <text:p>8861806</text:p>
          </table:table-cell>
          <table:table-cell table:number-columns-repeated="4"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118.17" calcext:value-type="float">
            <text:p>118.17</text:p>
          </table:table-cell>
          <table:table-cell office:value-type="float" office:value="12483857" calcext:value-type="float">
            <text:p>12483857</text:p>
          </table:table-cell>
          <table:table-cell table:number-columns-repeated="4"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118.59" calcext:value-type="float">
            <text:p>118.59</text:p>
          </table:table-cell>
          <table:table-cell office:value-type="float" office:value="15137710" calcext:value-type="float">
            <text:p>15137710</text:p>
          </table:table-cell>
          <table:table-cell table:number-columns-repeated="4"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116.95" calcext:value-type="float">
            <text:p>116.95</text:p>
          </table:table-cell>
          <table:table-cell office:value-type="float" office:value="15051482" calcext:value-type="float">
            <text:p>15051482</text:p>
          </table:table-cell>
          <table:table-cell table:number-columns-repeated="4"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</table:table-row>
        <table:table-row table:style-name="ro1">
          <table:table-cell office:value-type="date" office:date-value="2024-08-03" calcext:value-type="date">
            <text:p>2024-08-03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</table:table-row>
        <table:table-row table:style-name="ro1">
          <table:table-cell office:value-type="date" office:date-value="2024-08-04" calcext:value-type="date">
            <text:p>2024-08-04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8025858" calcext:value-type="float">
            <text:p>18025858</text:p>
          </table:table-cell>
          <table:table-cell table:number-columns-repeated="4"/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114.16" calcext:value-type="float">
            <text:p>114.16</text:p>
          </table:table-cell>
          <table:table-cell office:value-type="float" office:value="13647778" calcext:value-type="float">
            <text:p>13647778</text:p>
          </table:table-cell>
          <table:table-cell table:number-columns-repeated="4"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115.68" calcext:value-type="float">
            <text:p>115.68</text:p>
          </table:table-cell>
          <table:table-cell office:value-type="float" office:value="13660657" calcext:value-type="float">
            <text:p>13660657</text:p>
          </table:table-cell>
          <table:table-cell table:number-columns-repeated="4"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117.89" calcext:value-type="float">
            <text:p>117.89</text:p>
          </table:table-cell>
          <table:table-cell office:value-type="float" office:value="13850993" calcext:value-type="float">
            <text:p>13850993</text:p>
          </table:table-cell>
          <table:table-cell table:number-columns-repeated="4"/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</table:table-row>
        <table:table-row table:style-name="ro1">
          <table:table-cell office:value-type="date" office:date-value="2024-08-10" calcext:value-type="date">
            <text:p>2024-08-10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</table:table-row>
        <table:table-row table:style-name="ro1">
          <table:table-cell office:value-type="date" office:date-value="2024-08-11" calcext:value-type="date">
            <text:p>2024-08-11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19" calcext:value-type="float">
            <text:p>119</text:p>
          </table:table-cell>
          <table:table-cell office:value-type="float" office:value="13228911" calcext:value-type="float">
            <text:p>13228911</text:p>
          </table:table-cell>
          <table:table-cell table:number-columns-repeated="4"/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117.86" calcext:value-type="float">
            <text:p>117.86</text:p>
          </table:table-cell>
          <table:table-cell office:value-type="float" office:value="11585067" calcext:value-type="float">
            <text:p>11585067</text:p>
          </table:table-cell>
          <table:table-cell table:number-columns-repeated="4"/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194520" calcext:value-type="float">
            <text:p>12194520</text:p>
          </table:table-cell>
          <table:table-cell table:number-columns-repeated="4"/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579432" calcext:value-type="float">
            <text:p>11579432</text:p>
          </table:table-cell>
          <table:table-cell table:number-columns-repeated="4"/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</table:table-row>
        <table:table-row table:style-name="ro1">
          <table:table-cell office:value-type="date" office:date-value="2024-08-17" calcext:value-type="date">
            <text:p>2024-08-17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417467" calcext:value-type="float">
            <text:p>12417467</text:p>
          </table:table-cell>
          <table:table-cell table:number-columns-repeated="4"/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114.58" calcext:value-type="float">
            <text:p>114.58</text:p>
          </table:table-cell>
          <table:table-cell office:value-type="float" office:value="15631967" calcext:value-type="float">
            <text:p>15631967</text:p>
          </table:table-cell>
          <table:table-cell table:number-columns-repeated="4"/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752358" calcext:value-type="float">
            <text:p>11752358</text:p>
          </table:table-cell>
          <table:table-cell table:number-columns-repeated="4"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114.73" calcext:value-type="float">
            <text:p>114.73</text:p>
          </table:table-cell>
          <table:table-cell office:value-type="float" office:value="10609501" calcext:value-type="float">
            <text:p>10609501</text:p>
          </table:table-cell>
          <table:table-cell table:number-columns-repeated="4"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18.81" calcext:value-type="float">
            <text:p>118.81</text:p>
          </table:table-cell>
          <table:table-cell office:value-type="float" office:value="13671016" calcext:value-type="float">
            <text:p>13671016</text:p>
          </table:table-cell>
          <table:table-cell table:number-columns-repeated="4"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117.68" calcext:value-type="float">
            <text:p>117.68</text:p>
          </table:table-cell>
          <table:table-cell office:value-type="float" office:value="9991631" calcext:value-type="float">
            <text:p>9991631</text:p>
          </table:table-cell>
          <table:table-cell table:number-columns-repeated="4"/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116.52" calcext:value-type="float">
            <text:p>116.52</text:p>
          </table:table-cell>
          <table:table-cell office:value-type="float" office:value="10742867" calcext:value-type="float">
            <text:p>10742867</text:p>
          </table:table-cell>
          <table:table-cell table:number-columns-repeated="4"/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118.13" calcext:value-type="float">
            <text:p>118.13</text:p>
          </table:table-cell>
          <table:table-cell office:value-type="float" office:value="10753895" calcext:value-type="float">
            <text:p>10753895</text:p>
          </table:table-cell>
          <table:table-cell table:number-columns-repeated="4"/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115.47" calcext:value-type="float">
            <text:p>115.47</text:p>
          </table:table-cell>
          <table:table-cell office:value-type="float" office:value="15725139" calcext:value-type="float">
            <text:p>15725139</text:p>
          </table:table-cell>
          <table:table-cell table:number-columns-repeated="4"/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114.06" calcext:value-type="float">
            <text:p>114.06</text:p>
          </table:table-cell>
          <table:table-cell office:value-type="float" office:value="12620584" calcext:value-type="float">
            <text:p>12620584</text:p>
          </table:table-cell>
          <table:table-cell table:number-columns-repeated="4"/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113.17" calcext:value-type="float">
            <text:p>113.17</text:p>
          </table:table-cell>
          <table:table-cell office:value-type="float" office:value="17200770" calcext:value-type="float">
            <text:p>17200770</text:p>
          </table:table-cell>
          <table:table-cell table:number-columns-repeated="4"/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</table:table-row>
        <table:table-row table:style-name="ro1">
          <table:table-cell office:value-type="date" office:date-value="2024-09-07" calcext:value-type="date">
            <text:p>2024-09-07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</table:table-row>
        <table:table-row table:style-name="ro1">
          <table:table-cell office:value-type="date" office:date-value="2024-09-08" calcext:value-type="date">
            <text:p>2024-09-08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15.01" calcext:value-type="float">
            <text:p>115.01</text:p>
          </table:table-cell>
          <table:table-cell office:value-type="float" office:value="21645325" calcext:value-type="float">
            <text:p>21645325</text:p>
          </table:table-cell>
          <table:table-cell table:number-columns-repeated="4"/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110.82" calcext:value-type="float">
            <text:p>110.82</text:p>
          </table:table-cell>
          <table:table-cell office:value-type="float" office:value="20913405" calcext:value-type="float">
            <text:p>20913405</text:p>
          </table:table-cell>
          <table:table-cell table:number-columns-repeated="4"/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109.72" calcext:value-type="float">
            <text:p>109.72</text:p>
          </table:table-cell>
          <table:table-cell office:value-type="float" office:value="19571945" calcext:value-type="float">
            <text:p>19571945</text:p>
          </table:table-cell>
          <table:table-cell table:number-columns-repeated="4"/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111.23" calcext:value-type="float">
            <text:p>111.23</text:p>
          </table:table-cell>
          <table:table-cell office:value-type="float" office:value="15923318" calcext:value-type="float">
            <text:p>15923318</text:p>
          </table:table-cell>
          <table:table-cell table:number-columns-repeated="4"/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</table:table-row>
        <table:table-row table:style-name="ro1">
          <table:table-cell office:value-type="date" office:date-value="2024-09-15" calcext:value-type="date">
            <text:p>2024-09-15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12.71" calcext:value-type="float">
            <text:p>112.71</text:p>
          </table:table-cell>
          <table:table-cell office:value-type="float" office:value="11729034" calcext:value-type="float">
            <text:p>11729034</text:p>
          </table:table-cell>
          <table:table-cell table:number-columns-repeated="4"/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114.18" calcext:value-type="float">
            <text:p>114.18</text:p>
          </table:table-cell>
          <table:table-cell office:value-type="float" office:value="12202556" calcext:value-type="float">
            <text:p>12202556</text:p>
          </table:table-cell>
          <table:table-cell table:number-columns-repeated="4"/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114.58" calcext:value-type="float">
            <text:p>114.58</text:p>
          </table:table-cell>
          <table:table-cell office:value-type="float" office:value="12569929" calcext:value-type="float">
            <text:p>12569929</text:p>
          </table:table-cell>
          <table:table-cell table:number-columns-repeated="4"/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116" calcext:value-type="float">
            <text:p>116</text:p>
          </table:table-cell>
          <table:table-cell office:value-type="float" office:value="12660642" calcext:value-type="float">
            <text:p>12660642</text:p>
          </table:table-cell>
          <table:table-cell table:number-columns-repeated="4"/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</table:table-row>
        <table:table-row table:style-name="ro1">
          <table:table-cell office:value-type="date" office:date-value="2024-09-22" calcext:value-type="date">
            <text:p>2024-09-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17.36" calcext:value-type="float">
            <text:p>117.36</text:p>
          </table:table-cell>
          <table:table-cell office:value-type="float" office:value="16066285" calcext:value-type="float">
            <text:p>16066285</text:p>
          </table:table-cell>
          <table:table-cell table:number-columns-repeated="4"/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984863" calcext:value-type="float">
            <text:p>11984863</text:p>
          </table:table-cell>
          <table:table-cell table:number-columns-repeated="4"/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3816041" calcext:value-type="float">
            <text:p>13816041</text:p>
          </table:table-cell>
          <table:table-cell table:number-columns-repeated="4"/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112.8" calcext:value-type="float">
            <text:p>112.8</text:p>
          </table:table-cell>
          <table:table-cell office:value-type="float" office:value="16887908" calcext:value-type="float">
            <text:p>16887908</text:p>
          </table:table-cell>
          <table:table-cell table:number-columns-repeated="4"/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17.22" calcext:value-type="float">
            <text:p>117.22</text:p>
          </table:table-cell>
          <table:table-cell office:value-type="float" office:value="13250657" calcext:value-type="float">
            <text:p>13250657</text:p>
          </table:table-cell>
          <table:table-cell table:number-columns-repeated="4"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119.93" calcext:value-type="float">
            <text:p>119.93</text:p>
          </table:table-cell>
          <table:table-cell office:value-type="float" office:value="23235878" calcext:value-type="float">
            <text:p>23235878</text:p>
          </table:table-cell>
          <table:table-cell table:number-columns-repeated="4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121.52" calcext:value-type="float">
            <text:p>121.52</text:p>
          </table:table-cell>
          <table:table-cell office:value-type="float" office:value="17129676" calcext:value-type="float">
            <text:p>17129676</text:p>
          </table:table-cell>
          <table:table-cell table:number-columns-repeated="4"/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122.58" calcext:value-type="float">
            <text:p>122.58</text:p>
          </table:table-cell>
          <table:table-cell office:value-type="float" office:value="16524334" calcext:value-type="float">
            <text:p>16524334</text:p>
          </table:table-cell>
          <table:table-cell table:number-columns-repeated="4"/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25.37" calcext:value-type="float">
            <text:p>125.37</text:p>
          </table:table-cell>
          <table:table-cell office:value-type="float" office:value="15714440" calcext:value-type="float">
            <text:p>15714440</text:p>
          </table:table-cell>
          <table:table-cell table:number-columns-repeated="4"/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122.04" calcext:value-type="float">
            <text:p>122.04</text:p>
          </table:table-cell>
          <table:table-cell office:value-type="float" office:value="14818475" calcext:value-type="float">
            <text:p>14818475</text:p>
          </table:table-cell>
          <table:table-cell table:number-columns-repeated="4"/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122.09" calcext:value-type="float">
            <text:p>122.09</text:p>
          </table:table-cell>
          <table:table-cell office:value-type="float" office:value="11144864" calcext:value-type="float">
            <text:p>11144864</text:p>
          </table:table-cell>
          <table:table-cell table:number-columns-repeated="4"/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123.14" calcext:value-type="float">
            <text:p>123.14</text:p>
          </table:table-cell>
          <table:table-cell office:value-type="float" office:value="10243320" calcext:value-type="float">
            <text:p>10243320</text:p>
          </table:table-cell>
          <table:table-cell table:number-columns-repeated="4"/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24.08" calcext:value-type="float">
            <text:p>124.08</text:p>
          </table:table-cell>
          <table:table-cell office:value-type="float" office:value="9808122" calcext:value-type="float">
            <text:p>9808122</text:p>
          </table:table-cell>
          <table:table-cell table:number-columns-repeated="4"/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5771317" calcext:value-type="float">
            <text:p>15771317</text:p>
          </table:table-cell>
          <table:table-cell table:number-columns-repeated="4"/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120.66" calcext:value-type="float">
            <text:p>120.66</text:p>
          </table:table-cell>
          <table:table-cell office:value-type="float" office:value="8426770" calcext:value-type="float">
            <text:p>8426770</text:p>
          </table:table-cell>
          <table:table-cell table:number-columns-repeated="4"/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204857" calcext:value-type="float">
            <text:p>11204857</text:p>
          </table:table-cell>
          <table:table-cell table:number-columns-repeated="4"/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</table:table-row>
        <table:table-row table:style-name="ro1">
          <table:table-cell office:value-type="date" office:date-value="2024-10-19" calcext:value-type="date">
            <text:p>2024-10-19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177777" calcext:value-type="float">
            <text:p>10177777</text:p>
          </table:table-cell>
          <table:table-cell table:number-columns-repeated="4"/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120.7" calcext:value-type="float">
            <text:p>120.7</text:p>
          </table:table-cell>
          <table:table-cell office:value-type="float" office:value="9201408" calcext:value-type="float">
            <text:p>9201408</text:p>
          </table:table-cell>
          <table:table-cell table:number-columns-repeated="4"/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120.27" calcext:value-type="float">
            <text:p>120.27</text:p>
          </table:table-cell>
          <table:table-cell office:value-type="float" office:value="8320330" calcext:value-type="float">
            <text:p>8320330</text:p>
          </table:table-cell>
          <table:table-cell table:number-columns-repeated="4"/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119.59" calcext:value-type="float">
            <text:p>119.59</text:p>
          </table:table-cell>
          <table:table-cell office:value-type="float" office:value="9905556" calcext:value-type="float">
            <text:p>9905556</text:p>
          </table:table-cell>
          <table:table-cell table:number-columns-repeated="4"/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</table:table-row>
        <table:table-row table:style-name="ro1">
          <table:table-cell office:value-type="date" office:date-value="2024-10-27" calcext:value-type="date">
            <text:p>2024-10-27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18.9" calcext:value-type="float">
            <text:p>118.9</text:p>
          </table:table-cell>
          <table:table-cell office:value-type="float" office:value="11844545" calcext:value-type="float">
            <text:p>11844545</text:p>
          </table:table-cell>
          <table:table-cell table:number-columns-repeated="4"/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117.28" calcext:value-type="float">
            <text:p>117.28</text:p>
          </table:table-cell>
          <table:table-cell office:value-type="float" office:value="14731024" calcext:value-type="float">
            <text:p>14731024</text:p>
          </table:table-cell>
          <table:table-cell table:number-columns-repeated="4"/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116.69" calcext:value-type="float">
            <text:p>116.69</text:p>
          </table:table-cell>
          <table:table-cell office:value-type="float" office:value="12303738" calcext:value-type="float">
            <text:p>12303738</text:p>
          </table:table-cell>
          <table:table-cell table:number-columns-repeated="4"/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116.78" calcext:value-type="float">
            <text:p>116.78</text:p>
          </table:table-cell>
          <table:table-cell office:value-type="float" office:value="20511977" calcext:value-type="float">
            <text:p>20511977</text:p>
          </table:table-cell>
          <table:table-cell table:number-columns-repeated="4"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18.61" calcext:value-type="float">
            <text:p>118.61</text:p>
          </table:table-cell>
          <table:table-cell office:value-type="float" office:value="14965433" calcext:value-type="float">
            <text:p>14965433</text:p>
          </table:table-cell>
          <table:table-cell table:number-columns-repeated="4"/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118.96" calcext:value-type="float">
            <text:p>118.96</text:p>
          </table:table-cell>
          <table:table-cell office:value-type="float" office:value="10436744" calcext:value-type="float">
            <text:p>10436744</text:p>
          </table:table-cell>
          <table:table-cell table:number-columns-repeated="4"/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121" calcext:value-type="float">
            <text:p>121</text:p>
          </table:table-cell>
          <table:table-cell office:value-type="float" office:value="20807681" calcext:value-type="float">
            <text:p>20807681</text:p>
          </table:table-cell>
          <table:table-cell table:number-columns-repeated="4"/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184431" calcext:value-type="float">
            <text:p>12184431</text:p>
          </table:table-cell>
          <table:table-cell table:number-columns-repeated="4"/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</table:table-row>
        <table:table-row table:style-name="ro1">
          <table:table-cell office:value-type="date" office:date-value="2024-11-10" calcext:value-type="date">
            <text:p>2024-11-10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969663" calcext:value-type="float">
            <text:p>11969663</text:p>
          </table:table-cell>
          <table:table-cell table:number-columns-repeated="4"/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972802" calcext:value-type="float">
            <text:p>11972802</text:p>
          </table:table-cell>
          <table:table-cell table:number-columns-repeated="4"/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121.47" calcext:value-type="float">
            <text:p>121.47</text:p>
          </table:table-cell>
          <table:table-cell office:value-type="float" office:value="15127877" calcext:value-type="float">
            <text:p>15127877</text:p>
          </table:table-cell>
          <table:table-cell table:number-columns-repeated="4"/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120.56" calcext:value-type="float">
            <text:p>120.56</text:p>
          </table:table-cell>
          <table:table-cell office:value-type="float" office:value="13041845" calcext:value-type="float">
            <text:p>13041845</text:p>
          </table:table-cell>
          <table:table-cell table:number-columns-repeated="4"/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</table:table-row>
        <table:table-row table:style-name="ro1">
          <table:table-cell office:value-type="date" office:date-value="2024-11-16" calcext:value-type="date">
            <text:p>2024-11-16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</table:table-row>
        <table:table-row table:style-name="ro1">
          <table:table-cell office:value-type="date" office:date-value="2024-11-17" calcext:value-type="date">
            <text:p>2024-11-17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20.31" calcext:value-type="float">
            <text:p>120.31</text:p>
          </table:table-cell>
          <table:table-cell office:value-type="float" office:value="14243701" calcext:value-type="float">
            <text:p>14243701</text:p>
          </table:table-cell>
          <table:table-cell table:number-columns-repeated="4"/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118.63" calcext:value-type="float">
            <text:p>118.63</text:p>
          </table:table-cell>
          <table:table-cell office:value-type="float" office:value="11584382" calcext:value-type="float">
            <text:p>11584382</text:p>
          </table:table-cell>
          <table:table-cell table:number-columns-repeated="4"/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360932" calcext:value-type="float">
            <text:p>11360932</text:p>
          </table:table-cell>
          <table:table-cell table:number-columns-repeated="4"/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121.93" calcext:value-type="float">
            <text:p>121.93</text:p>
          </table:table-cell>
          <table:table-cell office:value-type="float" office:value="14675422" calcext:value-type="float">
            <text:p>14675422</text:p>
          </table:table-cell>
          <table:table-cell table:number-columns-repeated="4"/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19.97" calcext:value-type="float">
            <text:p>119.97</text:p>
          </table:table-cell>
          <table:table-cell office:value-type="float" office:value="26580295" calcext:value-type="float">
            <text:p>26580295</text:p>
          </table:table-cell>
          <table:table-cell table:number-columns-repeated="4"/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117.97" calcext:value-type="float">
            <text:p>117.97</text:p>
          </table:table-cell>
          <table:table-cell office:value-type="float" office:value="14827327" calcext:value-type="float">
            <text:p>14827327</text:p>
          </table:table-cell>
          <table:table-cell table:number-columns-repeated="4"/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number-columns-repeated="4"/>
        </table:table-row>
        <table:table-row table:style-name="ro1">
          <table:table-cell office:value-type="date" office:date-value="2024-11-28" calcext:value-type="date">
            <text:p>2024-11-28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number-columns-repeated="4"/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17.85" calcext:value-type="float">
            <text:p>117.85</text:p>
          </table:table-cell>
          <table:table-cell office:value-type="float" office:value="12687317" calcext:value-type="float">
            <text:p>12687317</text:p>
          </table:table-cell>
          <table:table-cell table:number-columns-repeated="4"/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117.67" calcext:value-type="float">
            <text:p>117.67</text:p>
          </table:table-cell>
          <table:table-cell office:value-type="float" office:value="11756566" calcext:value-type="float">
            <text:p>11756566</text:p>
          </table:table-cell>
          <table:table-cell table:number-columns-repeated="4"/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114.28" calcext:value-type="float">
            <text:p>114.28</text:p>
          </table:table-cell>
          <table:table-cell office:value-type="float" office:value="19520583" calcext:value-type="float">
            <text:p>19520583</text:p>
          </table:table-cell>
          <table:table-cell table:number-columns-repeated="4"/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114.78" calcext:value-type="float">
            <text:p>114.78</text:p>
          </table:table-cell>
          <table:table-cell office:value-type="float" office:value="15751204" calcext:value-type="float">
            <text:p>15751204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2024-12-08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12.9" calcext:value-type="float">
            <text:p>112.9</text:p>
          </table:table-cell>
          <table:table-cell office:value-type="float" office:value="17412565" calcext:value-type="float">
            <text:p>17412565</text:p>
          </table:table-cell>
          <table:table-cell table:number-columns-repeated="4"/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112.67" calcext:value-type="float">
            <text:p>112.67</text:p>
          </table:table-cell>
          <table:table-cell office:value-type="float" office:value="20990943" calcext:value-type="float">
            <text:p>20990943</text:p>
          </table:table-cell>
          <table:table-cell table:number-columns-repeated="4"/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111.92" calcext:value-type="float">
            <text:p>111.92</text:p>
          </table:table-cell>
          <table:table-cell office:value-type="float" office:value="32392238" calcext:value-type="float">
            <text:p>32392238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111.82" calcext:value-type="float">
            <text:p>111.82</text:p>
          </table:table-cell>
          <table:table-cell office:value-type="float" office:value="14543256" calcext:value-type="float">
            <text:p>14543256</text:p>
          </table:table-cell>
          <table:table-cell table:number-columns-repeated="4"/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</table:table-row>
        <table:table-row table:style-name="ro1">
          <table:table-cell office:value-type="date" office:date-value="2024-12-15" calcext:value-type="date">
            <text:p>2024-12-15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08.47" calcext:value-type="float">
            <text:p>108.47</text:p>
          </table:table-cell>
          <table:table-cell office:value-type="float" office:value="20256088" calcext:value-type="float">
            <text:p>20256088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108.01" calcext:value-type="float">
            <text:p>108.01</text:p>
          </table:table-cell>
          <table:table-cell office:value-type="float" office:value="17553995" calcext:value-type="float">
            <text:p>17553995</text:p>
          </table:table-cell>
          <table:table-cell table:number-columns-repeated="4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106.42" calcext:value-type="float">
            <text:p>106.42</text:p>
          </table:table-cell>
          <table:table-cell office:value-type="float" office:value="17114542" calcext:value-type="float">
            <text:p>17114542</text:p>
          </table:table-cell>
          <table:table-cell table:number-columns-repeated="4"/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105.51" calcext:value-type="float">
            <text:p>105.51</text:p>
          </table:table-cell>
          <table:table-cell office:value-type="float" office:value="20565557" calcext:value-type="float">
            <text:p>20565557</text:p>
          </table:table-cell>
          <table:table-cell table:number-columns-repeated="4"/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2024-12-21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06.3" calcext:value-type="float">
            <text:p>106.3</text:p>
          </table:table-cell>
          <table:table-cell office:value-type="float" office:value="12285078" calcext:value-type="float">
            <text:p>12285078</text:p>
          </table:table-cell>
          <table:table-cell table:number-columns-repeated="4"/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number-columns-repeated="4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number-columns-repeated="4"/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106.49" calcext:value-type="float">
            <text:p>106.49</text:p>
          </table:table-cell>
          <table:table-cell office:value-type="float" office:value="9653408" calcext:value-type="float">
            <text:p>9653408</text:p>
          </table:table-cell>
          <table:table-cell table:number-columns-repeated="4"/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05.76" calcext:value-type="float">
            <text:p>105.76</text:p>
          </table:table-cell>
          <table:table-cell office:value-type="float" office:value="11080770" calcext:value-type="float">
            <text:p>11080770</text:p>
          </table:table-cell>
          <table:table-cell table:number-columns-repeated="4"/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number-columns-repeated="4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number-columns-repeated="4"/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12685447" calcext:value-type="float">
            <text:p>12685447</text:p>
          </table:table-cell>
          <table:table-cell table:number-columns-repeated="4"/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07.74" calcext:value-type="float">
            <text:p>107.74</text:p>
          </table:table-cell>
          <table:table-cell office:value-type="float" office:value="15623677" calcext:value-type="float">
            <text:p>15623677</text:p>
          </table:table-cell>
          <table:table-cell table:number-columns-repeated="4"/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2625890" calcext:value-type="float">
            <text:p>12625890</text:p>
          </table:table-cell>
          <table:table-cell table:number-columns-repeated="4"/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number-columns-repeated="4"/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number-columns-repeated="4"/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2025-01-12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09.29" calcext:value-type="float">
            <text:p>109.29</text:p>
          </table:table-cell>
          <table:table-cell office:value-type="float" office:value="17073395" calcext:value-type="float">
            <text:p>17073395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191175" calcext:value-type="float">
            <text:p>11191175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111.51" calcext:value-type="float">
            <text:p>111.51</text:p>
          </table:table-cell>
          <table:table-cell office:value-type="float" office:value="14521095" calcext:value-type="float">
            <text:p>14521095</text:p>
          </table:table-cell>
          <table:table-cell table:number-columns-repeated="4"/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111.32" calcext:value-type="float">
            <text:p>111.32</text:p>
          </table:table-cell>
          <table:table-cell office:value-type="float" office:value="10366585" calcext:value-type="float">
            <text:p>10366585</text:p>
          </table:table-cell>
          <table:table-cell table:number-columns-repeated="4"/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2025-01-19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111.47" calcext:value-type="float">
            <text:p>111.47</text:p>
          </table:table-cell>
          <table:table-cell office:value-type="float" office:value="20416286" calcext:value-type="float">
            <text:p>20416286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109.53" calcext:value-type="float">
            <text:p>109.53</text:p>
          </table:table-cell>
          <table:table-cell office:value-type="float" office:value="15718012" calcext:value-type="float">
            <text:p>15718012</text:p>
          </table:table-cell>
          <table:table-cell table:number-columns-repeated="4"/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110.15" calcext:value-type="float">
            <text:p>110.15</text:p>
          </table:table-cell>
          <table:table-cell office:value-type="float" office:value="13726784" calcext:value-type="float">
            <text:p>13726784</text:p>
          </table:table-cell>
          <table:table-cell table:number-columns-repeated="4"/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</table:table-row>
        <table:table-row table:style-name="ro1">
          <table:table-cell office:value-type="date" office:date-value="2025-01-25" calcext:value-type="date">
            <text:p>2025-01-25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</table:table-row>
        <table:table-row table:style-name="ro1">
          <table:table-cell office:value-type="date" office:date-value="2025-01-26" calcext:value-type="date">
            <text:p>2025-01-26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10.17" calcext:value-type="float">
            <text:p>110.17</text:p>
          </table:table-cell>
          <table:table-cell office:value-type="float" office:value="15926670" calcext:value-type="float">
            <text:p>15926670</text:p>
          </table:table-cell>
          <table:table-cell table:number-columns-repeated="4"/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108.04" calcext:value-type="float">
            <text:p>108.04</text:p>
          </table:table-cell>
          <table:table-cell office:value-type="float" office:value="15862029" calcext:value-type="float">
            <text:p>15862029</text:p>
          </table:table-cell>
          <table:table-cell table:number-columns-repeated="4"/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108.67" calcext:value-type="float">
            <text:p>108.67</text:p>
          </table:table-cell>
          <table:table-cell office:value-type="float" office:value="12345523" calcext:value-type="float">
            <text:p>12345523</text:p>
          </table:table-cell>
          <table:table-cell table:number-columns-repeated="4"/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109.57" calcext:value-type="float">
            <text:p>109.57</text:p>
          </table:table-cell>
          <table:table-cell office:value-type="float" office:value="14346335" calcext:value-type="float">
            <text:p>14346335</text:p>
          </table:table-cell>
          <table:table-cell table:number-columns-repeated="4"/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07.09" calcext:value-type="float">
            <text:p>107.09</text:p>
          </table:table-cell>
          <table:table-cell office:value-type="float" office:value="14623197" calcext:value-type="float">
            <text:p>14623197</text:p>
          </table:table-cell>
          <table:table-cell table:number-columns-repeated="4"/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109.96" calcext:value-type="float">
            <text:p>109.96</text:p>
          </table:table-cell>
          <table:table-cell office:value-type="float" office:value="14835692" calcext:value-type="float">
            <text:p>14835692</text:p>
          </table:table-cell>
          <table:table-cell table:number-columns-repeated="4"/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109.88" calcext:value-type="float">
            <text:p>109.88</text:p>
          </table:table-cell>
          <table:table-cell office:value-type="float" office:value="13364387" calcext:value-type="float">
            <text:p>13364387</text:p>
          </table:table-cell>
          <table:table-cell table:number-columns-repeated="4"/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108.43" calcext:value-type="float">
            <text:p>108.43</text:p>
          </table:table-cell>
          <table:table-cell office:value-type="float" office:value="13411401" calcext:value-type="float">
            <text:p>13411401</text:p>
          </table:table-cell>
          <table:table-cell table:number-columns-repeated="4"/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10.97" calcext:value-type="float">
            <text:p>110.97</text:p>
          </table:table-cell>
          <table:table-cell office:value-type="float" office:value="12142197" calcext:value-type="float">
            <text:p>12142197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111.67" calcext:value-type="float">
            <text:p>111.67</text:p>
          </table:table-cell>
          <table:table-cell office:value-type="float" office:value="12713127" calcext:value-type="float">
            <text:p>12713127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8244122" calcext:value-type="float">
            <text:p>18244122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108.13" calcext:value-type="float">
            <text:p>108.13</text:p>
          </table:table-cell>
          <table:table-cell office:value-type="float" office:value="15459952" calcext:value-type="float">
            <text:p>15459952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110.14" calcext:value-type="float">
            <text:p>110.14</text:p>
          </table:table-cell>
          <table:table-cell office:value-type="float" office:value="20060298" calcext:value-type="float">
            <text:p>20060298</text:p>
          </table:table-cell>
          <table:table-cell table:number-columns-repeated="4"/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110.3" calcext:value-type="float">
            <text:p>110.3</text:p>
          </table:table-cell>
          <table:table-cell office:value-type="float" office:value="10964698" calcext:value-type="float">
            <text:p>10964698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112" calcext:value-type="float">
            <text:p>112</text:p>
          </table:table-cell>
          <table:table-cell office:value-type="float" office:value="16325803" calcext:value-type="float">
            <text:p>16325803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11.27" calcext:value-type="float">
            <text:p>111.27</text:p>
          </table:table-cell>
          <table:table-cell office:value-type="float" office:value="13153471" calcext:value-type="float">
            <text:p>13153471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109.73" calcext:value-type="float">
            <text:p>109.73</text:p>
          </table:table-cell>
          <table:table-cell office:value-type="float" office:value="14496964" calcext:value-type="float">
            <text:p>14496964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446405" calcext:value-type="float">
            <text:p>10446405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5293173" calcext:value-type="float">
            <text:p>15293173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07.76" calcext:value-type="float">
            <text:p>107.76</text:p>
          </table:table-cell>
          <table:table-cell office:value-type="float" office:value="18706879" calcext:value-type="float">
            <text:p>18706879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107.54" calcext:value-type="float">
            <text:p>107.54</text:p>
          </table:table-cell>
          <table:table-cell office:value-type="float" office:value="19394905" calcext:value-type="float">
            <text:p>19394905</text:p>
          </table:table-cell>
          <table:table-cell table:number-columns-repeated="4"/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105.44" calcext:value-type="float">
            <text:p>105.44</text:p>
          </table:table-cell>
          <table:table-cell office:value-type="float" office:value="24822245" calcext:value-type="float">
            <text:p>2482224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7150233" calcext:value-type="float">
            <text:p>17150233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11.8" calcext:value-type="float">
            <text:p>111.8</text:p>
          </table:table-cell>
          <table:table-cell office:value-type="float" office:value="22749073" calcext:value-type="float">
            <text:p>22749073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109.16" calcext:value-type="float">
            <text:p>109.16</text:p>
          </table:table-cell>
          <table:table-cell office:value-type="float" office:value="19904735" calcext:value-type="float">
            <text:p>19904735</text:p>
          </table:table-cell>
          <table:table-cell table:number-columns-repeated="4"/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109.13" calcext:value-type="float">
            <text:p>109.13</text:p>
          </table:table-cell>
          <table:table-cell office:value-type="float" office:value="14051500" calcext:value-type="float">
            <text:p>14051500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108.67" calcext:value-type="float">
            <text:p>108.67</text:p>
          </table:table-cell>
          <table:table-cell office:value-type="float" office:value="17767836" calcext:value-type="float">
            <text:p>17767836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13.76" calcext:value-type="float">
            <text:p>113.76</text:p>
          </table:table-cell>
          <table:table-cell office:value-type="float" office:value="19908789" calcext:value-type="float">
            <text:p>19908789</text:p>
          </table:table-cell>
          <table:table-cell table:number-columns-repeated="4"/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5998713" calcext:value-type="float">
            <text:p>15998713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115.41" calcext:value-type="float">
            <text:p>115.41</text:p>
          </table:table-cell>
          <table:table-cell office:value-type="float" office:value="17315001" calcext:value-type="float">
            <text:p>17315001</text:p>
          </table:table-cell>
          <table:table-cell table:number-columns-repeated="4"/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115.9" calcext:value-type="float">
            <text:p>115.9</text:p>
          </table:table-cell>
          <table:table-cell office:value-type="float" office:value="16230772" calcext:value-type="float">
            <text:p>16230772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15.8" calcext:value-type="float">
            <text:p>115.8</text:p>
          </table:table-cell>
          <table:table-cell office:value-type="float" office:value="14207469" calcext:value-type="float">
            <text:p>14207469</text:p>
          </table:table-cell>
          <table:table-cell table:number-columns-repeated="4"/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081795" calcext:value-type="float">
            <text:p>12081795</text:p>
          </table:table-cell>
          <table:table-cell table:number-columns-repeated="4"/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118.27" calcext:value-type="float">
            <text:p>118.27</text:p>
          </table:table-cell>
          <table:table-cell office:value-type="float" office:value="14112756" calcext:value-type="float">
            <text:p>14112756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117.89" calcext:value-type="float">
            <text:p>117.89</text:p>
          </table:table-cell>
          <table:table-cell office:value-type="float" office:value="12740786" calcext:value-type="float">
            <text:p>12740786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18.93" calcext:value-type="float">
            <text:p>118.93</text:p>
          </table:table-cell>
          <table:table-cell office:value-type="float" office:value="21652345" calcext:value-type="float">
            <text:p>21652345</text:p>
          </table:table-cell>
          <table:table-cell table:number-columns-repeated="4"/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119.04" calcext:value-type="float">
            <text:p>119.04</text:p>
          </table:table-cell>
          <table:table-cell office:value-type="float" office:value="12425434" calcext:value-type="float">
            <text:p>12425434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118.67" calcext:value-type="float">
            <text:p>118.67</text:p>
          </table:table-cell>
          <table:table-cell office:value-type="float" office:value="12614605" calcext:value-type="float">
            <text:p>1261460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112.43" calcext:value-type="float">
            <text:p>112.43</text:p>
          </table:table-cell>
          <table:table-cell office:value-type="float" office:value="21204636" calcext:value-type="float">
            <text:p>21204636</text:p>
          </table:table-cell>
          <table:table-cell table:number-columns-repeated="4"/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02.94" calcext:value-type="float">
            <text:p>102.94</text:p>
          </table:table-cell>
          <table:table-cell office:value-type="float" office:value="35068450" calcext:value-type="float">
            <text:p>35068450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100.77" calcext:value-type="float">
            <text:p>100.77</text:p>
          </table:table-cell>
          <table:table-cell office:value-type="float" office:value="27147750" calcext:value-type="float">
            <text:p>27147750</text:p>
          </table:table-cell>
          <table:table-cell table:number-columns-repeated="4"/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105.8" calcext:value-type="float">
            <text:p>105.8</text:p>
          </table:table-cell>
          <table:table-cell office:value-type="float" office:value="30063287" calcext:value-type="float">
            <text:p>30063287</text:p>
          </table:table-cell>
          <table:table-cell table:number-columns-repeated="4"/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99.93" calcext:value-type="float">
            <text:p>99.93</text:p>
          </table:table-cell>
          <table:table-cell office:value-type="float" office:value="33999317" calcext:value-type="float">
            <text:p>33999317</text:p>
          </table:table-cell>
          <table:table-cell table:number-columns-repeated="4"/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03.39" calcext:value-type="float">
            <text:p>103.39</text:p>
          </table:table-cell>
          <table:table-cell office:value-type="float" office:value="18019969" calcext:value-type="float">
            <text:p>18019969</text:p>
          </table:table-cell>
          <table:table-cell table:number-columns-repeated="4"/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103.1" calcext:value-type="float">
            <text:p>103.1</text:p>
          </table:table-cell>
          <table:table-cell office:value-type="float" office:value="13164863" calcext:value-type="float">
            <text:p>13164863</text:p>
          </table:table-cell>
          <table:table-cell table:number-columns-repeated="4"/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104.19" calcext:value-type="float">
            <text:p>104.19</text:p>
          </table:table-cell>
          <table:table-cell office:value-type="float" office:value="13607024" calcext:value-type="float">
            <text:p>13607024</text:p>
          </table:table-cell>
          <table:table-cell table:number-columns-repeated="4"/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05.35" calcext:value-type="float">
            <text:p>105.35</text:p>
          </table:table-cell>
          <table:table-cell office:value-type="float" office:value="16926493" calcext:value-type="float">
            <text:p>16926493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108.3" calcext:value-type="float">
            <text:p>108.3</text:p>
          </table:table-cell>
          <table:table-cell office:value-type="float" office:value="13147049" calcext:value-type="float">
            <text:p>13147049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4235710" calcext:value-type="float">
            <text:p>14235710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108.63" calcext:value-type="float">
            <text:p>108.63</text:p>
          </table:table-cell>
          <table:table-cell office:value-type="float" office:value="9849553" calcext:value-type="float">
            <text:p>9849553</text:p>
          </table:table-cell>
          <table:table-cell table:number-columns-repeated="4"/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08.63" calcext:value-type="float">
            <text:p>108.63</text:p>
          </table:table-cell>
          <table:table-cell office:value-type="float" office:value="13890869" calcext:value-type="float">
            <text:p>13890869</text:p>
          </table:table-cell>
          <table:table-cell table:number-columns-repeated="4"/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108.36" calcext:value-type="float">
            <text:p>108.36</text:p>
          </table:table-cell>
          <table:table-cell office:value-type="float" office:value="9483135" calcext:value-type="float">
            <text:p>9483135</text:p>
          </table:table-cell>
          <table:table-cell table:number-columns-repeated="4"/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105.63" calcext:value-type="float">
            <text:p>105.63</text:p>
          </table:table-cell>
          <table:table-cell office:value-type="float" office:value="20379282" calcext:value-type="float">
            <text:p>20379282</text:p>
          </table:table-cell>
          <table:table-cell table:number-columns-repeated="4"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105.78" calcext:value-type="float">
            <text:p>105.78</text:p>
          </table:table-cell>
          <table:table-cell office:value-type="float" office:value="18610256" calcext:value-type="float">
            <text:p>18610256</text:p>
          </table:table-cell>
          <table:table-cell table:number-columns-repeated="4"/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03.27" calcext:value-type="float">
            <text:p>103.27</text:p>
          </table:table-cell>
          <table:table-cell office:value-type="float" office:value="19623970" calcext:value-type="float">
            <text:p>19623970</text:p>
          </table:table-cell>
          <table:table-cell table:number-columns-repeated="4"/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104.71" calcext:value-type="float">
            <text:p>104.71</text:p>
          </table:table-cell>
          <table:table-cell office:value-type="float" office:value="16303449" calcext:value-type="float">
            <text:p>16303449</text:p>
          </table:table-cell>
          <table:table-cell table:number-columns-repeated="4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04.61" calcext:value-type="float">
            <text:p>104.61</text:p>
          </table:table-cell>
          <table:table-cell office:value-type="float" office:value="12335924" calcext:value-type="float">
            <text:p>12335924</text:p>
          </table:table-cell>
          <table:table-cell table:number-columns-repeated="4"/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196548" calcext:value-type="float">
            <text:p>19196548</text:p>
          </table:table-cell>
          <table:table-cell table:number-columns-repeated="4"/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</table:table-row>
        <table:table-row table:style-name="ro1">
          <table:table-cell office:value-type="date" office:date-value="2025-05-11" calcext:value-type="date">
            <text:p>2025-05-11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09.16" calcext:value-type="float">
            <text:p>109.16</text:p>
          </table:table-cell>
          <table:table-cell office:value-type="float" office:value="14244559" calcext:value-type="float">
            <text:p>14244559</text:p>
          </table:table-cell>
          <table:table-cell table:number-columns-repeated="4"/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109.46" calcext:value-type="float">
            <text:p>109.46</text:p>
          </table:table-cell>
          <table:table-cell office:value-type="float" office:value="13350836" calcext:value-type="float">
            <text:p>13350836</text:p>
          </table:table-cell>
          <table:table-cell table:number-columns-repeated="4"/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108.48" calcext:value-type="float">
            <text:p>108.48</text:p>
          </table:table-cell>
          <table:table-cell office:value-type="float" office:value="15494932" calcext:value-type="float">
            <text:p>15494932</text:p>
          </table:table-cell>
          <table:table-cell table:number-columns-repeated="4"/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108.58" calcext:value-type="float">
            <text:p>108.58</text:p>
          </table:table-cell>
          <table:table-cell office:value-type="float" office:value="15004291" calcext:value-type="float">
            <text:p>15004291</text:p>
          </table:table-cell>
          <table:table-cell table:number-columns-repeated="4"/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</table:table-row>
        <table:table-row table:style-name="ro1">
          <table:table-cell office:value-type="date" office:date-value="2025-05-17" calcext:value-type="date">
            <text:p>2025-05-17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</table:table-row>
        <table:table-row table:style-name="ro1">
          <table:table-cell office:value-type="date" office:date-value="2025-05-18" calcext:value-type="date">
            <text:p>2025-05-18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06.47" calcext:value-type="float">
            <text:p>106.47</text:p>
          </table:table-cell>
          <table:table-cell office:value-type="float" office:value="16802719" calcext:value-type="float">
            <text:p>16802719</text:p>
          </table:table-cell>
          <table:table-cell table:number-columns-repeated="4"/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2429321" calcext:value-type="float">
            <text:p>12429321</text:p>
          </table:table-cell>
          <table:table-cell table:number-columns-repeated="4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103.66" calcext:value-type="float">
            <text:p>103.66</text:p>
          </table:table-cell>
          <table:table-cell office:value-type="float" office:value="16716079" calcext:value-type="float">
            <text:p>16716079</text:p>
          </table:table-cell>
          <table:table-cell table:number-columns-repeated="4"/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102.97" calcext:value-type="float">
            <text:p>102.97</text:p>
          </table:table-cell>
          <table:table-cell office:value-type="float" office:value="13417378" calcext:value-type="float">
            <text:p>13417378</text:p>
          </table:table-cell>
          <table:table-cell table:number-columns-repeated="4"/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4" calcext:value-type="date">
            <text:p>2025-05-2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103.52" calcext:value-type="float">
            <text:p>103.52</text:p>
          </table:table-cell>
          <table:table-cell office:value-type="float" office:value="13043604" calcext:value-type="float">
            <text:p>13043604</text:p>
          </table:table-cell>
          <table:table-cell table:number-columns-repeated="4"/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102.11" calcext:value-type="float">
            <text:p>102.11</text:p>
          </table:table-cell>
          <table:table-cell office:value-type="float" office:value="14292377" calcext:value-type="float">
            <text:p>14292377</text:p>
          </table:table-cell>
          <table:table-cell table:number-columns-repeated="4"/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102.69" calcext:value-type="float">
            <text:p>102.69</text:p>
          </table:table-cell>
          <table:table-cell office:value-type="float" office:value="13832487" calcext:value-type="float">
            <text:p>13832487</text:p>
          </table:table-cell>
          <table:table-cell table:number-columns-repeated="4"/>
        </table:table-row>
        <table:table-row table:style-name="ro1">
          <table:table-cell office:value-type="date" office:date-value="2025-05-30" calcext:value-type="date">
            <text:p>2025-05-30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</table:table-row>
        <table:table-row table:style-name="ro1">
          <table:table-cell office:value-type="date" office:date-value="2025-06-01" calcext:value-type="date">
            <text:p>2025-06-01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03.05" calcext:value-type="float">
            <text:p>103.05</text:p>
          </table:table-cell>
          <table:table-cell office:value-type="float" office:value="17290462" calcext:value-type="float">
            <text:p>17290462</text:p>
          </table:table-cell>
          <table:table-cell table:number-columns-repeated="4"/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103.8" calcext:value-type="float">
            <text:p>103.8</text:p>
          </table:table-cell>
          <table:table-cell office:value-type="float" office:value="19194335" calcext:value-type="float">
            <text:p>19194335</text:p>
          </table:table-cell>
          <table:table-cell table:number-columns-repeated="4"/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102.3" calcext:value-type="float">
            <text:p>102.3</text:p>
          </table:table-cell>
          <table:table-cell office:value-type="float" office:value="15648515" calcext:value-type="float">
            <text:p>15648515</text:p>
          </table:table-cell>
          <table:table-cell table:number-columns-repeated="4"/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942218" calcext:value-type="float">
            <text:p>13942218</text:p>
          </table:table-cell>
          <table:table-cell table:number-columns-repeated="4"/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</table:table-row>
        <table:table-row table:style-name="ro1">
          <table:table-cell office:value-type="date" office:date-value="2025-06-07" calcext:value-type="date">
            <text:p>2025-06-07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</table:table-row>
        <table:table-row table:style-name="ro1">
          <table:table-cell office:value-type="date" office:date-value="2025-06-08" calcext:value-type="date">
            <text:p>2025-06-08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04.97" calcext:value-type="float">
            <text:p>104.97</text:p>
          </table:table-cell>
          <table:table-cell office:value-type="float" office:value="17087328" calcext:value-type="float">
            <text:p>17087328</text:p>
          </table:table-cell>
          <table:table-cell table:number-columns-repeated="4"/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107.22" calcext:value-type="float">
            <text:p>107.22</text:p>
          </table:table-cell>
          <table:table-cell office:value-type="float" office:value="17634793" calcext:value-type="float">
            <text:p>17634793</text:p>
          </table:table-cell>
          <table:table-cell table:number-columns-repeated="4"/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109.31" calcext:value-type="float">
            <text:p>109.31</text:p>
          </table:table-cell>
          <table:table-cell office:value-type="float" office:value="22648191" calcext:value-type="float">
            <text:p>22648191</text:p>
          </table:table-cell>
          <table:table-cell table:number-columns-repeated="4"/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109.73" calcext:value-type="float">
            <text:p>109.73</text:p>
          </table:table-cell>
          <table:table-cell office:value-type="float" office:value="17469408" calcext:value-type="float">
            <text:p>17469408</text:p>
          </table:table-cell>
          <table:table-cell table:number-columns-repeated="4"/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</table:table-row>
        <table:table-row table:style-name="ro1">
          <table:table-cell office:value-type="date" office:date-value="2025-06-14" calcext:value-type="date">
            <text:p>2025-06-14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</table:table-row>
        <table:table-row table:style-name="ro1">
          <table:table-cell office:value-type="date" office:date-value="2025-06-15" calcext:value-type="date">
            <text:p>2025-06-15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12.48" calcext:value-type="float">
            <text:p>112.48</text:p>
          </table:table-cell>
          <table:table-cell office:value-type="float" office:value="22986113" calcext:value-type="float">
            <text:p>22986113</text:p>
          </table:table-cell>
          <table:table-cell table:number-columns-repeated="4"/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114" calcext:value-type="float">
            <text:p>114</text:p>
          </table:table-cell>
          <table:table-cell office:value-type="float" office:value="19451701" calcext:value-type="float">
            <text:p>19451701</text:p>
          </table:table-cell>
          <table:table-cell table:number-columns-repeated="4"/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number-columns-repeated="4"/>
        </table:table-row>
        <table:table-row table:style-name="ro1">
          <table:table-cell office:value-type="date" office:date-value="2025-06-19" calcext:value-type="date">
            <text:p>2025-06-19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number-columns-repeated="4"/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</table:table-row>
        <table:table-row table:style-name="ro1">
          <table:table-cell office:value-type="date" office:date-value="2025-06-21" calcext:value-type="date">
            <text:p>2025-06-21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</table:table-row>
        <table:table-row table:style-name="ro1">
          <table:table-cell office:value-type="date" office:date-value="2025-06-22" calcext:value-type="date">
            <text:p>2025-06-22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11.74" calcext:value-type="float">
            <text:p>111.74</text:p>
          </table:table-cell>
          <table:table-cell office:value-type="float" office:value="26631056" calcext:value-type="float">
            <text:p>26631056</text:p>
          </table:table-cell>
          <table:table-cell table:number-columns-repeated="4"/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108.34" calcext:value-type="float">
            <text:p>108.34</text:p>
          </table:table-cell>
          <table:table-cell office:value-type="float" office:value="24828277" calcext:value-type="float">
            <text:p>24828277</text:p>
          </table:table-cell>
          <table:table-cell table:number-columns-repeated="4"/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7483231" calcext:value-type="float">
            <text:p>17483231</text:p>
          </table:table-cell>
          <table:table-cell table:number-columns-repeated="4"/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109.99" calcext:value-type="float">
            <text:p>109.99</text:p>
          </table:table-cell>
          <table:table-cell office:value-type="float" office:value="18304841" calcext:value-type="float">
            <text:p>18304841</text:p>
          </table:table-cell>
          <table:table-cell table:number-columns-repeated="4"/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</table:table-row>
        <table:table-row table:style-name="ro1">
          <table:table-cell office:value-type="date" office:date-value="2025-06-28" calcext:value-type="date">
            <text:p>2025-06-28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</table:table-row>
        <table:table-row table:style-name="ro1">
          <table:table-cell office:value-type="date" office:date-value="2025-06-29" calcext:value-type="date">
            <text:p>2025-06-29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07.8" calcext:value-type="float">
            <text:p>107.8</text:p>
          </table:table-cell>
          <table:table-cell office:value-type="float" office:value="19199048" calcext:value-type="float">
            <text:p>19199048</text:p>
          </table:table-cell>
          <table:table-cell table:number-columns-repeated="4"/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109.24" calcext:value-type="float">
            <text:p>109.24</text:p>
          </table:table-cell>
          <table:table-cell office:value-type="float" office:value="15536896" calcext:value-type="float">
            <text:p>15536896</text:p>
          </table:table-cell>
          <table:table-cell table:number-columns-repeated="4"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892160" calcext:value-type="float">
            <text:p>11892160</text:p>
          </table:table-cell>
          <table:table-cell table:number-columns-repeated="4"/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4" calcext:value-type="date">
            <text:p>2025-07-04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5" calcext:value-type="date">
            <text:p>2025-07-05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6" calcext:value-type="date">
            <text:p>2025-07-06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11.11" calcext:value-type="float">
            <text:p>111.11</text:p>
          </table:table-cell>
          <table:table-cell office:value-type="float" office:value="15415889" calcext:value-type="float">
            <text:p>15415889</text:p>
          </table:table-cell>
          <table:table-cell table:number-columns-repeated="4"/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114.19" calcext:value-type="float">
            <text:p>114.19</text:p>
          </table:table-cell>
          <table:table-cell office:value-type="float" office:value="17913404" calcext:value-type="float">
            <text:p>17913404</text:p>
          </table:table-cell>
          <table:table-cell table:number-columns-repeated="4"/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113.8" calcext:value-type="float">
            <text:p>113.8</text:p>
          </table:table-cell>
          <table:table-cell office:value-type="float" office:value="10652062" calcext:value-type="float">
            <text:p>10652062</text:p>
          </table:table-cell>
          <table:table-cell table:number-columns-repeated="4"/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114.93" calcext:value-type="float">
            <text:p>114.93</text:p>
          </table:table-cell>
          <table:table-cell office:value-type="float" office:value="14903884" calcext:value-type="float">
            <text:p>14903884</text:p>
          </table:table-cell>
          <table:table-cell table:number-columns-repeated="4"/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</table:table-row>
        <table:table-row table:style-name="ro1">
          <table:table-cell office:value-type="date" office:date-value="2025-07-12" calcext:value-type="date">
            <text:p>2025-07-12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</table:table-row>
        <table:table-row table:style-name="ro1">
          <table:table-cell office:value-type="date" office:date-value="2025-07-13" calcext:value-type="date">
            <text:p>2025-07-13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13.92" calcext:value-type="float">
            <text:p>113.92</text:p>
          </table:table-cell>
          <table:table-cell office:value-type="float" office:value="13220303" calcext:value-type="float">
            <text:p>13220303</text:p>
          </table:table-cell>
          <table:table-cell table:number-columns-repeated="4"/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59347" calcext:value-type="float">
            <text:p>10959347</text:p>
          </table:table-cell>
          <table:table-cell table:number-columns-repeated="4"/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112.23" calcext:value-type="float">
            <text:p>112.23</text:p>
          </table:table-cell>
          <table:table-cell office:value-type="float" office:value="11158852" calcext:value-type="float">
            <text:p>11158852</text:p>
          </table:table-cell>
          <table:table-cell table:number-columns-repeated="4"/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111.66" calcext:value-type="float">
            <text:p>111.66</text:p>
          </table:table-cell>
          <table:table-cell office:value-type="float" office:value="13151446" calcext:value-type="float">
            <text:p>13151446</text:p>
          </table:table-cell>
          <table:table-cell table:number-columns-repeated="4"/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</table:table-row>
        <table:table-row table:style-name="ro1">
          <table:table-cell office:value-type="date" office:date-value="2025-07-19" calcext:value-type="date">
            <text:p>2025-07-19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</table:table-row>
        <table:table-row table:style-name="ro1">
          <table:table-cell office:value-type="date" office:date-value="2025-07-20" calcext:value-type="date">
            <text:p>2025-07-20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08.05" calcext:value-type="float">
            <text:p>108.05</text:p>
          </table:table-cell>
          <table:table-cell office:value-type="float" office:value="17010405" calcext:value-type="float">
            <text:p>17010405</text:p>
          </table:table-cell>
          <table:table-cell table:number-columns-repeated="4"/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108.54" calcext:value-type="float">
            <text:p>108.54</text:p>
          </table:table-cell>
          <table:table-cell office:value-type="float" office:value="13970885" calcext:value-type="float">
            <text:p>13970885</text:p>
          </table:table-cell>
          <table:table-cell table:number-columns-repeated="4"/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109.93" calcext:value-type="float">
            <text:p>109.93</text:p>
          </table:table-cell>
          <table:table-cell office:value-type="float" office:value="12002687" calcext:value-type="float">
            <text:p>12002687</text:p>
          </table:table-cell>
          <table:table-cell table:number-columns-repeated="4"/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110.79" calcext:value-type="float">
            <text:p>110.79</text:p>
          </table:table-cell>
          <table:table-cell office:value-type="float" office:value="15647208" calcext:value-type="float">
            <text:p>15647208</text:p>
          </table:table-cell>
          <table:table-cell table:number-columns-repeated="4"/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</table:table-row>
        <table:table-row table:style-name="ro1">
          <table:table-cell office:value-type="date" office:date-value="2025-07-26" calcext:value-type="date">
            <text:p>2025-07-26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</table:table-row>
        <table:table-row table:style-name="ro1">
          <table:table-cell office:value-type="date" office:date-value="2025-07-27" calcext:value-type="date">
            <text:p>2025-07-27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11.44" calcext:value-type="float">
            <text:p>111.44</text:p>
          </table:table-cell>
          <table:table-cell office:value-type="float" office:value="12352966" calcext:value-type="float">
            <text:p>12352966</text:p>
          </table:table-cell>
          <table:table-cell table:number-columns-repeated="4"/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112.88" calcext:value-type="float">
            <text:p>112.88</text:p>
          </table:table-cell>
          <table:table-cell office:value-type="float" office:value="15927998" calcext:value-type="float">
            <text:p>15927998</text:p>
          </table:table-cell>
          <table:table-cell table:number-columns-repeated="4"/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111.9" calcext:value-type="float">
            <text:p>111.9</text:p>
          </table:table-cell>
          <table:table-cell office:value-type="float" office:value="12996905" calcext:value-type="float">
            <text:p>12996905</text:p>
          </table:table-cell>
          <table:table-cell table:number-columns-repeated="4"/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7233744" calcext:value-type="float">
            <text:p>17233744</text:p>
          </table:table-cell>
          <table:table-cell table:number-columns-repeated="4"/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</table:table-row>
        <table:table-row table:style-name="ro1">
          <table:table-cell office:value-type="date" office:date-value="2025-08-03" calcext:value-type="date">
            <text:p>2025-08-03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07.37" calcext:value-type="float">
            <text:p>107.37</text:p>
          </table:table-cell>
          <table:table-cell office:value-type="float" office:value="19129474" calcext:value-type="float">
            <text:p>19129474</text:p>
          </table:table-cell>
          <table:table-cell table:number-columns-repeated="4"/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107.24" calcext:value-type="float">
            <text:p>107.24</text:p>
          </table:table-cell>
          <table:table-cell office:value-type="float" office:value="21314254" calcext:value-type="float">
            <text:p>21314254</text:p>
          </table:table-cell>
          <table:table-cell table:number-columns-repeated="4"/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106.51" calcext:value-type="float">
            <text:p>106.51</text:p>
          </table:table-cell>
          <table:table-cell office:value-type="float" office:value="15321811" calcext:value-type="float">
            <text:p>15321811</text:p>
          </table:table-cell>
          <table:table-cell table:number-columns-repeated="4"/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105.95" calcext:value-type="float">
            <text:p>105.95</text:p>
          </table:table-cell>
          <table:table-cell office:value-type="float" office:value="13468287" calcext:value-type="float">
            <text:p>13468287</text:p>
          </table:table-cell>
          <table:table-cell table:number-columns-repeated="4"/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</table:table-row>
        <table:table-row table:style-name="ro1">
          <table:table-cell office:value-type="date" office:date-value="2025-08-09" calcext:value-type="date">
            <text:p>2025-08-09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</table:table-row>
        <table:table-row table:style-name="ro1">
          <table:table-cell office:value-type="date" office:date-value="2025-08-10" calcext:value-type="date">
            <text:p>2025-08-10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05.83" calcext:value-type="float">
            <text:p>105.83</text:p>
          </table:table-cell>
          <table:table-cell office:value-type="float" office:value="13570661" calcext:value-type="float">
            <text:p>13570661</text:p>
          </table:table-cell>
          <table:table-cell table:number-columns-repeated="4"/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106.13" calcext:value-type="float">
            <text:p>106.13</text:p>
          </table:table-cell>
          <table:table-cell office:value-type="float" office:value="14113216" calcext:value-type="float">
            <text:p>14113216</text:p>
          </table:table-cell>
          <table:table-cell table:number-columns-repeated="4"/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107.6" calcext:value-type="float">
            <text:p>107.6</text:p>
          </table:table-cell>
          <table:table-cell office:value-type="float" office:value="17958695" calcext:value-type="float">
            <text:p>17958695</text:p>
          </table:table-cell>
          <table:table-cell table:number-columns-repeated="4"/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107.38" calcext:value-type="float">
            <text:p>107.38</text:p>
          </table:table-cell>
          <table:table-cell office:value-type="float" office:value="13683472" calcext:value-type="float">
            <text:p>13683472</text:p>
          </table:table-cell>
          <table:table-cell table:number-columns-repeated="4"/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</table:table-row>
        <table:table-row table:style-name="ro1">
          <table:table-cell office:value-type="date" office:date-value="2025-08-16" calcext:value-type="date">
            <text:p>2025-08-16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06.72" calcext:value-type="float">
            <text:p>106.72</text:p>
          </table:table-cell>
          <table:table-cell office:value-type="float" office:value="13040018" calcext:value-type="float">
            <text:p>13040018</text:p>
          </table:table-cell>
          <table:table-cell table:number-columns-repeated="4"/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107.42" calcext:value-type="float">
            <text:p>107.42</text:p>
          </table:table-cell>
          <table:table-cell office:value-type="float" office:value="16113611" calcext:value-type="float">
            <text:p>16113611</text:p>
          </table:table-cell>
          <table:table-cell table:number-columns-repeated="4"/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108.53" calcext:value-type="float">
            <text:p>108.53</text:p>
          </table:table-cell>
          <table:table-cell office:value-type="float" office:value="18959716" calcext:value-type="float">
            <text:p>18959716</text:p>
          </table:table-cell>
          <table:table-cell table:number-columns-repeated="4"/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109.23" calcext:value-type="float">
            <text:p>109.23</text:p>
          </table:table-cell>
          <table:table-cell office:value-type="float" office:value="12194897" calcext:value-type="float">
            <text:p>12194897</text:p>
          </table:table-cell>
          <table:table-cell table:number-columns-repeated="4"/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</table:table-row>
        <table:table-row table:style-name="ro1">
          <table:table-cell office:value-type="date" office:date-value="2025-08-23" calcext:value-type="date">
            <text:p>2025-08-23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</table:table-row>
        <table:table-row table:style-name="ro1">
          <table:table-cell office:value-type="date" office:date-value="2025-08-24" calcext:value-type="date">
            <text:p>2025-08-24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11.74" calcext:value-type="float">
            <text:p>111.74</text:p>
          </table:table-cell>
          <table:table-cell office:value-type="float" office:value="9744897" calcext:value-type="float">
            <text:p>9744897</text:p>
          </table:table-cell>
          <table:table-cell table:number-columns-repeated="4"/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111.49" calcext:value-type="float">
            <text:p>111.49</text:p>
          </table:table-cell>
          <table:table-cell office:value-type="float" office:value="18143880" calcext:value-type="float">
            <text:p>18143880</text:p>
          </table:table-cell>
          <table:table-cell table:number-columns-repeated="4"/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112.75" calcext:value-type="float">
            <text:p>112.75</text:p>
          </table:table-cell>
          <table:table-cell office:value-type="float" office:value="15262630" calcext:value-type="float">
            <text:p>15262630</text:p>
          </table:table-cell>
          <table:table-cell table:number-columns-repeated="4"/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113.35" calcext:value-type="float">
            <text:p>113.35</text:p>
          </table:table-cell>
          <table:table-cell office:value-type="float" office:value="14189829" calcext:value-type="float">
            <text:p>14189829</text:p>
          </table:table-cell>
          <table:table-cell table:number-columns-repeated="4"/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8-30" calcext:value-type="date">
            <text:p>2025-08-30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8-31" calcext:value-type="date">
            <text:p>2025-08-3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114.69" calcext:value-type="float">
            <text:p>114.69</text:p>
          </table:table-cell>
          <table:table-cell office:value-type="float" office:value="15206667" calcext:value-type="float">
            <text:p>15206667</text:p>
          </table:table-cell>
          <table:table-cell table:number-columns-repeated="4"/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111.91" calcext:value-type="float">
            <text:p>111.91</text:p>
          </table:table-cell>
          <table:table-cell office:value-type="float" office:value="14920087" calcext:value-type="float">
            <text:p>14920087</text:p>
          </table:table-cell>
          <table:table-cell table:number-columns-repeated="4"/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112.4" calcext:value-type="float">
            <text:p>112.4</text:p>
          </table:table-cell>
          <table:table-cell office:value-type="float" office:value="12864438" calcext:value-type="float">
            <text:p>12864438</text:p>
          </table:table-cell>
          <table:table-cell table:number-columns-repeated="4"/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</table:table-row>
        <table:table-row table:style-name="ro1">
          <table:table-cell office:value-type="date" office:date-value="2025-09-06" calcext:value-type="date">
            <text:p>2025-09-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</table:table-row>
        <table:table-row table:style-name="ro1">
          <table:table-cell office:value-type="date" office:date-value="2025-09-07" calcext:value-type="date">
            <text:p>2025-09-07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09.85" calcext:value-type="float">
            <text:p>109.85</text:p>
          </table:table-cell>
          <table:table-cell office:value-type="float" office:value="15440513" calcext:value-type="float">
            <text:p>15440513</text:p>
          </table:table-cell>
          <table:table-cell table:number-columns-repeated="4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4899502" calcext:value-type="float">
            <text:p>14899502</text:p>
          </table:table-cell>
          <table:table-cell table:number-columns-repeated="4"/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112.5" calcext:value-type="float">
            <text:p>112.5</text:p>
          </table:table-cell>
          <table:table-cell office:value-type="float" office:value="15837583" calcext:value-type="float">
            <text:p>15837583</text:p>
          </table:table-cell>
          <table:table-cell table:number-columns-repeated="4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12.14" calcext:value-type="float">
            <text:p>112.14</text:p>
          </table:table-cell>
          <table:table-cell office:value-type="float" office:value="11534502" calcext:value-type="float">
            <text:p>11534502</text:p>
          </table:table-cell>
          <table:table-cell table:number-columns-repeated="4"/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</table:table-row>
        <table:table-row table:style-name="ro1">
          <table:table-cell office:value-type="date" office:date-value="2025-09-14" calcext:value-type="date">
            <text:p>2025-09-14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12.35" calcext:value-type="float">
            <text:p>112.35</text:p>
          </table:table-cell>
          <table:table-cell office:value-type="float" office:value="12880487" calcext:value-type="float">
            <text:p>12880487</text:p>
          </table:table-cell>
          <table:table-cell table:number-columns-repeated="4"/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208044" calcext:value-type="float">
            <text:p>17208044</text:p>
          </table:table-cell>
          <table:table-cell table:number-columns-repeated="4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15.29" calcext:value-type="float">
            <text:p>115.29</text:p>
          </table:table-cell>
          <table:table-cell office:value-type="float" office:value="13302030" calcext:value-type="float">
            <text:p>13302030</text:p>
          </table:table-cell>
          <table:table-cell table:number-columns-repeated="4"/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4628726" calcext:value-type="float">
            <text:p>14628726</text:p>
          </table:table-cell>
          <table:table-cell table:number-columns-repeated="4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</table:table-row>
        <table:table-row table:style-name="ro1">
          <table:table-cell office:value-type="date" office:date-value="2025-09-20" calcext:value-type="date">
            <text:p>2025-09-20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</table:table-row>
        <table:table-row table:style-name="ro1">
          <table:table-cell office:value-type="date" office:date-value="2025-09-21" calcext:value-type="date">
            <text:p>2025-09-21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5611495" calcext:value-type="float">
            <text:p>15611495</text:p>
          </table:table-cell>
          <table:table-cell table:number-columns-repeated="4"/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113.95" calcext:value-type="float">
            <text:p>113.95</text:p>
          </table:table-cell>
          <table:table-cell office:value-type="float" office:value="25369106" calcext:value-type="float">
            <text:p>25369106</text:p>
          </table:table-cell>
          <table:table-cell table:number-columns-repeated="4"/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114.56" calcext:value-type="float">
            <text:p>114.56</text:p>
          </table:table-cell>
          <table:table-cell office:value-type="float" office:value="14756050" calcext:value-type="float">
            <text:p>14756050</text:p>
          </table:table-cell>
          <table:table-cell table:number-columns-repeated="4"/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115.59" calcext:value-type="float">
            <text:p>115.59</text:p>
          </table:table-cell>
          <table:table-cell office:value-type="float" office:value="15012553" calcext:value-type="float">
            <text:p>15012553</text:p>
          </table:table-cell>
          <table:table-cell table:number-columns-repeated="4"/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</table:table-row>
        <table:table-row table:style-name="ro1">
          <table:table-cell office:value-type="date" office:date-value="2025-09-27" calcext:value-type="date">
            <text:p>2025-09-2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</table:table-row>
        <table:table-row table:style-name="ro1">
          <table:table-cell office:value-type="date" office:date-value="2025-09-28" calcext:value-type="date">
            <text:p>2025-09-28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14.22" calcext:value-type="float">
            <text:p>114.22</text:p>
          </table:table-cell>
          <table:table-cell office:value-type="float" office:value="19189260" calcext:value-type="float">
            <text:p>191892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112.75" calcext:value-type="float">
            <text:p>112.75</text:p>
          </table:table-cell>
          <table:table-cell office:value-type="float" office:value="18076211" calcext:value-type="float">
            <text:p>18076211</text:p>
          </table:table-cell>
          <table:table-cell table:number-columns-repeated="4"/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111.99" calcext:value-type="float">
            <text:p>111.99</text:p>
          </table:table-cell>
          <table:table-cell office:value-type="float" office:value="16613992" calcext:value-type="float">
            <text:p>166139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111.29" calcext:value-type="float">
            <text:p>111.29</text:p>
          </table:table-cell>
          <table:table-cell office:value-type="float" office:value="13062563" calcext:value-type="float">
            <text:p>130625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2025-10-05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14.2" calcext:value-type="float">
            <text:p>114.2</text:p>
          </table:table-cell>
          <table:table-cell office:value-type="float" office:value="12036830" calcext:value-type="float">
            <text:p>12036830</text:p>
          </table:table-cell>
          <table:table-cell table:number-columns-repeated="4"/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945032" calcext:value-type="float">
            <text:p>11945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300968" calcext:value-type="float">
            <text:p>12300968</text:p>
          </table:table-cell>
          <table:table-cell table:number-columns-repeated="4"/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76215" calcext:value-type="float">
            <text:p>10976215</text:p>
          </table:table-cell>
          <table:table-cell table:number-columns-repeated="4"/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</table:table-row>
        <table:table-row table:style-name="ro1">
          <table:table-cell office:value-type="date" office:date-value="2025-10-11" calcext:value-type="date">
            <text:p>2025-10-11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12.24" calcext:value-type="float">
            <text:p>112.24</text:p>
          </table:table-cell>
          <table:table-cell office:value-type="float" office:value="10296499" calcext:value-type="float">
            <text:p>10296499</text:p>
          </table:table-cell>
          <table:table-cell table:number-columns-repeated="4"/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112.29" calcext:value-type="float">
            <text:p>112.29</text:p>
          </table:table-cell>
          <table:table-cell office:value-type="float" office:value="11167154" calcext:value-type="float">
            <text:p>11167154</text:p>
          </table:table-cell>
          <table:table-cell table:number-columns-repeated="4"/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111.61" calcext:value-type="float">
            <text:p>111.61</text:p>
          </table:table-cell>
          <table:table-cell office:value-type="float" office:value="12182935" calcext:value-type="float">
            <text:p>1218293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782202" calcext:value-type="float">
            <text:p>11782202</text:p>
          </table:table-cell>
          <table:table-cell table:number-columns-repeated="4"/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112.7" calcext:value-type="float">
            <text:p>112.7</text:p>
          </table:table-cell>
          <table:table-cell office:value-type="float" office:value="9523617" calcext:value-type="float">
            <text:p>9523617</text:p>
          </table:table-cell>
          <table:table-cell table:number-columns-repeated="4"/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112.71" calcext:value-type="float">
            <text:p>112.71</text:p>
          </table:table-cell>
          <table:table-cell office:value-type="float" office:value="9202349" calcext:value-type="float">
            <text:p>9202349</text:p>
          </table:table-cell>
          <table:table-cell table:number-columns-repeated="4"/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114.71" calcext:value-type="float">
            <text:p>114.71</text:p>
          </table:table-cell>
          <table:table-cell office:value-type="float" office:value="12938790" calcext:value-type="float">
            <text:p>12938790</text:p>
          </table:table-cell>
          <table:table-cell table:number-columns-repeated="4"/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115.98" calcext:value-type="float">
            <text:p>115.98</text:p>
          </table:table-cell>
          <table:table-cell office:value-type="float" office:value="15001088" calcext:value-type="float">
            <text:p>15001088</text:p>
          </table:table-cell>
          <table:table-cell table:number-columns-repeated="4"/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</table:table-row>
        <table:table-row table:style-name="ro1">
          <table:table-cell office:value-type="date" office:date-value="2025-10-25" calcext:value-type="date">
            <text:p>2025-10-25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</table:table-row>
        <table:table-row table:style-name="ro1">
          <table:table-cell office:value-type="date" office:date-value="2025-10-26" calcext:value-type="date">
            <text:p>2025-10-26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975412" calcext:value-type="float">
            <text:p>10975412</text:p>
          </table:table-cell>
          <table:table-cell table:number-columns-repeated="4"/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115.03" calcext:value-type="float">
            <text:p>115.03</text:p>
          </table:table-cell>
          <table:table-cell office:value-type="float" office:value="9535211" calcext:value-type="float">
            <text:p>9535211</text:p>
          </table:table-cell>
          <table:table-cell table:number-columns-repeated="4"/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116.45" calcext:value-type="float">
            <text:p>116.45</text:p>
          </table:table-cell>
          <table:table-cell office:value-type="float" office:value="12570572" calcext:value-type="float">
            <text:p>12570572</text:p>
          </table:table-cell>
          <table:table-cell table:number-columns-repeated="4"/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114.69" calcext:value-type="float">
            <text:p>114.69</text:p>
          </table:table-cell>
          <table:table-cell office:value-type="float" office:value="16172943" calcext:value-type="float">
            <text:p>16172943</text:p>
          </table:table-cell>
          <table:table-cell table:number-columns-repeated="4"/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113.76" calcext:value-type="float">
            <text:p>113.76</text:p>
          </table:table-cell>
          <table:table-cell office:value-type="float" office:value="12290304" calcext:value-type="float">
            <text:p>12290304</text:p>
          </table:table-cell>
          <table:table-cell table:number-columns-repeated="4"/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114.14" calcext:value-type="float">
            <text:p>114.14</text:p>
          </table:table-cell>
          <table:table-cell office:value-type="float" office:value="16860741" calcext:value-type="float">
            <text:p>16860741</text:p>
          </table:table-cell>
          <table:table-cell table:number-columns-repeated="4"/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113.68" calcext:value-type="float">
            <text:p>113.68</text:p>
          </table:table-cell>
          <table:table-cell office:value-type="float" office:value="12400921" calcext:value-type="float">
            <text:p>12400921</text:p>
          </table:table-cell>
          <table:table-cell table:number-columns-repeated="4"/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114.5" calcext:value-type="float">
            <text:p>114.5</text:p>
          </table:table-cell>
          <table:table-cell office:value-type="float" office:value="14219654" calcext:value-type="float">
            <text:p>14219654</text:p>
          </table:table-cell>
          <table:table-cell table:number-columns-repeated="4"/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</table:table-row>
        <table:table-row table:style-name="ro1">
          <table:table-cell office:value-type="date" office:date-value="2025-11-08" calcext:value-type="date">
            <text:p>2025-11-08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</table:table-row>
        <table:table-row table:style-name="ro1">
          <table:table-cell office:value-type="date" office:date-value="2025-11-09" calcext:value-type="date">
            <text:p>2025-11-09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118.22" calcext:value-type="float">
            <text:p>118.22</text:p>
          </table:table-cell>
          <table:table-cell office:value-type="float" office:value="13047958" calcext:value-type="float">
            <text:p>13047958</text:p>
          </table:table-cell>
          <table:table-cell table:number-columns-repeated="4"/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119.78" calcext:value-type="float">
            <text:p>119.78</text:p>
          </table:table-cell>
          <table:table-cell office:value-type="float" office:value="16077101" calcext:value-type="float">
            <text:p>16077101</text:p>
          </table:table-cell>
          <table:table-cell table:number-columns-repeated="4"/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118.12" calcext:value-type="float">
            <text:p>118.12</text:p>
          </table:table-cell>
          <table:table-cell office:value-type="float" office:value="13790889" calcext:value-type="float">
            <text:p>13790889</text:p>
          </table:table-cell>
          <table:table-cell table:number-columns-repeated="4"/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118.79" calcext:value-type="float">
            <text:p>118.79</text:p>
          </table:table-cell>
          <table:table-cell office:value-type="float" office:value="17291874" calcext:value-type="float">
            <text:p>17291874</text:p>
          </table:table-cell>
          <table:table-cell table:number-columns-repeated="4"/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</table:table-row>
        <table:table-row table:style-name="ro1">
          <table:table-cell office:value-type="date" office:date-value="2025-11-15" calcext:value-type="date">
            <text:p>2025-11-15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</table:table-row>
        <table:table-row table:style-name="ro1">
          <table:table-cell office:value-type="date" office:date-value="2025-11-16" calcext:value-type="date">
            <text:p>2025-11-16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117.68" calcext:value-type="float">
            <text:p>117.68</text:p>
          </table:table-cell>
          <table:table-cell office:value-type="float" office:value="16034860" calcext:value-type="float">
            <text:p>16034860</text:p>
          </table:table-cell>
          <table:table-cell table:number-columns-repeated="4"/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5808518" calcext:value-type="float">
            <text:p>15808518</text:p>
          </table:table-cell>
          <table:table-cell table:number-columns-repeated="4"/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117.35" calcext:value-type="float">
            <text:p>117.35</text:p>
          </table:table-cell>
          <table:table-cell office:value-type="float" office:value="15919239" calcext:value-type="float">
            <text:p>15919239</text:p>
          </table:table-cell>
          <table:table-cell table:number-columns-repeated="4"/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117.02" calcext:value-type="float">
            <text:p>117.02</text:p>
          </table:table-cell>
          <table:table-cell office:value-type="float" office:value="14401011" calcext:value-type="float">
            <text:p>14401011</text:p>
          </table:table-cell>
          <table:table-cell table:number-columns-repeated="4"/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115.97" calcext:value-type="float">
            <text:p>115.97</text:p>
          </table:table-cell>
          <table:table-cell office:value-type="float" office:value="18034923" calcext:value-type="float">
            <text:p>18034923</text:p>
          </table:table-cell>
          <table:table-cell table:number-columns-repeated="4"/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114.51" calcext:value-type="float">
            <text:p>114.51</text:p>
          </table:table-cell>
          <table:table-cell office:value-type="float" office:value="14434558" calcext:value-type="float">
            <text:p>14434558</text:p>
          </table:table-cell>
          <table:table-cell table:number-columns-repeated="4"/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number-columns-repeated="4"/>
        </table:table-row>
        <table:table-row table:style-name="ro1">
          <table:table-cell office:value-type="date" office:date-value="2025-11-27" calcext:value-type="date">
            <text:p>2025-11-27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number-columns-repeated="4"/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</table:table-row>
        <table:table-row table:style-name="ro1">
          <table:table-cell office:value-type="date" office:date-value="2025-11-29" calcext:value-type="date">
            <text:p>2025-11-29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</table:table-row>
        <table:table-row table:style-name="ro1">
          <table:table-cell office:value-type="date" office:date-value="2025-11-30" calcext:value-type="date">
            <text:p>2025-11-30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116.63" calcext:value-type="float">
            <text:p>116.63</text:p>
          </table:table-cell>
          <table:table-cell office:value-type="float" office:value="12658100" calcext:value-type="float">
            <text:p>12658100</text:p>
          </table:table-cell>
          <table:table-cell table:number-columns-repeated="4"/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115.38" calcext:value-type="float">
            <text:p>115.38</text:p>
          </table:table-cell>
          <table:table-cell office:value-type="float" office:value="14607704" calcext:value-type="float">
            <text:p>14607704</text:p>
          </table:table-cell>
          <table:table-cell table:number-columns-repeated="4"/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117.8" calcext:value-type="float">
            <text:p>117.8</text:p>
          </table:table-cell>
          <table:table-cell office:value-type="float" office:value="16819130" calcext:value-type="float">
            <text:p>16819130</text:p>
          </table:table-cell>
          <table:table-cell table:number-columns-repeated="4"/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117.14" calcext:value-type="float">
            <text:p>117.14</text:p>
          </table:table-cell>
          <table:table-cell office:value-type="float" office:value="13686897" calcext:value-type="float">
            <text:p>13686897</text:p>
          </table:table-cell>
          <table:table-cell table:number-columns-repeated="4"/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115.98" calcext:value-type="float">
            <text:p>115.98</text:p>
          </table:table-cell>
          <table:table-cell office:value-type="float" office:value="14904164" calcext:value-type="float">
            <text:p>14904164</text:p>
          </table:table-cell>
          <table:table-cell table:number-columns-repeated="4"/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118.25" calcext:value-type="float">
            <text:p>118.25</text:p>
          </table:table-cell>
          <table:table-cell office:value-type="float" office:value="23790815" calcext:value-type="float">
            <text:p>23790815</text:p>
          </table:table-cell>
          <table:table-cell table:number-columns-repeated="4"/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119.54" calcext:value-type="float">
            <text:p>119.54</text:p>
          </table:table-cell>
          <table:table-cell office:value-type="float" office:value="19845192" calcext:value-type="float">
            <text:p>19845192</text:p>
          </table:table-cell>
          <table:table-cell table:number-columns-repeated="4"/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119.54" calcext:value-type="float">
            <text:p>119.54</text:p>
          </table:table-cell>
          <table:table-cell office:value-type="float" office:value="14781787" calcext:value-type="float">
            <text:p>14781787</text:p>
          </table:table-cell>
          <table:table-cell table:number-columns-repeated="4"/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</table:table-row>
        <table:table-row table:style-name="ro1">
          <table:table-cell office:value-type="date" office:date-value="2025-12-13" calcext:value-type="date">
            <text:p>2025-12-13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</table:table-row>
        <table:table-row table:style-name="ro1">
          <table:table-cell office:value-type="date" office:date-value="2025-12-14" calcext:value-type="date">
            <text:p>2025-12-14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117.76" calcext:value-type="float">
            <text:p>117.76</text:p>
          </table:table-cell>
          <table:table-cell office:value-type="float" office:value="16358669" calcext:value-type="float">
            <text:p>16358669</text:p>
          </table:table-cell>
          <table:table-cell table:number-columns-repeated="4"/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638716" calcext:value-type="float">
            <text:p>17638716</text:p>
          </table:table-cell>
          <table:table-cell table:number-columns-repeated="4"/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117.41" calcext:value-type="float">
            <text:p>117.41</text:p>
          </table:table-cell>
          <table:table-cell office:value-type="float" office:value="18502152" calcext:value-type="float">
            <text:p>18502152</text:p>
          </table:table-cell>
          <table:table-cell table:number-columns-repeated="4"/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116.54" calcext:value-type="float">
            <text:p>116.54</text:p>
          </table:table-cell>
          <table:table-cell office:value-type="float" office:value="13705560" calcext:value-type="float">
            <text:p>13705560</text:p>
          </table:table-cell>
          <table:table-cell table:number-columns-repeated="4"/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</table:table-row>
        <table:table-row table:style-name="ro1">
          <table:table-cell office:value-type="date" office:date-value="2025-12-20" calcext:value-type="date">
            <text:p>2025-12-20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</table:table-row>
        <table:table-row table:style-name="ro1">
          <table:table-cell office:value-type="date" office:date-value="2025-12-21" calcext:value-type="date">
            <text:p>2025-12-21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768611" calcext:value-type="float">
            <text:p>11768611</text:p>
          </table:table-cell>
          <table:table-cell table:number-columns-repeated="4"/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119.42" calcext:value-type="float">
            <text:p>119.42</text:p>
          </table:table-cell>
          <table:table-cell office:value-type="float" office:value="12567630" calcext:value-type="float">
            <text:p>12567630</text:p>
          </table:table-cell>
          <table:table-cell table:number-columns-repeated="4"/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number-columns-repeated="4"/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number-columns-repeated="4"/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</table:table-row>
        <table:table-row table:style-name="ro1">
          <table:table-cell office:value-type="date" office:date-value="2025-12-27" calcext:value-type="date">
            <text:p>2025-12-27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</table:table-row>
        <table:table-row table:style-name="ro1">
          <table:table-cell office:value-type="date" office:date-value="2025-12-28" calcext:value-type="date">
            <text:p>2025-12-28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120.53" calcext:value-type="float">
            <text:p>120.53</text:p>
          </table:table-cell>
          <table:table-cell office:value-type="float" office:value="14782512" calcext:value-type="float">
            <text:p>14782512</text:p>
          </table:table-cell>
          <table:table-cell table:number-columns-repeated="4"/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120.99" calcext:value-type="float">
            <text:p>120.99</text:p>
          </table:table-cell>
          <table:table-cell office:value-type="float" office:value="11150486" calcext:value-type="float">
            <text:p>11150486</text:p>
          </table:table-cell>
          <table:table-cell table:number-columns-repeated="4"/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number-columns-repeated="4"/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number-columns-repeated="4"/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</table:table-row>
        <table:table-row table:style-name="ro1">
          <table:table-cell office:value-type="date" office:date-value="2026-01-03" calcext:value-type="date">
            <text:p>2026-01-03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</table:table-row>
        <table:table-row table:style-name="ro1">
          <table:table-cell office:value-type="date" office:date-value="2026-01-04" calcext:value-type="date">
            <text:p>2026-01-04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125.36" calcext:value-type="float">
            <text:p>125.36</text:p>
          </table:table-cell>
          <table:table-cell office:value-type="float" office:value="30112238" calcext:value-type="float">
            <text:p>30112238</text:p>
          </table:table-cell>
          <table:table-cell table:number-columns-repeated="4"/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121.05" calcext:value-type="float">
            <text:p>121.05</text:p>
          </table:table-cell>
          <table:table-cell office:value-type="float" office:value="23328636" calcext:value-type="float">
            <text:p>23328636</text:p>
          </table:table-cell>
          <table:table-cell table:number-columns-repeated="4"/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118.49" calcext:value-type="float">
            <text:p>118.49</text:p>
          </table:table-cell>
          <table:table-cell office:value-type="float" office:value="20352950" calcext:value-type="float">
            <text:p>20352950</text:p>
          </table:table-cell>
          <table:table-cell table:number-columns-repeated="4"/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122.91" calcext:value-type="float">
            <text:p>122.91</text:p>
          </table:table-cell>
          <table:table-cell office:value-type="float" office:value="20232721" calcext:value-type="float">
            <text:p>20232721</text:p>
          </table:table-cell>
          <table:table-cell table:number-columns-repeated="4"/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</table:table-row>
        <table:table-row table:style-name="ro1">
          <table:table-cell office:value-type="date" office:date-value="2026-01-11" calcext:value-type="date">
            <text:p>2026-01-11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124.03" calcext:value-type="float">
            <text:p>124.03</text:p>
          </table:table-cell>
          <table:table-cell office:value-type="float" office:value="15314895" calcext:value-type="float">
            <text:p>15314895</text:p>
          </table:table-cell>
          <table:table-cell table:number-columns-repeated="4"/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126.54" calcext:value-type="float">
            <text:p>126.54</text:p>
          </table:table-cell>
          <table:table-cell office:value-type="float" office:value="21619727" calcext:value-type="float">
            <text:p>21619727</text:p>
          </table:table-cell>
          <table:table-cell table:number-columns-repeated="4"/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130.2" calcext:value-type="float">
            <text:p>130.2</text:p>
          </table:table-cell>
          <table:table-cell office:value-type="float" office:value="27593938" calcext:value-type="float">
            <text:p>27593938</text:p>
          </table:table-cell>
          <table:table-cell table:number-columns-repeated="4"/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129.13" calcext:value-type="float">
            <text:p>129.13</text:p>
          </table:table-cell>
          <table:table-cell office:value-type="float" office:value="17400039" calcext:value-type="float">
            <text:p>17400039</text:p>
          </table:table-cell>
          <table:table-cell table:number-columns-repeated="4"/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17" calcext:value-type="date">
            <text:p>2026-01-17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18" calcext:value-type="date">
            <text:p>2026-01-18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130.46" calcext:value-type="float">
            <text:p>130.46</text:p>
          </table:table-cell>
          <table:table-cell office:value-type="float" office:value="16477282" calcext:value-type="float">
            <text:p>16477282</text:p>
          </table:table-cell>
          <table:table-cell table:number-columns-repeated="4"/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133.61" calcext:value-type="float">
            <text:p>133.61</text:p>
          </table:table-cell>
          <table:table-cell office:value-type="float" office:value="18879887" calcext:value-type="float">
            <text:p>18879887</text:p>
          </table:table-cell>
          <table:table-cell table:number-columns-repeated="4"/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133.64" calcext:value-type="float">
            <text:p>133.64</text:p>
          </table:table-cell>
          <table:table-cell office:value-type="float" office:value="16600126" calcext:value-type="float">
            <text:p>16600126</text:p>
          </table:table-cell>
          <table:table-cell table:number-columns-repeated="4"/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</table:table-row>
        <table:table-row table:style-name="ro1">
          <table:table-cell office:value-type="date" office:date-value="2026-01-24" calcext:value-type="date">
            <text:p>2026-01-24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float" office:value="134.84" calcext:value-type="float">
            <text:p>134.84</text:p>
          </table:table-cell>
          <table:table-cell office:value-type="float" office:value="16056066" calcext:value-type="float">
            <text:p>16056066</text:p>
          </table:table-cell>
          <table:table-cell table:number-columns-repeated="4"/>
        </table:table-row>
        <table:table-row table:style-name="ro1">
          <table:table-cell office:value-type="date" office:date-value="2026-01-27" calcext:value-type="date">
            <text:p>2026-01-27</text:p>
          </table:table-cell>
          <table:table-cell office:value-type="float" office:value="136.83" calcext:value-type="float">
            <text:p>136.83</text:p>
          </table:table-cell>
          <table:table-cell office:value-type="float" office:value="14517025" calcext:value-type="float">
            <text:p>14517025</text:p>
          </table:table-cell>
          <table:table-cell table:number-columns-repeated="4"/>
        </table:table-row>
        <table:table-row table:style-name="ro1">
          <table:table-cell office:value-type="date" office:date-value="2026-01-28" calcext:value-type="date">
            <text:p>2026-01-28</text:p>
          </table:table-cell>
          <table:table-cell office:value-type="float" office:value="137.58" calcext:value-type="float">
            <text:p>137.58</text:p>
          </table:table-cell>
          <table:table-cell office:value-type="float" office:value="15637279" calcext:value-type="float">
            <text:p>15637279</text:p>
          </table:table-cell>
          <table:table-cell table:number-columns-repeated="4"/>
        </table:table-row>
        <table:table-row table:style-name="ro1">
          <table:table-cell office:value-type="date" office:date-value="2026-01-29" calcext:value-type="date">
            <text:p>2026-01-29</text:p>
          </table:table-cell>
          <table:table-cell office:value-type="float" office:value="140.51" calcext:value-type="float">
            <text:p>140.51</text:p>
          </table:table-cell>
          <table:table-cell office:value-type="float" office:value="35760620" calcext:value-type="float">
            <text:p>35760620</text:p>
          </table:table-cell>
          <table:table-cell table:number-columns-repeated="4"/>
        </table:table-row>
        <table:table-row table:style-name="ro1">
          <table:table-cell office:value-type="date" office:date-value="2026-01-30" calcext:value-type="date">
            <text:p>2026-01-30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</table:table-row>
        <table:table-row table:style-name="ro1">
          <table:table-cell office:value-type="date" office:date-value="2026-01-31" calcext:value-type="date">
            <text:p>2026-01-31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</table:table-row>
        <table:table-row table:style-name="ro1">
          <table:table-cell office:value-type="date" office:date-value="2026-02-01" calcext:value-type="date">
            <text:p>2026-02-01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float" office:value="138.4" calcext:value-type="float">
            <text:p>138.4</text:p>
          </table:table-cell>
          <table:table-cell office:value-type="float" office:value="27735570" calcext:value-type="float">
            <text:p>27735570</text:p>
          </table:table-cell>
          <table:table-cell table:number-columns-repeated="4"/>
        </table:table-row>
        <table:table-row table:style-name="ro1">
          <table:table-cell office:value-type="date" office:date-value="2026-02-03" calcext:value-type="date">
            <text:p>2026-02-03</text:p>
          </table:table-cell>
          <table:table-cell office:value-type="float" office:value="143.73" calcext:value-type="float">
            <text:p>143.73</text:p>
          </table:table-cell>
          <table:table-cell office:value-type="float" office:value="37577844" calcext:value-type="float">
            <text:p>37577844</text:p>
          </table:table-cell>
          <table:table-cell table:number-columns-repeated="4"/>
        </table:table-row>
        <table:table-row table:style-name="ro1">
          <table:table-cell office:value-type="date" office:date-value="2026-02-04" calcext:value-type="date">
            <text:p>2026-02-04</text:p>
          </table:table-cell>
          <table:table-cell office:value-type="float" office:value="147.59" calcext:value-type="float">
            <text:p>147.59</text:p>
          </table:table-cell>
          <table:table-cell office:value-type="float" office:value="29426241" calcext:value-type="float">
            <text:p>29426241</text:p>
          </table:table-cell>
          <table:table-cell table:number-columns-repeated="4"/>
        </table:table-row>
        <table:table-row table:style-name="ro1">
          <table:table-cell office:value-type="date" office:date-value="2026-02-05" calcext:value-type="date">
            <text:p>2026-02-05</text:p>
          </table:table-cell>
          <table:table-cell office:value-type="float" office:value="146.08" calcext:value-type="float">
            <text:p>146.08</text:p>
          </table:table-cell>
          <table:table-cell office:value-type="float" office:value="18431739" calcext:value-type="float">
            <text:p>18431739</text:p>
          </table:table-cell>
          <table:table-cell table:number-columns-repeated="4"/>
        </table:table-row>
        <table:table-row table:style-name="ro1">
          <table:table-cell office:value-type="date" office:date-value="2026-02-06" calcext:value-type="date">
            <text:p>2026-02-06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</table:table-row>
        <table:table-row table:style-name="ro1">
          <table:table-cell office:value-type="date" office:date-value="2026-02-07" calcext:value-type="date">
            <text:p>2026-02-07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</table:table-row>
        <table:table-row table:style-name="ro1">
          <table:table-cell office:value-type="date" office:date-value="2026-02-08" calcext:value-type="date">
            <text:p>2026-02-08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297302" calcext:value-type="float">
            <text:p>21297302</text:p>
          </table:table-cell>
          <table:table-cell table:number-columns-repeated="4"/>
        </table:table-row>
        <table:table-row table:style-name="ro1">
          <table:table-cell office:value-type="date" office:date-value="2026-02-10" calcext:value-type="date">
            <text:p>2026-02-10</text:p>
          </table:table-cell>
          <table:table-cell office:value-type="float" office:value="151.59" calcext:value-type="float">
            <text:p>151.59</text:p>
          </table:table-cell>
          <table:table-cell office:value-type="float" office:value="15800255" calcext:value-type="float">
            <text:p>15800255</text:p>
          </table:table-cell>
          <table:table-cell table:number-columns-repeated="4"/>
        </table:table-row>
        <table:table-row table:style-name="ro1">
          <table:table-cell office:value-type="date" office:date-value="2026-02-11" calcext:value-type="date">
            <text:p>2026-02-11</text:p>
          </table:table-cell>
          <table:table-cell office:value-type="float" office:value="155.56" calcext:value-type="float">
            <text:p>155.56</text:p>
          </table:table-cell>
          <table:table-cell office:value-type="float" office:value="23091488" calcext:value-type="float">
            <text:p>23091488</text:p>
          </table:table-cell>
          <table:table-cell table:number-columns-repeated="4"/>
        </table:table-row>
        <table:table-row table:style-name="ro1">
          <table:table-cell office:value-type="date" office:date-value="2026-02-12" calcext:value-type="date">
            <text:p>2026-02-12</text:p>
          </table:table-cell>
          <table:table-cell office:value-type="float" office:value="149.93" calcext:value-type="float">
            <text:p>149.93</text:p>
          </table:table-cell>
          <table:table-cell office:value-type="float" office:value="30652471" calcext:value-type="float">
            <text:p>30652471</text:p>
          </table:table-cell>
          <table:table-cell table:number-columns-repeated="4"/>
        </table:table-row>
        <table:table-row table:style-name="ro1">
          <table:table-cell office:value-type="date" office:date-value="2026-02-13" calcext:value-type="date">
            <text:p>2026-02-13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4" calcext:value-type="date">
            <text:p>2026-02-14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5" calcext:value-type="date">
            <text:p>2026-02-15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float" office:value="146.19" calcext:value-type="float">
            <text:p>146.19</text:p>
          </table:table-cell>
          <table:table-cell office:value-type="float" office:value="19766567" calcext:value-type="float">
            <text:p>19766567</text:p>
          </table:table-cell>
          <table:table-cell table:number-columns-repeated="4"/>
        </table:table-row>
        <table:table-row table:style-name="ro1">
          <table:table-cell office:value-type="date" office:date-value="2026-02-18" calcext:value-type="date">
            <text:p>2026-02-18</text:p>
          </table:table-cell>
          <table:table-cell office:value-type="float" office:value="150.68" calcext:value-type="float">
            <text:p>150.68</text:p>
          </table:table-cell>
          <table:table-cell office:value-type="float" office:value="19849670" calcext:value-type="float">
            <text:p>19849670</text:p>
          </table:table-cell>
          <table:table-cell table:number-columns-repeated="4"/>
        </table:table-row>
        <table:table-row table:style-name="ro1">
          <table:table-cell office:value-type="date" office:date-value="2026-02-19" calcext:value-type="date">
            <text:p>2026-02-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20305026" calcext:value-type="float">
            <text:p>20305026</text:p>
          </table:table-cell>
          <table:table-cell table:number-columns-repeated="4"/>
        </table:table-row>
        <table:table-row table:style-name="ro1">
          <table:table-cell office:value-type="date" office:date-value="2026-02-20" calcext:value-type="date">
            <text:p>2026-02-20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</table:table-row>
        <table:table-row table:style-name="ro1">
          <table:table-cell office:value-type="date" office:date-value="2026-02-21" calcext:value-type="date">
            <text:p>2026-02-21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</table:table-row>
        <table:table-row table:style-name="ro1">
          <table:table-cell office:value-type="date" office:date-value="2026-02-22" calcext:value-type="date">
            <text:p>2026-02-22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office:value-type="float" office:value="150.76" calcext:value-type="float">
            <text:p>150.76</text:p>
          </table:table-cell>
          <table:table-cell office:value-type="float" office:value="16073100" calcext:value-type="float">
            <text:p>16073100</text:p>
          </table:table-cell>
          <table:table-cell table:number-columns-repeated="4"/>
        </table:table-row>
        <table:table-row table:style-name="ro1">
          <table:table-cell office:value-type="date" office:date-value="2026-02-24" calcext:value-type="date">
            <text:p>2026-02-24</text:p>
          </table:table-cell>
          <table:table-cell office:value-type="float" office:value="149.26" calcext:value-type="float">
            <text:p>149.26</text:p>
          </table:table-cell>
          <table:table-cell office:value-type="float" office:value="14185500" calcext:value-type="float">
            <text:p>14185500</text:p>
          </table:table-cell>
          <table:table-cell table:number-columns-repeated="4"/>
        </table:table-row>
        <table:table-row table:style-name="ro1">
          <table:table-cell office:value-type="date" office:date-value="2026-02-25" calcext:value-type="date">
            <text:p>2026-02-25</text:p>
          </table:table-cell>
          <table:table-cell office:value-type="float" office:value="149.06" calcext:value-type="float">
            <text:p>149.06</text:p>
          </table:table-cell>
          <table:table-cell office:value-type="float" office:value="15225745" calcext:value-type="float">
            <text:p>15225745</text:p>
          </table:table-cell>
          <table:table-cell table:number-columns-repeated="4"/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5606231" calcext:value-type="float">
            <text:p>15606231</text:p>
          </table:table-cell>
          <table:table-cell table:number-columns-repeated="4"/>
        </table:table-row>
        <table:table-row table:style-name="ro1">
          <table:table-cell office:value-type="date" office:date-value="2026-02-27" calcext:value-type="date">
            <text:p>2026-02-27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</table:table-row>
        <table:table-row table:style-name="ro1">
          <table:table-cell office:value-type="date" office:date-value="2026-02-28" calcext:value-type="date">
            <text:p>2026-02-28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</table:table-row>
        <table:table-row table:style-name="ro1">
          <table:table-cell office:value-type="date" office:date-value="2026-03-01" calcext:value-type="date">
            <text:p>2026-03-01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float" office:value="154.22" calcext:value-type="float">
            <text:p>154.22</text:p>
          </table:table-cell>
          <table:table-cell office:value-type="float" office:value="31493082" calcext:value-type="float">
            <text:p>31493082</text:p>
          </table:table-cell>
          <table:table-cell table:number-columns-repeated="4"/>
        </table:table-row>
        <table:table-row table:style-name="ro1">
          <table:table-cell office:value-type="date" office:date-value="2026-03-03" calcext:value-type="date">
            <text:p>2026-03-03</text:p>
          </table:table-cell>
          <table:table-cell office:value-type="float" office:value="151.83" calcext:value-type="float">
            <text:p>151.83</text:p>
          </table:table-cell>
          <table:table-cell office:value-type="float" office:value="25198835" calcext:value-type="float">
            <text:p>25198835</text:p>
          </table:table-cell>
          <table:table-cell table:number-columns-repeated="4"/>
        </table:table-row>
        <table:table-row table:style-name="ro1">
          <table:table-cell office:value-type="date" office:date-value="2026-03-04" calcext:value-type="date">
            <text:p>2026-03-04</text:p>
          </table:table-cell>
          <table:table-cell office:value-type="float" office:value="149.82" calcext:value-type="float">
            <text:p>149.82</text:p>
          </table:table-cell>
          <table:table-cell office:value-type="float" office:value="16764761" calcext:value-type="float">
            <text:p>16764761</text:p>
          </table:table-cell>
          <table:table-cell table:number-columns-repeated="4"/>
        </table:table-row>
        <table:table-row table:style-name="ro1">
          <table:table-cell office:value-type="date" office:date-value="2026-03-05" calcext:value-type="date">
            <text:p>2026-03-05</text:p>
          </table:table-cell>
          <table:table-cell office:value-type="float" office:value="150.76" calcext:value-type="float">
            <text:p>150.76</text:p>
          </table:table-cell>
          <table:table-cell office:value-type="float" office:value="22969271" calcext:value-type="float">
            <text:p>22969271</text:p>
          </table:table-cell>
          <table:table-cell table:number-columns-repeated="4"/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</table:table-row>
        <table:table-row table:style-name="ro1">
          <table:table-cell office:value-type="date" office:date-value="2026-03-07" calcext:value-type="date">
            <text:p>2026-03-07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</table:table-row>
        <table:table-row table:style-name="ro1">
          <table:table-cell office:value-type="date" office:date-value="2026-03-08" calcext:value-type="date">
            <text:p>2026-03-08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office:value-type="float" office:value="150.44" calcext:value-type="float">
            <text:p>150.44</text:p>
          </table:table-cell>
          <table:table-cell office:value-type="float" office:value="25532656" calcext:value-type="float">
            <text:p>25532656</text:p>
          </table:table-cell>
          <table:table-cell table:number-columns-repeated="4"/>
        </table:table-row>
        <table:table-row table:style-name="ro1">
          <table:table-cell office:value-type="date" office:date-value="2026-03-10" calcext:value-type="date">
            <text:p>2026-03-10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617590" calcext:value-type="float">
            <text:p>19617590</text:p>
          </table:table-cell>
          <table:table-cell table:number-columns-repeated="4"/>
        </table:table-row>
        <table:table-row table:style-name="ro1">
          <table:table-cell office:value-type="date" office:date-value="2026-03-11" calcext:value-type="date">
            <text:p>2026-03-11</text:p>
          </table:table-cell>
          <table:table-cell office:value-type="float" office:value="151.58" calcext:value-type="float">
            <text:p>151.58</text:p>
          </table:table-cell>
          <table:table-cell office:value-type="float" office:value="15297412" calcext:value-type="float">
            <text:p>15297412</text:p>
          </table:table-cell>
          <table:table-cell table:number-columns-repeated="4"/>
        </table:table-row>
        <table:table-row table:style-name="ro1">
          <table:table-cell office:value-type="date" office:date-value="2026-03-12" calcext:value-type="date">
            <text:p>2026-03-12</text:p>
          </table:table-cell>
          <table:table-cell office:value-type="float" office:value="153.53" calcext:value-type="float">
            <text:p>153.53</text:p>
          </table:table-cell>
          <table:table-cell office:value-type="float" office:value="26053965" calcext:value-type="float">
            <text:p>26053965</text:p>
          </table:table-cell>
          <table:table-cell table:number-columns-repeated="4"/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office:value-type="float" office:value="157.23" calcext:value-type="float">
            <text:p>157.23</text:p>
          </table:table-cell>
          <table:table-cell office:value-type="float" office:value="22835633" calcext:value-type="float">
            <text:p>22835633</text:p>
          </table:table-cell>
          <table:table-cell table:number-columns-repeated="4"/>
        </table:table-row>
        <table:table-row table:style-name="ro1">
          <table:table-cell office:value-type="date" office:date-value="2026-03-17" calcext:value-type="date">
            <text:p>2026-03-17</text:p>
          </table:table-cell>
          <table:table-cell office:value-type="float" office:value="158.81" calcext:value-type="float">
            <text:p>158.81</text:p>
          </table:table-cell>
          <table:table-cell office:value-type="float" office:value="21592171" calcext:value-type="float">
            <text:p>21592171</text:p>
          </table:table-cell>
          <table:table-cell table:number-columns-repeated="4"/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float" office:value="157.59" calcext:value-type="float">
            <text:p>157.59</text:p>
          </table:table-cell>
          <table:table-cell office:value-type="float" office:value="18947142" calcext:value-type="float">
            <text:p>18947142</text:p>
          </table:table-cell>
          <table:table-cell table:number-columns-repeated="4"/>
        </table:table-row>
        <table:table-row table:style-name="ro1">
          <table:table-cell office:value-type="date" office:date-value="2026-03-19" calcext:value-type="date">
            <text:p>2026-03-19</text:p>
          </table:table-cell>
          <table:table-cell office:value-type="float" office:value="158.16" calcext:value-type="float">
            <text:p>158.16</text:p>
          </table:table-cell>
          <table:table-cell office:value-type="float" office:value="27082733" calcext:value-type="float">
            <text:p>27082733</text:p>
          </table:table-cell>
          <table:table-cell table:number-columns-repeated="4"/>
        </table:table-row>
        <table:table-row table:style-name="ro1">
          <table:table-cell office:value-type="date" office:date-value="2026-03-20" calcext:value-type="date">
            <text:p>2026-03-20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</table:table-row>
        <table:table-row table:style-name="ro1">
          <table:table-cell office:value-type="date" office:date-value="2026-03-21" calcext:value-type="date">
            <text:p>2026-03-21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office:value-type="float" office:value="161.13" calcext:value-type="float">
            <text:p>161.13</text:p>
          </table:table-cell>
          <table:table-cell office:value-type="float" office:value="25021289" calcext:value-type="float">
            <text:p>25021289</text:p>
          </table:table-cell>
          <table:table-cell table:number-columns-repeated="4"/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float" office:value="165.38" calcext:value-type="float">
            <text:p>165.38</text:p>
          </table:table-cell>
          <table:table-cell office:value-type="float" office:value="26131824" calcext:value-type="float">
            <text:p>26131824</text:p>
          </table:table-cell>
          <table:table-cell table:number-columns-repeated="4"/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float" office:value="163.26" calcext:value-type="float">
            <text:p>163.26</text:p>
          </table:table-cell>
          <table:table-cell office:value-type="float" office:value="17192333" calcext:value-type="float">
            <text:p>17192333</text:p>
          </table:table-cell>
          <table:table-cell table:number-columns-repeated="4"/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float" office:value="165.43" calcext:value-type="float">
            <text:p>165.43</text:p>
          </table:table-cell>
          <table:table-cell office:value-type="float" office:value="18625249" calcext:value-type="float">
            <text:p>18625249</text:p>
          </table:table-cell>
          <table:table-cell table:number-columns-repeated="4"/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</table:table-row>
        <table:table-row table:style-name="ro1">
          <table:table-cell office:value-type="date" office:date-value="2026-03-28" calcext:value-type="date">
            <text:p>2026-03-28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</table:table-row>
        <table:table-row table:style-name="ro1">
          <table:table-cell office:value-type="date" office:date-value="2026-03-29" calcext:value-type="date">
            <text:p>2026-03-29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office:value-type="float" office:value="171.47" calcext:value-type="float">
            <text:p>171.47</text:p>
          </table:table-cell>
          <table:table-cell office:value-type="float" office:value="29813504" calcext:value-type="float">
            <text:p>29813504</text:p>
          </table:table-cell>
          <table:table-cell table:number-columns-repeated="4"/>
        </table:table-row>
        <table:table-row table:style-name="ro1">
          <table:table-cell office:value-type="date" office:date-value="2026-03-31" calcext:value-type="date">
            <text:p>2026-03-31</text:p>
          </table:table-cell>
          <table:table-cell office:value-type="float" office:value="169.66" calcext:value-type="float">
            <text:p>169.66</text:p>
          </table:table-cell>
          <table:table-cell office:value-type="float" office:value="32006724" calcext:value-type="float">
            <text:p>32006724</text:p>
          </table:table-cell>
          <table:table-cell table:number-columns-repeated="4"/>
        </table:table-row>
        <table:table-row table:style-name="ro1">
          <table:table-cell office:value-type="date" office:date-value="2026-04-01" calcext:value-type="date">
            <text:p>2026-04-01</text:p>
          </table:table-cell>
          <table:table-cell office:value-type="float" office:value="160.78" calcext:value-type="float">
            <text:p>160.78</text:p>
          </table:table-cell>
          <table:table-cell office:value-type="float" office:value="37927639" calcext:value-type="float">
            <text:p>37927639</text:p>
          </table:table-cell>
          <table:table-cell table:number-columns-repeated="4"/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5" calcext:value-type="date">
            <text:p>2026-04-05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office:value-type="float" office:value="163.37" calcext:value-type="float">
            <text:p>163.37</text:p>
          </table:table-cell>
          <table:table-cell office:value-type="float" office:value="16344261" calcext:value-type="float">
            <text:p>16344261</text:p>
          </table:table-cell>
          <table:table-cell table:number-columns-repeated="4"/>
        </table:table-row>
        <table:table-row table:style-name="ro1">
          <table:table-cell office:value-type="date" office:date-value="2026-04-07" calcext:value-type="date">
            <text:p>2026-04-07</text:p>
          </table:table-cell>
          <table:table-cell office:value-type="float" office:value="163.91" calcext:value-type="float">
            <text:p>163.91</text:p>
          </table:table-cell>
          <table:table-cell office:value-type="float" office:value="25227501" calcext:value-type="float">
            <text:p>25227501</text:p>
          </table:table-cell>
          <table:table-cell table:number-columns-repeated="4"/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float" office:value="156.22" calcext:value-type="float">
            <text:p>156.22</text:p>
          </table:table-cell>
          <table:table-cell office:value-type="float" office:value="31311201" calcext:value-type="float">
            <text:p>31311201</text:p>
          </table:table-cell>
          <table:table-cell table:number-columns-repeated="4"/>
        </table:table-row>
        <table:table-row table:style-name="ro1">
          <table:table-cell office:value-type="date" office:date-value="2026-04-09" calcext:value-type="date">
            <text:p>2026-04-09</text:p>
          </table:table-cell>
          <table:table-cell office:value-type="float" office:value="155.04" calcext:value-type="float">
            <text:p>155.04</text:p>
          </table:table-cell>
          <table:table-cell office:value-type="float" office:value="25868377" calcext:value-type="float">
            <text:p>25868377</text:p>
          </table:table-cell>
          <table:table-cell table:number-columns-repeated="4"/>
        </table:table-row>
        <table:table-row table:style-name="ro1">
          <table:table-cell office:value-type="date" office:date-value="2026-04-10" calcext:value-type="date">
            <text:p>2026-04-10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float" office:value="152.64" calcext:value-type="float">
            <text:p>152.64</text:p>
          </table:table-cell>
          <table:table-cell office:value-type="float" office:value="18685605" calcext:value-type="float">
            <text:p>18685605</text:p>
          </table:table-cell>
          <table:table-cell table:number-columns-repeated="4"/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float" office:value="149.24" calcext:value-type="float">
            <text:p>149.24</text:p>
          </table:table-cell>
          <table:table-cell office:value-type="float" office:value="18528163" calcext:value-type="float">
            <text:p>18528163</text:p>
          </table:table-cell>
          <table:table-cell table:number-columns-repeated="4"/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float" office:value="149.01" calcext:value-type="float">
            <text:p>149.01</text:p>
          </table:table-cell>
          <table:table-cell office:value-type="float" office:value="15626519" calcext:value-type="float">
            <text:p>15626519</text:p>
          </table:table-cell>
          <table:table-cell table:number-columns-repeated="4"/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float" office:value="151.98" calcext:value-type="float">
            <text:p>151.98</text:p>
          </table:table-cell>
          <table:table-cell office:value-type="float" office:value="15191033" calcext:value-type="float">
            <text:p>15191033</text:p>
          </table:table-cell>
          <table:table-cell table:number-columns-repeated="4"/>
        </table:table-row>
        <table:table-row table:style-name="ro1">
          <table:table-cell office:value-type="date" office:date-value="2026-04-17" calcext:value-type="date">
            <text:p>2026-04-17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</table:table-row>
        <table:table-row table:style-name="ro1">
          <table:table-cell office:value-type="date" office:date-value="2026-04-18" calcext:value-type="date">
            <text:p>2026-04-18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</table:table-row>
        <table:table-row table:style-name="ro1">
          <table:table-cell office:value-type="date" office:date-value="2026-04-20" calcext:value-type="date">
            <text:p>2026-04-20</text:p>
          </table:table-cell>
          <table:table-cell office:value-type="float" office:value="147.68" calcext:value-type="float">
            <text:p>147.68</text:p>
          </table:table-cell>
          <table:table-cell office:value-type="float" office:value="16354430" calcext:value-type="float">
            <text:p>16354430</text:p>
          </table:table-cell>
          <table:table-cell table:number-columns-repeated="4"/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float" office:value="148.36" calcext:value-type="float">
            <text:p>148.36</text:p>
          </table:table-cell>
          <table:table-cell office:value-type="float" office:value="17515930" calcext:value-type="float">
            <text:p>17515930</text:p>
          </table:table-cell>
          <table:table-cell table:number-columns-repeated="4"/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float" office:value="149.5" calcext:value-type="float">
            <text:p>149.5</text:p>
          </table:table-cell>
          <table:table-cell office:value-type="float" office:value="13738701" calcext:value-type="float">
            <text:p>13738701</text:p>
          </table:table-cell>
          <table:table-cell table:number-columns-repeated="4"/>
        </table:table-row>
        <table:table-row table:style-name="ro1">
          <table:table-cell office:value-type="date" office:date-value="2026-04-23" calcext:value-type="date">
            <text:p>2026-04-23</text:p>
          </table:table-cell>
          <table:table-cell office:value-type="float" office:value="150.53" calcext:value-type="float">
            <text:p>150.53</text:p>
          </table:table-cell>
          <table:table-cell office:value-type="float" office:value="12970401" calcext:value-type="float">
            <text:p>12970401</text:p>
          </table:table-cell>
          <table:table-cell table:number-columns-repeated="4"/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</table:table-row>
        <table:table-row table:style-name="ro1">
          <table:table-cell office:value-type="date" office:date-value="2026-04-26" calcext:value-type="date">
            <text:p>2026-04-26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float" office:value="148.19" calcext:value-type="float">
            <text:p>148.19</text:p>
          </table:table-cell>
          <table:table-cell office:value-type="float" office:value="13940841" calcext:value-type="float">
            <text:p>13940841</text:p>
          </table:table-cell>
          <table:table-cell table:number-columns-repeated="4"/>
        </table:table-row>
        <table:table-row table:style-name="ro1">
          <table:table-cell office:value-type="date" office:date-value="2026-04-28" calcext:value-type="date">
            <text:p>2026-04-28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173622" calcext:value-type="float">
            <text:p>15173622</text:p>
          </table:table-cell>
          <table:table-cell table:number-columns-repeated="4"/>
        </table:table-row>
        <table:table-row table:style-name="ro1">
          <table:table-cell office:value-type="date" office:date-value="2026-04-29" calcext:value-type="date">
            <text:p>2026-04-29</text:p>
          </table:table-cell>
          <table:table-cell office:value-type="float" office:value="154.67" calcext:value-type="float">
            <text:p>154.67</text:p>
          </table:table-cell>
          <table:table-cell office:value-type="float" office:value="14669140" calcext:value-type="float">
            <text:p>14669140</text:p>
          </table:table-cell>
          <table:table-cell table:number-columns-repeated="4"/>
        </table:table-row>
        <table:table-row table:style-name="ro1">
          <table:table-cell office:value-type="date" office:date-value="2026-04-30" calcext:value-type="date">
            <text:p>2026-04-30</text:p>
          </table:table-cell>
          <table:table-cell office:value-type="float" office:value="154.33" calcext:value-type="float">
            <text:p>154.33</text:p>
          </table:table-cell>
          <table:table-cell office:value-type="float" office:value="22885900" calcext:value-type="float">
            <text:p>22885900</text:p>
          </table:table-cell>
          <table:table-cell table:number-columns-repeated="4"/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</table:table-row>
        <table:table-row table:style-name="ro1">
          <table:table-cell office:value-type="date" office:date-value="2026-05-02" calcext:value-type="date">
            <text:p>2026-05-02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float" office:value="153.69" calcext:value-type="float">
            <text:p>153.69</text:p>
          </table:table-cell>
          <table:table-cell office:value-type="float" office:value="14238533" calcext:value-type="float">
            <text:p>14238533</text:p>
          </table:table-cell>
          <table:table-cell table:number-columns-repeated="4"/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float" office:value="154.88" calcext:value-type="float">
            <text:p>154.88</text:p>
          </table:table-cell>
          <table:table-cell office:value-type="float" office:value="12494644" calcext:value-type="float">
            <text:p>12494644</text:p>
          </table:table-cell>
          <table:table-cell table:number-columns-repeated="4"/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float" office:value="148.69" calcext:value-type="float">
            <text:p>148.69</text:p>
          </table:table-cell>
          <table:table-cell office:value-type="float" office:value="20526977" calcext:value-type="float">
            <text:p>20526977</text:p>
          </table:table-cell>
          <table:table-cell table:number-columns-repeated="4"/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float" office:value="146.58" calcext:value-type="float">
            <text:p>146.58</text:p>
          </table:table-cell>
          <table:table-cell office:value-type="float" office:value="22509403" calcext:value-type="float">
            <text:p>22509403</text:p>
          </table:table-cell>
          <table:table-cell table:number-columns-repeated="4"/>
        </table:table-row>
        <table:table-row table:style-name="ro1">
          <table:table-cell office:value-type="date" office:date-value="2026-05-08" calcext:value-type="date">
            <text:p>2026-05-08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</table:table-row>
        <table:table-row table:style-name="ro1">
          <table:table-cell office:value-type="date" office:date-value="2026-05-09" calcext:value-type="date">
            <text:p>2026-05-09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</table:table-row>
        <table:table-row table:style-name="ro1">
          <table:table-cell office:value-type="date" office:date-value="2026-05-10" calcext:value-type="date">
            <text:p>2026-05-10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</table:table-row>
        <table:table-row table:style-name="ro1">
          <table:table-cell office:value-type="date" office:date-value="2026-05-11" calcext:value-type="date">
            <text:p>2026-05-11</text:p>
          </table:table-cell>
          <table:table-cell office:value-type="float" office:value="149.68" calcext:value-type="float">
            <text:p>149.68</text:p>
          </table:table-cell>
          <table:table-cell office:value-type="float" office:value="14849473" calcext:value-type="float">
            <text:p>14849473</text:p>
          </table:table-cell>
          <table:table-cell table:number-columns-repeated="4"/>
        </table:table-row>
        <table:table-row table:style-name="ro1">
          <table:table-cell office:value-type="date" office:date-value="2026-05-12" calcext:value-type="date">
            <text:p>2026-05-12</text:p>
          </table:table-cell>
          <table:table-cell office:value-type="float" office:value="150.63" calcext:value-type="float">
            <text:p>150.63</text:p>
          </table:table-cell>
          <table:table-cell office:value-type="float" office:value="16443098" calcext:value-type="float">
            <text:p>16443098</text:p>
          </table:table-cell>
          <table:table-cell table:number-columns-repeated="4"/>
        </table:table-row>
        <table:table-row table:style-name="ro1">
          <table:table-cell office:value-type="date" office:date-value="2026-05-13" calcext:value-type="date">
            <text:p>2026-05-13</text:p>
          </table:table-cell>
          <table:table-cell office:value-type="float" office:value="151.57" calcext:value-type="float">
            <text:p>151.57</text:p>
          </table:table-cell>
          <table:table-cell office:value-type="float" office:value="15772782" calcext:value-type="float">
            <text:p>15772782</text:p>
          </table:table-cell>
          <table:table-cell table:number-columns-repeated="4"/>
        </table:table-row>
        <table:table-row table:style-name="ro1">
          <table:table-cell office:value-type="date" office:date-value="2026-05-14" calcext:value-type="date">
            <text:p>2026-05-14</text:p>
          </table:table-cell>
          <table:table-cell office:value-type="float" office:value="152.78" calcext:value-type="float">
            <text:p>152.78</text:p>
          </table:table-cell>
          <table:table-cell office:value-type="float" office:value="11331469" calcext:value-type="float">
            <text:p>11331469</text:p>
          </table:table-cell>
          <table:table-cell table:number-columns-repeated="4"/>
        </table:table-row>
        <table:table-row table:style-name="ro1">
          <table:table-cell office:value-type="date" office:date-value="2026-05-15" calcext:value-type="date">
            <text:p>2026-05-15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</table:table-row>
        <table:table-row table:style-name="ro1">
          <table:table-cell office:value-type="date" office:date-value="2026-05-18" calcext:value-type="date">
            <text:p>2026-05-18</text:p>
          </table:table-cell>
          <table:table-cell office:value-type="float" office:value="160.49" calcext:value-type="float">
            <text:p>160.49</text:p>
          </table:table-cell>
          <table:table-cell office:value-type="float" office:value="20065227" calcext:value-type="float">
            <text:p>20065227</text:p>
          </table:table-cell>
          <table:table-cell table:number-columns-repeated="4"/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float" office:value="162.55" calcext:value-type="float">
            <text:p>162.55</text:p>
          </table:table-cell>
          <table:table-cell office:value-type="float" office:value="20715553" calcext:value-type="float">
            <text:p>20715553</text:p>
          </table:table-cell>
          <table:table-cell table:number-columns-repeated="4"/>
        </table:table-row>
        <table:table-row table:style-name="ro1">
          <table:table-cell office:value-type="date" office:date-value="2026-05-20" calcext:value-type="date">
            <text:p>2026-05-20</text:p>
          </table:table-cell>
          <table:table-cell office:value-type="float" office:value="156.28" calcext:value-type="float">
            <text:p>156.28</text:p>
          </table:table-cell>
          <table:table-cell office:value-type="float" office:value="18509731" calcext:value-type="float">
            <text:p>18509731</text:p>
          </table:table-cell>
          <table:table-cell table:number-columns-repeated="4"/>
        </table:table-row>
        <table:table-row table:style-name="ro1">
          <table:table-cell office:value-type="date" office:date-value="2026-05-21" calcext:value-type="date">
            <text:p>2026-05-21</text:p>
          </table:table-cell>
          <table:table-cell office:value-type="float" office:value="155.29" calcext:value-type="float">
            <text:p>155.29</text:p>
          </table:table-cell>
          <table:table-cell office:value-type="float" office:value="17061717" calcext:value-type="float">
            <text:p>17061717</text:p>
          </table:table-cell>
          <table:table-cell table:number-columns-repeated="4"/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3" calcext:value-type="date">
            <text:p>2026-05-23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4" calcext:value-type="date">
            <text:p>2026-05-24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6" calcext:value-type="date">
            <text:p>2026-05-26</text:p>
          </table:table-cell>
          <table:table-cell office:value-type="float" office:value="149.81" calcext:value-type="float">
            <text:p>149.81</text:p>
          </table:table-cell>
          <table:table-cell office:value-type="float" office:value="13057760" calcext:value-type="float">
            <text:p>13057760</text:p>
          </table:table-cell>
          <table:table-cell table:number-columns-repeated="4"/>
        </table:table-row>
        <table:table-row table:style-name="ro1">
          <table:table-cell office:value-type="date" office:date-value="2026-05-27" calcext:value-type="date">
            <text:p>2026-05-27</text:p>
          </table:table-cell>
          <table:table-cell office:value-type="float" office:value="147.9" calcext:value-type="float">
            <text:p>147.9</text:p>
          </table:table-cell>
          <table:table-cell office:value-type="float" office:value="16241133" calcext:value-type="float">
            <text:p>16241133</text:p>
          </table:table-cell>
          <table:table-cell table:number-columns-repeated="4"/>
        </table:table-row>
        <table:table-row table:style-name="ro1">
          <table:table-cell office:value-type="date" office:date-value="2026-05-28" calcext:value-type="date">
            <text:p>2026-05-28</text:p>
          </table:table-cell>
          <table:table-cell office:value-type="float" office:value="146.96" calcext:value-type="float">
            <text:p>146.96</text:p>
          </table:table-cell>
          <table:table-cell office:value-type="float" office:value="14012470" calcext:value-type="float">
            <text:p>14012470</text:p>
          </table:table-cell>
          <table:table-cell table:number-columns-repeated="4"/>
        </table:table-row>
        <table:table-row table:style-name="ro1">
          <table:table-cell office:value-type="date" office:date-value="2026-05-29" calcext:value-type="date">
            <text:p>2026-05-29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</table:table-row>
        <table:table-row table:style-name="ro1">
          <table:table-cell office:value-type="date" office:date-value="2026-05-30" calcext:value-type="date">
            <text:p>2026-05-30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</table:table-row>
        <table:table-row table:style-name="ro1">
          <table:table-cell office:value-type="date" office:date-value="2026-05-31" calcext:value-type="date">
            <text:p>2026-05-31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</table:table-row>
        <table:table-row table:style-name="ro1">
          <table:table-cell office:value-type="date" office:date-value="2026-06-01" calcext:value-type="date">
            <text:p>2026-06-01</text:p>
          </table:table-cell>
          <table:table-cell office:value-type="float" office:value="149.38" calcext:value-type="float">
            <text:p>149.38</text:p>
          </table:table-cell>
          <table:table-cell office:value-type="float" office:value="16732078" calcext:value-type="float">
            <text:p>16732078</text:p>
          </table:table-cell>
          <table:table-cell table:number-columns-repeated="4"/>
        </table:table-row>
        <table:table-row table:style-name="ro1">
          <table:table-cell office:value-type="date" office:date-value="2026-06-02" calcext:value-type="date">
            <text:p>2026-06-02</text:p>
          </table:table-cell>
          <table:table-cell office:value-type="float" office:value="149.56" calcext:value-type="float">
            <text:p>149.56</text:p>
          </table:table-cell>
          <table:table-cell office:value-type="float" office:value="10462402" calcext:value-type="float">
            <text:p>10462402</text:p>
          </table:table-cell>
          <table:table-cell table:number-columns-repeated="4"/>
        </table:table-row>
        <table:table-row table:style-name="ro1">
          <table:table-cell office:value-type="date" office:date-value="2026-06-03" calcext:value-type="date">
            <text:p>2026-06-03</text:p>
          </table:table-cell>
          <table:table-cell office:value-type="float" office:value="152.53" calcext:value-type="float">
            <text:p>152.53</text:p>
          </table:table-cell>
          <table:table-cell office:value-type="float" office:value="14372958" calcext:value-type="float">
            <text:p>14372958</text:p>
          </table:table-cell>
          <table:table-cell table:number-columns-repeated="4"/>
        </table:table-row>
        <table:table-row table:style-name="ro1">
          <table:table-cell office:value-type="date" office:date-value="2026-06-04" calcext:value-type="date">
            <text:p>2026-06-0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1799385" calcext:value-type="float">
            <text:p>11799385</text:p>
          </table:table-cell>
          <table:table-cell table:number-columns-repeated="4"/>
        </table:table-row>
        <table:table-row table:style-name="ro1">
          <table:table-cell office:value-type="date" office:date-value="2026-06-05" calcext:value-type="date">
            <text:p>2026-06-05</text:p>
          </table:table-cell>
          <table:table-cell office:value-type="float" office:value="149.92" calcext:value-type="float">
            <text:p>149.92</text:p>
          </table:table-cell>
          <table:table-cell office:value-type="float" office:value="16583962" calcext:value-type="float">
            <text:p>16583962</text:p>
          </table:table-cell>
          <table:table-cell table:number-columns-repeated="4"/>
        </table:table-row>
        <table:table-row table:style-name="ro1">
          <table:table-cell office:value-type="date" office:date-value="2026-06-06" calcext:value-type="date">
            <text:p>2026-06-06</text:p>
          </table:table-cell>
          <table:table-cell table:number-columns-repeated="2"/>
          <table:table-cell table:formula="of:=COM.MICROSOFT.FORECAST.ETS([.A734];[.$B$2:.$B$733];[.$A$2:.$A$733];1;1; )" office:value-type="float" office:value="151.07960572187" calcext:value-type="float">
            <text:p>151.07960572187</text:p>
          </table:table-cell>
          <table:table-cell table:number-columns-repeated="3"/>
        </table:table-row>
        <table:table-row table:style-name="ro1">
          <table:table-cell office:value-type="date" office:date-value="2026-06-07" calcext:value-type="date">
            <text:p>2026-06-07</text:p>
          </table:table-cell>
          <table:table-cell table:number-columns-repeated="2"/>
          <table:table-cell table:formula="of:=COM.MICROSOFT.FORECAST.ETS([.A735];[.$B$2:.$B$733];[.$A$2:.$A$733];1;1; )" office:value-type="float" office:value="151.286641735536" calcext:value-type="float">
            <text:p>151.286641735536</text:p>
          </table:table-cell>
          <table:table-cell table:number-columns-repeated="3"/>
        </table:table-row>
        <table:table-row table:style-name="ro1">
          <table:table-cell office:value-type="date" office:date-value="2026-06-08" calcext:value-type="date">
            <text:p>2026-06-08</text:p>
          </table:table-cell>
          <table:table-cell table:number-columns-repeated="2"/>
          <table:table-cell table:formula="of:=COM.MICROSOFT.FORECAST.ETS([.A736];[.$B$2:.$B$733];[.$A$2:.$A$733];1;1; )" office:value-type="float" office:value="151.135298874844" calcext:value-type="float">
            <text:p>151.135298874844</text:p>
          </table:table-cell>
          <table:table-cell table:number-columns-repeated="3"/>
        </table:table-row>
        <table:table-row table:style-name="ro1">
          <table:table-cell office:value-type="date" office:date-value="2026-06-09" calcext:value-type="date">
            <text:p>2026-06-09</text:p>
          </table:table-cell>
          <table:table-cell table:number-columns-repeated="2"/>
          <table:table-cell table:formula="of:=COM.MICROSOFT.FORECAST.ETS([.A737];[.$B$2:.$B$733];[.$A$2:.$A$733];1;1; )" office:value-type="float" office:value="151.616065324221" calcext:value-type="float">
            <text:p>151.616065324221</text:p>
          </table:table-cell>
          <table:table-cell table:number-columns-repeated="3"/>
        </table:table-row>
        <table:table-row table:style-name="ro1">
          <table:table-cell office:value-type="date" office:date-value="2026-06-10" calcext:value-type="date">
            <text:p>2026-06-10</text:p>
          </table:table-cell>
          <table:table-cell table:number-columns-repeated="2"/>
          <table:table-cell table:formula="of:=COM.MICROSOFT.FORECAST.ETS([.A738];[.$B$2:.$B$733];[.$A$2:.$A$733];1;1; )" office:value-type="float" office:value="151.522337992827" calcext:value-type="float">
            <text:p>151.522337992827</text:p>
          </table:table-cell>
          <table:table-cell table:number-columns-repeated="3"/>
        </table:table-row>
        <table:table-row table:style-name="ro1">
          <table:table-cell office:value-type="date" office:date-value="2026-06-11" calcext:value-type="date">
            <text:p>2026-06-11</text:p>
          </table:table-cell>
          <table:table-cell table:number-columns-repeated="2"/>
          <table:table-cell table:formula="of:=COM.MICROSOFT.FORECAST.ETS([.A739];[.$B$2:.$B$733];[.$A$2:.$A$733];1;1; )" office:value-type="float" office:value="151.786866797687" calcext:value-type="float">
            <text:p>151.786866797687</text:p>
          </table:table-cell>
          <table:table-cell table:number-columns-repeated="3"/>
        </table:table-row>
        <table:table-row table:style-name="ro1">
          <table:table-cell office:value-type="date" office:date-value="2026-06-12" calcext:value-type="date">
            <text:p>2026-06-12</text:p>
          </table:table-cell>
          <table:table-cell table:number-columns-repeated="2"/>
          <table:table-cell table:formula="of:=COM.MICROSOFT.FORECAST.ETS([.A740];[.$B$2:.$B$733];[.$A$2:.$A$733];1;1; )" office:value-type="float" office:value="151.235655751591" calcext:value-type="float">
            <text:p>151.235655751591</text:p>
          </table:table-cell>
          <table:table-cell table:number-columns-repeated="3"/>
        </table:table-row>
        <table:table-row table:style-name="ro1">
          <table:table-cell office:value-type="date" office:date-value="2026-06-13" calcext:value-type="date">
            <text:p>2026-06-13</text:p>
          </table:table-cell>
          <table:table-cell table:number-columns-repeated="2"/>
          <table:table-cell table:formula="of:=COM.MICROSOFT.FORECAST.ETS([.A741];[.$B$2:.$B$733];[.$A$2:.$A$733];1;1; )" office:value-type="float" office:value="150.875400032059" calcext:value-type="float">
            <text:p>150.875400032059</text:p>
          </table:table-cell>
          <table:table-cell table:number-columns-repeated="3"/>
        </table:table-row>
        <table:table-row table:style-name="ro1">
          <table:table-cell office:value-type="date" office:date-value="2026-06-14" calcext:value-type="date">
            <text:p>2026-06-14</text:p>
          </table:table-cell>
          <table:table-cell table:number-columns-repeated="2"/>
          <table:table-cell table:formula="of:=COM.MICROSOFT.FORECAST.ETS([.A742];[.$B$2:.$B$733];[.$A$2:.$A$733];1;1; )" office:value-type="float" office:value="150.750526556474" calcext:value-type="float">
            <text:p>150.750526556474</text:p>
          </table:table-cell>
          <table:table-cell table:number-columns-repeated="3"/>
        </table:table-row>
        <table:table-row table:style-name="ro1">
          <table:table-cell office:value-type="date" office:date-value="2026-06-15" calcext:value-type="date">
            <text:p>2026-06-15</text:p>
          </table:table-cell>
          <table:table-cell table:number-columns-repeated="2"/>
          <table:table-cell table:formula="of:=COM.MICROSOFT.FORECAST.ETS([.A743];[.$B$2:.$B$733];[.$A$2:.$A$733];1;1; )" office:value-type="float" office:value="150.431354631312" calcext:value-type="float">
            <text:p>150.431354631312</text:p>
          </table:table-cell>
          <table:table-cell table:number-columns-repeated="3"/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table:number-columns-repeated="2"/>
          <table:table-cell table:formula="of:=COM.MICROSOFT.FORECAST.ETS([.A744];[.$B$2:.$B$733];[.$A$2:.$A$733];1;1; )" office:value-type="float" office:value="150.336447329176" calcext:value-type="float">
            <text:p>150.336447329176</text:p>
          </table:table-cell>
          <table:table-cell table:number-columns-repeated="3"/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table:number-columns-repeated="2"/>
          <table:table-cell table:formula="of:=COM.MICROSOFT.FORECAST.ETS([.A745];[.$B$2:.$B$733];[.$A$2:.$A$733];1;1; )" office:value-type="float" office:value="148.427007640733" calcext:value-type="float">
            <text:p>148.427007640733</text:p>
          </table:table-cell>
          <table:table-cell table:number-columns-repeated="3"/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table:number-columns-repeated="2"/>
          <table:table-cell table:formula="of:=COM.MICROSOFT.FORECAST.ETS([.A746];[.$B$2:.$B$733];[.$A$2:.$A$733];1;1; )" office:value-type="float" office:value="147.223214697359" calcext:value-type="float">
            <text:p>147.223214697359</text:p>
          </table:table-cell>
          <table:table-cell table:number-columns-repeated="3"/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table:number-columns-repeated="2"/>
          <table:table-cell table:formula="of:=COM.MICROSOFT.FORECAST.ETS([.A747];[.$B$2:.$B$733];[.$A$2:.$A$733];1;1; )" office:value-type="float" office:value="148.715095475192" calcext:value-type="float">
            <text:p>148.715095475192</text:p>
          </table:table-cell>
          <table:table-cell table:number-columns-repeated="3"/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table:number-columns-repeated="2"/>
          <table:table-cell table:formula="of:=COM.MICROSOFT.FORECAST.ETS([.A748];[.$B$2:.$B$733];[.$A$2:.$A$733];1;1; )" office:value-type="float" office:value="148.690122053562" calcext:value-type="float">
            <text:p>148.690122053562</text:p>
          </table:table-cell>
          <table:table-cell table:number-columns-repeated="3"/>
        </table:table-row>
        <table:table-row table:style-name="ro1">
          <table:table-cell office:value-type="date" office:date-value="2026-06-21" calcext:value-type="date">
            <text:p>2026-06-21</text:p>
          </table:table-cell>
          <table:table-cell table:number-columns-repeated="2"/>
          <table:table-cell table:formula="of:=COM.MICROSOFT.FORECAST.ETS([.A749];[.$B$2:.$B$733];[.$A$2:.$A$733];1;1; )" office:value-type="float" office:value="148.782771734584" calcext:value-type="float">
            <text:p>148.782771734584</text:p>
          </table:table-cell>
          <table:table-cell table:number-columns-repeated="3"/>
        </table:table-row>
        <table:table-row table:style-name="ro1">
          <table:table-cell office:value-type="date" office:date-value="2026-06-22" calcext:value-type="date">
            <text:p>2026-06-22</text:p>
          </table:table-cell>
          <table:table-cell table:number-columns-repeated="2"/>
          <table:table-cell table:formula="of:=COM.MICROSOFT.FORECAST.ETS([.A750];[.$B$2:.$B$733];[.$A$2:.$A$733];1;1; )" office:value-type="float" office:value="149.782633018968" calcext:value-type="float">
            <text:p>149.782633018968</text:p>
          </table:table-cell>
          <table:table-cell table:number-columns-repeated="3"/>
        </table:table-row>
        <table:table-row table:style-name="ro1">
          <table:table-cell office:value-type="date" office:date-value="2026-06-23" calcext:value-type="date">
            <text:p>2026-06-23</text:p>
          </table:table-cell>
          <table:table-cell table:number-columns-repeated="2"/>
          <table:table-cell table:formula="of:=COM.MICROSOFT.FORECAST.ETS([.A751];[.$B$2:.$B$733];[.$A$2:.$A$733];1;1; )" office:value-type="float" office:value="149.90899994422" calcext:value-type="float">
            <text:p>149.90899994422</text:p>
          </table:table-cell>
          <table:table-cell table:number-columns-repeated="3"/>
        </table:table-row>
        <table:table-row table:style-name="ro1">
          <table:table-cell office:value-type="date" office:date-value="2026-06-24" calcext:value-type="date">
            <text:p>2026-06-24</text:p>
          </table:table-cell>
          <table:table-cell table:number-columns-repeated="2"/>
          <table:table-cell table:formula="of:=COM.MICROSOFT.FORECAST.ETS([.A752];[.$B$2:.$B$733];[.$A$2:.$A$733];1;1; )" office:value-type="float" office:value="149.789924290642" calcext:value-type="float">
            <text:p>149.789924290642</text:p>
          </table:table-cell>
          <table:table-cell table:number-columns-repeated="3"/>
        </table:table-row>
        <table:table-row table:style-name="ro1">
          <table:table-cell office:value-type="date" office:date-value="2026-06-25" calcext:value-type="date">
            <text:p>2026-06-25</text:p>
          </table:table-cell>
          <table:table-cell table:number-columns-repeated="2"/>
          <table:table-cell table:formula="of:=COM.MICROSOFT.FORECAST.ETS([.A753];[.$B$2:.$B$733];[.$A$2:.$A$733];1;1; )" office:value-type="float" office:value="148.842836066184" calcext:value-type="float">
            <text:p>148.842836066184</text:p>
          </table:table-cell>
          <table:table-cell table:number-columns-repeated="3"/>
        </table:table-row>
        <table:table-row table:style-name="ro1">
          <table:table-cell office:value-type="date" office:date-value="2026-06-26" calcext:value-type="date">
            <text:p>2026-06-26</text:p>
          </table:table-cell>
          <table:table-cell table:number-columns-repeated="2"/>
          <table:table-cell table:formula="of:=COM.MICROSOFT.FORECAST.ETS([.A754];[.$B$2:.$B$733];[.$A$2:.$A$733];1;1; )" office:value-type="float" office:value="150.044601646452" calcext:value-type="float">
            <text:p>150.044601646452</text:p>
          </table:table-cell>
          <table:table-cell table:number-columns-repeated="3"/>
        </table:table-row>
        <table:table-row table:style-name="ro1">
          <table:table-cell office:value-type="date" office:date-value="2026-06-27" calcext:value-type="date">
            <text:p>2026-06-27</text:p>
          </table:table-cell>
          <table:table-cell table:number-columns-repeated="2"/>
          <table:table-cell table:formula="of:=COM.MICROSOFT.FORECAST.ETS([.A755];[.$B$2:.$B$733];[.$A$2:.$A$733];1;1; )" office:value-type="float" office:value="150.389248410652" calcext:value-type="float">
            <text:p>150.389248410652</text:p>
          </table:table-cell>
          <table:table-cell table:number-columns-repeated="3"/>
        </table:table-row>
        <table:table-row table:style-name="ro1">
          <table:table-cell office:value-type="date" office:date-value="2026-06-28" calcext:value-type="date">
            <text:p>2026-06-28</text:p>
          </table:table-cell>
          <table:table-cell table:number-columns-repeated="2"/>
          <table:table-cell table:formula="of:=COM.MICROSOFT.FORECAST.ETS([.A756];[.$B$2:.$B$733];[.$A$2:.$A$733];1;1; )" office:value-type="float" office:value="150.447164033703" calcext:value-type="float">
            <text:p>150.447164033703</text:p>
          </table:table-cell>
          <table:table-cell table:number-columns-repeated="3"/>
        </table:table-row>
        <table:table-row table:style-name="ro1">
          <table:table-cell office:value-type="date" office:date-value="2026-06-29" calcext:value-type="date">
            <text:p>2026-06-29</text:p>
          </table:table-cell>
          <table:table-cell table:number-columns-repeated="2"/>
          <table:table-cell table:formula="of:=COM.MICROSOFT.FORECAST.ETS([.A757];[.$B$2:.$B$733];[.$A$2:.$A$733];1;1; )" office:value-type="float" office:value="150.851838602774" calcext:value-type="float">
            <text:p>150.851838602774</text:p>
          </table:table-cell>
          <table:table-cell table:number-columns-repeated="3"/>
        </table:table-row>
        <table:table-row table:style-name="ro1">
          <table:table-cell office:value-type="date" office:date-value="2026-06-30" calcext:value-type="date">
            <text:p>2026-06-30</text:p>
          </table:table-cell>
          <table:table-cell table:number-columns-repeated="2"/>
          <table:table-cell table:formula="of:=COM.MICROSOFT.FORECAST.ETS([.A758];[.$B$2:.$B$733];[.$A$2:.$A$733];1;1; )" office:value-type="float" office:value="149.202542946947" calcext:value-type="float">
            <text:p>149.202542946947</text:p>
          </table:table-cell>
          <table:table-cell table:number-columns-repeated="3"/>
        </table:table-row>
        <table:table-row table:style-name="ro1">
          <table:table-cell office:value-type="date" office:date-value="2026-07-01" calcext:value-type="date">
            <text:p>2026-07-01</text:p>
          </table:table-cell>
          <table:table-cell table:number-columns-repeated="2"/>
          <table:table-cell table:formula="of:=COM.MICROSOFT.FORECAST.ETS([.A759];[.$B$2:.$B$733];[.$A$2:.$A$733];1;1; )" office:value-type="float" office:value="148.557730160399" calcext:value-type="float">
            <text:p>148.557730160399</text:p>
          </table:table-cell>
          <table:table-cell table:number-columns-repeated="3"/>
        </table:table-row>
        <table:table-row table:style-name="ro1">
          <table:table-cell office:value-type="date" office:date-value="2026-07-02" calcext:value-type="date">
            <text:p>2026-07-02</text:p>
          </table:table-cell>
          <table:table-cell table:number-columns-repeated="2"/>
          <table:table-cell table:formula="of:=COM.MICROSOFT.FORECAST.ETS([.A760];[.$B$2:.$B$733];[.$A$2:.$A$733];1;1; )" office:value-type="float" office:value="146.682518919464" calcext:value-type="float">
            <text:p>146.682518919464</text:p>
          </table:table-cell>
          <table:table-cell table:number-columns-repeated="3"/>
        </table:table-row>
        <table:table-row table:style-name="ro1">
          <table:table-cell office:value-type="date" office:date-value="2026-07-03" calcext:value-type="date">
            <text:p>2026-07-03</text:p>
          </table:table-cell>
          <table:table-cell table:number-columns-repeated="2"/>
          <table:table-cell table:formula="of:=COM.MICROSOFT.FORECAST.ETS([.A761];[.$B$2:.$B$733];[.$A$2:.$A$733];1;1; )" office:value-type="float" office:value="144.906183773236" calcext:value-type="float">
            <text:p>144.906183773236</text:p>
          </table:table-cell>
          <table:table-cell table:number-columns-repeated="3"/>
        </table:table-row>
        <table:table-row table:style-name="ro1">
          <table:table-cell office:value-type="date" office:date-value="2026-07-04" calcext:value-type="date">
            <text:p>2026-07-04</text:p>
          </table:table-cell>
          <table:table-cell table:number-columns-repeated="2"/>
          <table:table-cell table:formula="of:=COM.MICROSOFT.FORECAST.ETS([.A762];[.$B$2:.$B$733];[.$A$2:.$A$733];1;1; )" office:value-type="float" office:value="145.205600958761" calcext:value-type="float">
            <text:p>145.205600958761</text:p>
          </table:table-cell>
          <table:table-cell table:number-columns-repeated="3"/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table:number-columns-repeated="2"/>
          <table:table-cell table:formula="of:=COM.MICROSOFT.FORECAST.ETS([.A763];[.$B$2:.$B$733];[.$A$2:.$A$733];1;1; )" office:value-type="float" office:value="145.200866022735" calcext:value-type="float">
            <text:p>145.2008660227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22:51:43.378478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6-07T22:59:23.226193382</dc:date>
    <meta:editing-duration>PT7M40S</meta:editing-duration>
    <meta:editing-cycles>1</meta:editing-cycles>
    <meta:document-statistic meta:table-count="1" meta:cell-count="22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84cm" svg:height="11.98cm" xlink:href=".." xlink:type="simple" chart:class="chart:line" chart:style-name="ch1">
        <chart:legend chart:legend-position="bottom" svg:x="3.549cm" svg:y="11.381cm" style:legend-expansion="wide" chart:style-name="ch2"/>
        <chart:plot-area chart:style-name="ch3" svg:x="0.176cm" svg:y="0.452cm" svg:width="11.122cm" svg:height="10.719cm">
          <chart:coordinate-region svg:x="1.562cm" svg:y="0.651cm" svg:width="9.736cm" svg:height="8.746cm"/>
          <chart:axis chart:dimension="x" chart:name="primary-x" chart:style-name="ch4" chartooo:axis-type="date">
            <chartooo:date-scale/>
            <chart:categories table:cell-range-address="xom_us_d.A2:xom_us_d.A7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om_us_d.B2:xom_us_d.B763" chart:label-cell-address="xom_us_d.B1:xom_us_d.B1" chart:class="chart:line">
            <chart:data-point chart:repeated="762"/>
          </chart:series>
          <chart:series chart:style-name="ch8" chart:values-cell-range-address="xom_us_d.D2:xom_us_d.D763" chart:label-cell-address="xom_us_d.D1:xom_us_d.D1" chart:class="chart:line">
            <chart:data-point chart:repeated="7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xom_us_d.B1:xom_us_d.B1</svg:desc>
                </draw:g>
              </table:table-cell>
              <table:table-cell office:value-type="string">
                <text:p>Forecast</text:p>
                <draw:g>
                  <svg:desc>xom_us_d.D1:xom_us_d.D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xom_us_d.A2:xom_us_d.A763</svg:desc>
                </draw:g>
              </table:table-cell>
              <table:table-cell office:value-type="float" office:value="112.67">
                <text:p>112.67</text:p>
                <draw:g>
                  <svg:desc>xom_us_d.B2:xom_us_d.B763</svg:desc>
                </draw:g>
              </table:table-cell>
              <table:table-cell office:value-type="float" office:value="NaN">
                <text:p>NaN</text:p>
                <draw:g>
                  <svg:desc>xom_us_d.D2:xom_us_d.D763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34.84">
                <text:p>134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36.83">
                <text:p>13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37.58">
                <text:p>13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140.51">
                <text:p>14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38.4">
                <text:p>13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43.73">
                <text:p>14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47.59">
                <text:p>14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146.08">
                <text:p>14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151.59">
                <text:p>15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149.93">
                <text:p>14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146.19">
                <text:p>14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150.68">
                <text:p>15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150.97">
                <text:p>15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149.26">
                <text:p>149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149.06">
                <text:p>14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148.54">
                <text:p>14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154.22">
                <text:p>15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151.83">
                <text:p>15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149.82">
                <text:p>149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150.44">
                <text:p>15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148.13">
                <text:p>14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151.58">
                <text:p>15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153.53">
                <text:p>15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157.23">
                <text:p>15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158.81">
                <text:p>15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157.59">
                <text:p>15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8.16">
                <text:p>15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161.13">
                <text:p>16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165.38">
                <text:p>16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163.26">
                <text:p>16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165.43">
                <text:p>16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169.66">
                <text:p>169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160.78">
                <text:p>16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163.37">
                <text:p>16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163.91">
                <text:p>163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156.22">
                <text:p>15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155.04">
                <text:p>15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152.64">
                <text:p>15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149.24">
                <text:p>14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149.01">
                <text:p>14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151.98">
                <text:p>15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147.68">
                <text:p>14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148.36">
                <text:p>14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150.53">
                <text:p>15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148.19">
                <text:p>14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150.56">
                <text:p>15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154.67">
                <text:p>154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154.33">
                <text:p>154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153.69">
                <text:p>1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154.88">
                <text:p>15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148.69">
                <text:p>14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146.58">
                <text:p>146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149.68">
                <text:p>14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150.63">
                <text:p>15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151.57">
                <text:p>151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152.78">
                <text:p>152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160.49">
                <text:p>16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162.55">
                <text:p>16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156.28">
                <text:p>15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155.29">
                <text:p>15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149.81">
                <text:p>14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147.9">
                <text:p>14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146.96">
                <text:p>14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149.38">
                <text:p>14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149.56">
                <text:p>14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152.53">
                <text:p>15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152.04">
                <text:p>15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149.92">
                <text:p>149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9">
                <text:p>46179</text:p>
              </table:table-cell>
              <table:table-cell office:value-type="float" office:value="NaN">
                <text:p>NaN</text:p>
              </table:table-cell>
              <table:table-cell office:value-type="float" office:value="151.07960572187">
                <text:p>151.07960572187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NaN">
                <text:p>NaN</text:p>
              </table:table-cell>
              <table:table-cell office:value-type="float" office:value="151.286641735536">
                <text:p>151.286641735536</text:p>
              </table:table-cell>
            </table:table-row>
            <table:table-row>
              <table:table-cell office:value-type="float" office:value="46181">
                <text:p>46181</text:p>
              </table:table-cell>
              <table:table-cell office:value-type="float" office:value="NaN">
                <text:p>NaN</text:p>
              </table:table-cell>
              <table:table-cell office:value-type="float" office:value="151.135298874844">
                <text:p>151.135298874844</text:p>
              </table:table-cell>
            </table:table-row>
            <table:table-row>
              <table:table-cell office:value-type="float" office:value="46182">
                <text:p>46182</text:p>
              </table:table-cell>
              <table:table-cell office:value-type="float" office:value="NaN">
                <text:p>NaN</text:p>
              </table:table-cell>
              <table:table-cell office:value-type="float" office:value="151.616065324221">
                <text:p>151.616065324221</text:p>
              </table:table-cell>
            </table:table-row>
            <table:table-row>
              <table:table-cell office:value-type="float" office:value="46183">
                <text:p>46183</text:p>
              </table:table-cell>
              <table:table-cell office:value-type="float" office:value="NaN">
                <text:p>NaN</text:p>
              </table:table-cell>
              <table:table-cell office:value-type="float" office:value="151.522337992827">
                <text:p>151.522337992827</text:p>
              </table:table-cell>
            </table:table-row>
            <table:table-row>
              <table:table-cell office:value-type="float" office:value="46184">
                <text:p>46184</text:p>
              </table:table-cell>
              <table:table-cell office:value-type="float" office:value="NaN">
                <text:p>NaN</text:p>
              </table:table-cell>
              <table:table-cell office:value-type="float" office:value="151.786866797687">
                <text:p>151.786866797687</text:p>
              </table:table-cell>
            </table:table-row>
            <table:table-row>
              <table:table-cell office:value-type="float" office:value="46185">
                <text:p>46185</text:p>
              </table:table-cell>
              <table:table-cell office:value-type="float" office:value="NaN">
                <text:p>NaN</text:p>
              </table:table-cell>
              <table:table-cell office:value-type="float" office:value="151.235655751591">
                <text:p>151.235655751591</text:p>
              </table:table-cell>
            </table:table-row>
            <table:table-row>
              <table:table-cell office:value-type="float" office:value="46186">
                <text:p>46186</text:p>
              </table:table-cell>
              <table:table-cell office:value-type="float" office:value="NaN">
                <text:p>NaN</text:p>
              </table:table-cell>
              <table:table-cell office:value-type="float" office:value="150.875400032059">
                <text:p>150.875400032059</text:p>
              </table:table-cell>
            </table:table-row>
            <table:table-row>
              <table:table-cell office:value-type="float" office:value="46187">
                <text:p>46187</text:p>
              </table:table-cell>
              <table:table-cell office:value-type="float" office:value="NaN">
                <text:p>NaN</text:p>
              </table:table-cell>
              <table:table-cell office:value-type="float" office:value="150.750526556474">
                <text:p>150.750526556474</text:p>
              </table:table-cell>
            </table:table-row>
            <table:table-row>
              <table:table-cell office:value-type="float" office:value="46188">
                <text:p>46188</text:p>
              </table:table-cell>
              <table:table-cell office:value-type="float" office:value="NaN">
                <text:p>NaN</text:p>
              </table:table-cell>
              <table:table-cell office:value-type="float" office:value="150.431354631312">
                <text:p>150.431354631312</text:p>
              </table:table-cell>
            </table:table-row>
            <table:table-row>
              <table:table-cell office:value-type="float" office:value="46189">
                <text:p>46189</text:p>
              </table:table-cell>
              <table:table-cell office:value-type="float" office:value="NaN">
                <text:p>NaN</text:p>
              </table:table-cell>
              <table:table-cell office:value-type="float" office:value="150.336447329176">
                <text:p>150.336447329176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148.427007640733">
                <text:p>148.427007640733</text:p>
              </table:table-cell>
            </table:table-row>
            <table:table-row>
              <table:table-cell office:value-type="float" office:value="46191">
                <text:p>46191</text:p>
              </table:table-cell>
              <table:table-cell office:value-type="float" office:value="NaN">
                <text:p>NaN</text:p>
              </table:table-cell>
              <table:table-cell office:value-type="float" office:value="147.223214697359">
                <text:p>147.223214697359</text:p>
              </table:table-cell>
            </table:table-row>
            <table:table-row>
              <table:table-cell office:value-type="float" office:value="46192">
                <text:p>46192</text:p>
              </table:table-cell>
              <table:table-cell office:value-type="float" office:value="NaN">
                <text:p>NaN</text:p>
              </table:table-cell>
              <table:table-cell office:value-type="float" office:value="148.715095475192">
                <text:p>148.715095475192</text:p>
              </table:table-cell>
            </table:table-row>
            <table:table-row>
              <table:table-cell office:value-type="float" office:value="46193">
                <text:p>46193</text:p>
              </table:table-cell>
              <table:table-cell office:value-type="float" office:value="NaN">
                <text:p>NaN</text:p>
              </table:table-cell>
              <table:table-cell office:value-type="float" office:value="148.690122053562">
                <text:p>148.690122053562</text:p>
              </table:table-cell>
            </table:table-row>
            <table:table-row>
              <table:table-cell office:value-type="float" office:value="46194">
                <text:p>46194</text:p>
              </table:table-cell>
              <table:table-cell office:value-type="float" office:value="NaN">
                <text:p>NaN</text:p>
              </table:table-cell>
              <table:table-cell office:value-type="float" office:value="148.782771734584">
                <text:p>148.782771734584</text:p>
              </table:table-cell>
            </table:table-row>
            <table:table-row>
              <table:table-cell office:value-type="float" office:value="46195">
                <text:p>46195</text:p>
              </table:table-cell>
              <table:table-cell office:value-type="float" office:value="NaN">
                <text:p>NaN</text:p>
              </table:table-cell>
              <table:table-cell office:value-type="float" office:value="149.782633018968">
                <text:p>149.782633018968</text:p>
              </table:table-cell>
            </table:table-row>
            <table:table-row>
              <table:table-cell office:value-type="float" office:value="46196">
                <text:p>46196</text:p>
              </table:table-cell>
              <table:table-cell office:value-type="float" office:value="NaN">
                <text:p>NaN</text:p>
              </table:table-cell>
              <table:table-cell office:value-type="float" office:value="149.90899994422">
                <text:p>149.90899994422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NaN">
                <text:p>NaN</text:p>
              </table:table-cell>
              <table:table-cell office:value-type="float" office:value="149.789924290642">
                <text:p>149.789924290642</text:p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NaN">
                <text:p>NaN</text:p>
              </table:table-cell>
              <table:table-cell office:value-type="float" office:value="148.842836066184">
                <text:p>148.842836066184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NaN">
                <text:p>NaN</text:p>
              </table:table-cell>
              <table:table-cell office:value-type="float" office:value="150.044601646452">
                <text:p>150.044601646452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NaN">
                <text:p>NaN</text:p>
              </table:table-cell>
              <table:table-cell office:value-type="float" office:value="150.389248410652">
                <text:p>150.38924841065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NaN">
                <text:p>NaN</text:p>
              </table:table-cell>
              <table:table-cell office:value-type="float" office:value="150.447164033703">
                <text:p>150.447164033703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NaN">
                <text:p>NaN</text:p>
              </table:table-cell>
              <table:table-cell office:value-type="float" office:value="150.851838602774">
                <text:p>150.851838602774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149.202542946947">
                <text:p>149.202542946947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NaN">
                <text:p>NaN</text:p>
              </table:table-cell>
              <table:table-cell office:value-type="float" office:value="148.557730160399">
                <text:p>148.557730160399</text:p>
              </table:table-cell>
            </table:table-row>
            <table:table-row>
              <table:table-cell office:value-type="float" office:value="46205">
                <text:p>46205</text:p>
              </table:table-cell>
              <table:table-cell office:value-type="float" office:value="NaN">
                <text:p>NaN</text:p>
              </table:table-cell>
              <table:table-cell office:value-type="float" office:value="146.682518919464">
                <text:p>146.682518919464</text:p>
              </table:table-cell>
            </table:table-row>
            <table:table-row>
              <table:table-cell office:value-type="float" office:value="46206">
                <text:p>46206</text:p>
              </table:table-cell>
              <table:table-cell office:value-type="float" office:value="NaN">
                <text:p>NaN</text:p>
              </table:table-cell>
              <table:table-cell office:value-type="float" office:value="144.906183773236">
                <text:p>144.906183773236</text:p>
              </table:table-cell>
            </table:table-row>
            <table:table-row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145.205600958761">
                <text:p>145.205600958761</text:p>
              </table:table-cell>
            </table:table-row>
            <table:table-row>
              <table:table-cell office:value-type="float" office:value="46208">
                <text:p>46208</text:p>
              </table:table-cell>
              <table:table-cell office:value-type="float" office:value="NaN">
                <text:p>NaN</text:p>
              </table:table-cell>
              <table:table-cell office:value-type="float" office:value="145.200866022735">
                <text:p>145.20086602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